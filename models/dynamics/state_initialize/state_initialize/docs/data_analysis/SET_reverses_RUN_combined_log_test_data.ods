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3.402in"/>
    </style:style>
    <style:style style:name="co4" style:family="table-column">
      <style:table-column-properties fo:break-before="auto" style:column-width="3.520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8x8 Earth Only" table:style-name="ta1">
        <table:shapes>
          <draw:frame draw:z-index="0" draw:style-name="gr1" draw:text-style-name="P1" svg:width="6.2988in" svg:height="3.5429in" svg:x="4.235in" svg:y="4.6055in">
            <draw:object draw:notify-on-update-of-ranges="'8x8 Earth Only'.F16:'8x8 Earth Only'.F25 '8x8 Earth Only'.B16:'8x8 Earth Only'.B25 '8x8 Earth Only'.E15:'8x8 Earth Only'.E15 '8x8 Earth Only'.E16:'8x8 Earth Only'.E25 '8x8 Earth Only'.B16:'8x8 Earth Only'.B25 '8x8 Earth Only'.F15:'8x8 Earth Only'.F15 '8x8 Earth Only'.F16:'8x8 Earth Only'.F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ys.exec.out.time {s}</text:p>
          </table:table-cell>
          <table:table-cell office:value-type="string">
            <text:p>test.prop_time {--}</text:p>
          </table:table-cell>
          <table:table-cell office:value-type="string">
            <text:p>test.body.composite_body.state.trans.position[0] {m}</text:p>
          </table:table-cell>
          <table:table-cell office:value-type="string">
            <text:p>test.body.composite_body.state.trans.velocity[0] {m/s}</text:p>
          </table:table-cell>
          <table:table-cell office:value-type="string">
            <text:p>test.body.composite_body.state.trans.position[1] {m}</text:p>
          </table:table-cell>
          <table:table-cell office:value-type="string">
            <text:p>test.body.composite_body.state.trans.velocity[1] {m/s}</text:p>
          </table:table-cell>
          <table:table-cell office:value-type="string">
            <text:p>test.body.composite_body.state.trans.position[2] {m}</text:p>
          </table:table-cell>
          <table:table-cell office:value-type="string">
            <text:p>test.body.composite_body.state.trans.velocity[2] {m/s}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800000">
            <text:p>6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6800000.00020226">
            <text:p>6800000.00020226</text:p>
          </table:table-cell>
          <table:table-cell office:value-type="float" office:value="0.0000896607592597576">
            <text:p>8.96607592597576E-005</text:p>
          </table:table-cell>
          <table:table-cell office:value-type="float" office:value="0.000200881233467953">
            <text:p>0.0002008812</text:p>
          </table:table-cell>
          <table:table-cell office:value-type="float" office:value="8000.00006200575">
            <text:p>8000.0000620058</text:p>
          </table:table-cell>
          <table:table-cell office:value-type="float" office:value="-0.00000166638912020034">
            <text:p>-1.66638912020034E-006</text:p>
          </table:table-cell>
          <table:table-cell office:value-type="float" office:value="-0.000000522267240319845">
            <text:p>-5.22267240319845E-00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6800000.0011957">
            <text:p>6800000.0011957</text:p>
          </table:table-cell>
          <table:table-cell office:value-type="float" office:value="0.000121683233889058">
            <text:p>0.0001216832</text:p>
          </table:table-cell>
          <table:table-cell office:value-type="float" office:value="0.00375806441661553">
            <text:p>0.0037580644</text:p>
          </table:table-cell>
          <table:table-cell office:value-type="float" office:value="8000.00018134953">
            <text:p>8000.0001813495</text:p>
          </table:table-cell>
          <table:table-cell office:value-type="float" office:value="-0.0000235790459499096">
            <text:p>-0.000023579</text:p>
          </table:table-cell>
          <table:table-cell office:value-type="float" office:value="-0.0000012732978811191">
            <text:p>-1.2732978811191E-00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6800000.00471648">
            <text:p>6800000.00471648</text:p>
          </table:table-cell>
          <table:table-cell office:value-type="float" office:value="0.000167606783589847">
            <text:p>0.0001676068</text:p>
          </table:table-cell>
          <table:table-cell office:value-type="float" office:value="0.0148504554881583">
            <text:p>0.0148504555</text:p>
          </table:table-cell>
          <table:table-cell office:value-type="float" office:value="8000.00032944257">
            <text:p>8000.0003294426</text:p>
          </table:table-cell>
          <table:table-cell office:value-type="float" office:value="-0.0000544668757199984">
            <text:p>-5.44668757199984E-005</text:p>
          </table:table-cell>
          <table:table-cell office:value-type="float" office:value="-0.00000165898453861574">
            <text:p>-0.00000165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200">
            <text:p>-200</text:p>
          </table:table-cell>
          <table:table-cell office:value-type="float" office:value="6800000.02289885">
            <text:p>6800000.02289885</text:p>
          </table:table-cell>
          <table:table-cell office:value-type="float" office:value="0.000286512139345163">
            <text:p>0.0002865121</text:p>
          </table:table-cell>
          <table:table-cell office:value-type="float" office:value="0.0587823437808765">
            <text:p>0.0587823438</text:p>
          </table:table-cell>
          <table:table-cell office:value-type="float" office:value="8000.00062092337">
            <text:p>8000.0006209234</text:p>
          </table:table-cell>
          <table:table-cell office:value-type="float" office:value="0.0000848943598196501">
            <text:p>8.48943598196501E-005</text:p>
          </table:table-cell>
          <table:table-cell office:value-type="float" office:value="-0.000000641393373267035">
            <text:p>-6.41393373267035E-00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500">
            <text:p>-500</text:p>
          </table:table-cell>
          <table:table-cell office:value-type="float" office:value="6800000.2580062">
            <text:p>6800000.2580062</text:p>
          </table:table-cell>
          <table:table-cell office:value-type="float" office:value="0.000981375807889151">
            <text:p>0.0009813758</text:p>
          </table:table-cell>
          <table:table-cell office:value-type="float" office:value="0.308258666302208">
            <text:p>0.3082586663</text:p>
          </table:table-cell>
          <table:table-cell office:value-type="float" office:value="8000.00131729601">
            <text:p>8000.001317296</text:p>
          </table:table-cell>
          <table:table-cell office:value-type="float" office:value="0.00351529597711601">
            <text:p>0.003515296</text:p>
          </table:table-cell>
          <table:table-cell office:value-type="float" office:value="0.00000963163463213358">
            <text:p>9.63163463213358E-00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-1000">
            <text:p>-1000</text:p>
          </table:table-cell>
          <table:table-cell office:value-type="float" office:value="6800001.49639215">
            <text:p>6800001.49639215</text:p>
          </table:table-cell>
          <table:table-cell office:value-type="float" office:value="0.00325465300159955">
            <text:p>0.003254653</text:p>
          </table:table-cell>
          <table:table-cell office:value-type="float" office:value="0.431096665266523">
            <text:p>0.4310966653</text:p>
          </table:table-cell>
          <table:table-cell office:value-type="float" office:value="8000.0013098351">
            <text:p>8000.0013098351</text:p>
          </table:table-cell>
          <table:table-cell office:value-type="float" office:value="0.00692974853286635">
            <text:p>0.0069297485</text:p>
          </table:table-cell>
          <table:table-cell office:value-type="float" office:value="0.0000166107902946359">
            <text:p>1.66107902946359E-00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2000">
            <text:p>-2000</text:p>
          </table:table-cell>
          <table:table-cell office:value-type="float" office:value="6800005.8552559">
            <text:p>6800005.8552559</text:p>
          </table:table-cell>
          <table:table-cell office:value-type="float" office:value="0.0108451735533457">
            <text:p>0.0108451736</text:p>
          </table:table-cell>
          <table:table-cell office:value-type="float" office:value="-3.23833007853591">
            <text:p>-3.2383300785</text:p>
          </table:table-cell>
          <table:table-cell office:value-type="float" office:value="7999.99827783515">
            <text:p>7999.9982778352</text:p>
          </table:table-cell>
          <table:table-cell office:value-type="float" office:value="-0.0034308355217706">
            <text:p>-0.0034308355</text:p>
          </table:table-cell>
          <table:table-cell office:value-type="float" office:value="0.0000254071251866179">
            <text:p>2.54071251866179E-00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-3000">
            <text:p>-3000</text:p>
          </table:table-cell>
          <table:table-cell office:value-type="float" office:value="6800010.22793669">
            <text:p>6800010.22793669</text:p>
          </table:table-cell>
          <table:table-cell office:value-type="float" office:value="0.020902364963046">
            <text:p>0.020902365</text:p>
          </table:table-cell>
          <table:table-cell office:value-type="float" office:value="-11.5866974468581">
            <text:p>-11.5866974469</text:p>
          </table:table-cell>
          <table:table-cell office:value-type="float" office:value="7999.99459348859">
            <text:p>7999.9945934886</text:p>
          </table:table-cell>
          <table:table-cell office:value-type="float" office:value="-0.00219450998674242">
            <text:p>-0.00219451</text:p>
          </table:table-cell>
          <table:table-cell office:value-type="float" office:value="0.000016985432573521">
            <text:p>1.6985432573521E-005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6000">
            <text:p>-6000</text:p>
          </table:table-cell>
          <table:table-cell office:value-type="float" office:value="6800021.42550258">
            <text:p>6800021.42550258</text:p>
          </table:table-cell>
          <table:table-cell office:value-type="float" office:value="0.123738030759856">
            <text:p>0.1237380308</text:p>
          </table:table-cell>
          <table:table-cell office:value-type="float" office:value="-114.104093193738">
            <text:p>-114.1040931937</text:p>
          </table:table-cell>
          <table:table-cell office:value-type="float" office:value="7999.98748429907">
            <text:p>7999.9874842991</text:p>
          </table:table-cell>
          <table:table-cell office:value-type="float" office:value="0.00504822983642969">
            <text:p>0.0050482298</text:p>
          </table:table-cell>
          <table:table-cell office:value-type="float" office:value="0.0000040956697552396">
            <text:p>4.0956697552396E-00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6000">
            <text:p>-6000</text:p>
          </table:table-cell>
          <table:table-cell office:value-type="float" office:value="6800021.42550258">
            <text:p>6800021.42550258</text:p>
          </table:table-cell>
          <table:table-cell office:value-type="float" office:value="0.123738030759856">
            <text:p>0.1237380308</text:p>
          </table:table-cell>
          <table:table-cell office:value-type="float" office:value="-114.104093193738">
            <text:p>-114.1040931937</text:p>
          </table:table-cell>
          <table:table-cell office:value-type="float" office:value="7999.98748429907">
            <text:p>7999.9874842991</text:p>
          </table:table-cell>
          <table:table-cell office:value-type="float" office:value="0.00504822983642969">
            <text:p>0.0050482298</text:p>
          </table:table-cell>
          <table:table-cell office:value-type="float" office:value="0.0000040956697552396">
            <text:p>4.0956697552396E-00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reverse prop time</text:p>
          </table:table-cell>
          <table:table-cell table:style-name="ce1" office:value-type="string">
            <text:p>position magnitude</text:p>
          </table:table-cell>
          <table:table-cell table:style-name="ce1" office:value-type="string">
            <text:p>velocity magnitude</text:p>
          </table:table-cell>
          <table:table-cell table:style-name="ce1" office:value-type="string">
            <text:p>position % diff</text:p>
          </table:table-cell>
          <table:table-cell table:style-name="ce1" office:value-type="string">
            <text:p>velocity % diff</text:p>
          </table:table-cell>
          <table:table-cell table:number-columns-repeated="2"/>
        </table:table-row>
        <table:table-row table:style-name="ro1">
          <table:table-cell/>
          <table:table-cell table:formula="of:=[.A2]" office:value-type="float" office:value="0">
            <text:p>0</text:p>
          </table:table-cell>
          <table:table-cell table:formula="of:=SQRT([.C2]*[.C2]+[.E2]*[.E2]+[.G2]*[.G2])" office:value-type="float" office:value="6800000">
            <text:p>6800000</text:p>
          </table:table-cell>
          <table:table-cell table:formula="of:=SQRT([.D2]*[.D2]+[.F2]*[.F2]+[.H2]*[.H2])" office:value-type="float" office:value="8000">
            <text:p>8000</text:p>
          </table:table-cell>
          <table:table-cell table:formula="of:=ABS(([.C16]-6800000)/6800000)" office:value-type="float" office:value="0">
            <text:p>0</text:p>
          </table:table-cell>
          <table:table-cell table:formula="of:=ABS(([.D16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3]" office:value-type="float" office:value="10">
            <text:p>10</text:p>
          </table:table-cell>
          <table:table-cell table:formula="of:=SQRT([.C3]*[.C3]+[.E3]*[.E3]+[.G3]*[.G3])" office:value-type="float" office:value="6800000.00020226">
            <text:p>6800000.00020226</text:p>
          </table:table-cell>
          <table:table-cell table:formula="of:=SQRT([.D3]*[.D3]+[.F3]*[.F3]+[.H3]*[.H3])" office:value-type="float" office:value="8000.00006200575">
            <text:p>8000.0000620058</text:p>
          </table:table-cell>
          <table:table-cell table:formula="of:=ABS(([.C17]-6800000)/6800000)" office:value-type="float" office:value="0.0000000000297441147267818">
            <text:p>2.97441147267818E-011</text:p>
          </table:table-cell>
          <table:table-cell table:formula="of:=ABS(([.D17]-8000)/8000)" office:value-type="float" office:value="0.00000000775071907810343">
            <text:p>7.75071907810343E-009</text:p>
          </table:table-cell>
          <table:table-cell table:number-columns-repeated="2"/>
        </table:table-row>
        <table:table-row table:style-name="ro1">
          <table:table-cell/>
          <table:table-cell table:formula="of:=[.A4]" office:value-type="float" office:value="50">
            <text:p>50</text:p>
          </table:table-cell>
          <table:table-cell table:formula="of:=SQRT([.C4]*[.C4]+[.E4]*[.E4]+[.G4]*[.G4])" office:value-type="float" office:value="6800000.0011957">
            <text:p>6800000.0011957</text:p>
          </table:table-cell>
          <table:table-cell table:formula="of:=SQRT([.D4]*[.D4]+[.F4]*[.F4]+[.H4]*[.H4])" office:value-type="float" office:value="8000.00018134953">
            <text:p>8000.0001813495</text:p>
          </table:table-cell>
          <table:table-cell table:formula="of:=ABS(([.C18]-6800000)/6800000)" office:value-type="float" office:value="0.000000000175838084781871">
            <text:p>1.75838084781871E-010</text:p>
          </table:table-cell>
          <table:table-cell table:formula="of:=ABS(([.D18]-8000)/8000)" office:value-type="float" office:value="0.0000000226686910309581">
            <text:p>2.26686910309581E-008</text:p>
          </table:table-cell>
          <table:table-cell table:number-columns-repeated="2"/>
        </table:table-row>
        <table:table-row table:style-name="ro1">
          <table:table-cell/>
          <table:table-cell table:formula="of:=[.A5]" office:value-type="float" office:value="100">
            <text:p>100</text:p>
          </table:table-cell>
          <table:table-cell table:formula="of:=SQRT([.C5]*[.C5]+[.E5]*[.E5]+[.G5]*[.G5])" office:value-type="float" office:value="6800000.00471648">
            <text:p>6800000.00471648</text:p>
          </table:table-cell>
          <table:table-cell table:formula="of:=SQRT([.D5]*[.D5]+[.F5]*[.F5]+[.H5]*[.H5])" office:value-type="float" office:value="8000.00032944257">
            <text:p>8000.0003294426</text:p>
          </table:table-cell>
          <table:table-cell table:formula="of:=ABS(([.C19]-6800000)/6800000)" office:value-type="float" office:value="0.000000000693600022179239">
            <text:p>6.93600022179239E-010</text:p>
          </table:table-cell>
          <table:table-cell table:formula="of:=ABS(([.D19]-8000)/8000)" office:value-type="float" office:value="0.0000000411803218867135">
            <text:p>4.11803218867135E-008</text:p>
          </table:table-cell>
          <table:table-cell table:number-columns-repeated="2"/>
        </table:table-row>
        <table:table-row table:style-name="ro1">
          <table:table-cell/>
          <table:table-cell table:formula="of:=[.A6]" office:value-type="float" office:value="200">
            <text:p>200</text:p>
          </table:table-cell>
          <table:table-cell table:formula="of:=SQRT([.C6]*[.C6]+[.E6]*[.E6]+[.G6]*[.G6])" office:value-type="float" office:value="6800000.02289885">
            <text:p>6800000.02289885</text:p>
          </table:table-cell>
          <table:table-cell table:formula="of:=SQRT([.D6]*[.D6]+[.F6]*[.F6]+[.H6]*[.H6])" office:value-type="float" office:value="8000.00062092338">
            <text:p>8000.0006209234</text:p>
          </table:table-cell>
          <table:table-cell table:formula="of:=ABS(([.C20]-6800000)/6800000)" office:value-type="float" office:value="0.00000000336747794576427">
            <text:p>3.36747794576427E-009</text:p>
          </table:table-cell>
          <table:table-cell table:formula="of:=ABS(([.D20]-8000)/8000)" office:value-type="float" office:value="0.0000000776154221284742">
            <text:p>7.76154221284742E-008</text:p>
          </table:table-cell>
          <table:table-cell table:number-columns-repeated="2"/>
        </table:table-row>
        <table:table-row table:style-name="ro1">
          <table:table-cell/>
          <table:table-cell table:formula="of:=[.A7]" office:value-type="float" office:value="500">
            <text:p>500</text:p>
          </table:table-cell>
          <table:table-cell table:formula="of:=SQRT([.C7]*[.C7]+[.E7]*[.E7]+[.G7]*[.G7])" office:value-type="float" office:value="6800000.25800621">
            <text:p>6800000.25800621</text:p>
          </table:table-cell>
          <table:table-cell table:formula="of:=SQRT([.D7]*[.D7]+[.F7]*[.F7]+[.H7]*[.H7])" office:value-type="float" office:value="8000.00131729607">
            <text:p>8000.0013172961</text:p>
          </table:table-cell>
          <table:table-cell table:formula="of:=ABS(([.C21]-6800000)/6800000)" office:value-type="float" office:value="0.0000000379420893595499">
            <text:p>3.79420893595499E-008</text:p>
          </table:table-cell>
          <table:table-cell table:formula="of:=ABS(([.D21]-8000)/8000)" office:value-type="float" office:value="0.000000164662008273808">
            <text:p>1.64662008273808E-007</text:p>
          </table:table-cell>
          <table:table-cell table:number-columns-repeated="2"/>
        </table:table-row>
        <table:table-row table:style-name="ro1">
          <table:table-cell/>
          <table:table-cell table:formula="of:=[.A8]" office:value-type="float" office:value="1000">
            <text:p>1000</text:p>
          </table:table-cell>
          <table:table-cell table:formula="of:=SQRT([.C8]*[.C8]+[.E8]*[.E8]+[.G8]*[.G8])" office:value-type="float" office:value="6800001.49639217">
            <text:p>6800001.49639217</text:p>
          </table:table-cell>
          <table:table-cell table:formula="of:=SQRT([.D8]*[.D8]+[.F8]*[.F8]+[.H8]*[.H8])" office:value-type="float" office:value="8000.00130983576">
            <text:p>8000.0013098358</text:p>
          </table:table-cell>
          <table:table-cell table:formula="of:=ABS(([.C22]-6800000)/6800000)" office:value-type="float" office:value="0.000000220057671506177">
            <text:p>2.20057671506177E-007</text:p>
          </table:table-cell>
          <table:table-cell table:formula="of:=ABS(([.D22]-8000)/8000)" office:value-type="float" office:value="0.00000016372946959109">
            <text:p>1.6372946959109E-007</text:p>
          </table:table-cell>
          <table:table-cell table:number-columns-repeated="2"/>
        </table:table-row>
        <table:table-row table:style-name="ro1">
          <table:table-cell/>
          <table:table-cell table:formula="of:=[.A9]" office:value-type="float" office:value="2000">
            <text:p>2000</text:p>
          </table:table-cell>
          <table:table-cell table:formula="of:=SQRT([.C9]*[.C9]+[.E9]*[.E9]+[.G9]*[.G9])" office:value-type="float" office:value="6800005.85525667">
            <text:p>6800005.85525667</text:p>
          </table:table-cell>
          <table:table-cell table:formula="of:=SQRT([.D9]*[.D9]+[.F9]*[.F9]+[.H9]*[.H9])" office:value-type="float" office:value="7999.9982778425">
            <text:p>7999.9982778425</text:p>
          </table:table-cell>
          <table:table-cell table:formula="of:=ABS(([.C23]-6800000)/6800000)" office:value-type="float" office:value="0.000000861067156827844">
            <text:p>8.61067156827844E-007</text:p>
          </table:table-cell>
          <table:table-cell table:formula="of:=ABS(([.D23]-8000)/8000)" office:value-type="float" office:value="0.000000215269687942055">
            <text:p>2.15269687942055E-007</text:p>
          </table:table-cell>
          <table:table-cell table:number-columns-repeated="2"/>
        </table:table-row>
        <table:table-row table:style-name="ro1">
          <table:table-cell/>
          <table:table-cell table:formula="of:=[.A10]" office:value-type="float" office:value="3000">
            <text:p>3000</text:p>
          </table:table-cell>
          <table:table-cell table:formula="of:=SQRT([.C10]*[.C10]+[.E10]*[.E10]+[.G10]*[.G10])" office:value-type="float" office:value="6800010.22794656">
            <text:p>6800010.22794656</text:p>
          </table:table-cell>
          <table:table-cell table:formula="of:=SQRT([.D10]*[.D10]+[.F10]*[.F10]+[.H10]*[.H10])" office:value-type="float" office:value="7999.9945935159">
            <text:p>7999.9945935159</text:p>
          </table:table-cell>
          <table:table-cell table:formula="of:=ABS(([.C24]-6800000)/6800000)" office:value-type="float" office:value="0.00000150410978890517">
            <text:p>1.50410978890517E-006</text:p>
          </table:table-cell>
          <table:table-cell table:formula="of:=ABS(([.D24]-8000)/8000)" office:value-type="float" office:value="0.000000675810512348107">
            <text:p>6.75810512348107E-007</text:p>
          </table:table-cell>
          <table:table-cell table:number-columns-repeated="2"/>
        </table:table-row>
        <table:table-row table:style-name="ro1">
          <table:table-cell/>
          <table:table-cell table:formula="of:=[.A11]" office:value-type="float" office:value="6000">
            <text:p>6000</text:p>
          </table:table-cell>
          <table:table-cell table:formula="of:=SQRT([.C11]*[.C11]+[.E11]*[.E11]+[.G11]*[.G11])" office:value-type="float" office:value="6800021.42645991">
            <text:p>6800021.42645991</text:p>
          </table:table-cell>
          <table:table-cell table:formula="of:=SQRT([.D11]*[.D11]+[.F11]*[.F11]+[.H11]*[.H11])" office:value-type="float" office:value="7999.98748525602">
            <text:p>7999.987485256</text:p>
          </table:table-cell>
          <table:table-cell table:formula="of:=ABS(([.C25]-6800000)/6800000)" office:value-type="float" office:value="0.00000315094998750069">
            <text:p>3.15094998750069E-006</text:p>
          </table:table-cell>
          <table:table-cell table:formula="of:=ABS(([.D25]-8000)/8000)" office:value-type="float" office:value="0.00000156434299810826">
            <text:p>1.56434299810826E-006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2" table:number-rows-repeated="10">
          <table:table-cell table:number-columns-repeated="8"/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herical Earth Only" table:style-name="ta1">
        <table:shapes>
          <draw:frame draw:z-index="0" draw:style-name="gr1" draw:text-style-name="P1" svg:width="6.2988in" svg:height="3.5429in" svg:x="4.235in" svg:y="4.6055in">
            <draw:object draw:notify-on-update-of-ranges="'Spherical Earth Only'.F16:'Spherical Earth Only'.F25 'Spherical Earth Only'.B16:'Spherical Earth Only'.B25 'Spherical Earth Only'.E15:'Spherical Earth Only'.E15 'Spherical Earth Only'.E16:'Spherical Earth Only'.E25 'Spherical Earth Only'.B16:'Spherical Earth Only'.B25 'Spherical Earth Only'.F15:'Spherical Earth Only'.F15 'Spherical Earth Only'.F16:'Spherical Earth Only'.F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ys.exec.out.time {s}</text:p>
          </table:table-cell>
          <table:table-cell office:value-type="string">
            <text:p>test.prop_time {--}</text:p>
          </table:table-cell>
          <table:table-cell office:value-type="string">
            <text:p>test.body.composite_body.state.trans.position[0] {m}</text:p>
          </table:table-cell>
          <table:table-cell office:value-type="string">
            <text:p>test.body.composite_body.state.trans.velocity[0] {m/s}</text:p>
          </table:table-cell>
          <table:table-cell office:value-type="string">
            <text:p>test.body.composite_body.state.trans.position[1] {m}</text:p>
          </table:table-cell>
          <table:table-cell office:value-type="string">
            <text:p>test.body.composite_body.state.trans.velocity[1] {m/s}</text:p>
          </table:table-cell>
          <table:table-cell office:value-type="string">
            <text:p>test.body.composite_body.state.trans.position[2] {m}</text:p>
          </table:table-cell>
          <table:table-cell office:value-type="string">
            <text:p>test.body.composite_body.state.trans.velocity[2] {m/s}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800000">
            <text:p>6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6800000">
            <text:p>6800000</text:p>
          </table:table-cell>
          <table:table-cell office:value-type="float" office:value="-7.105427357601E-015">
            <text:p>-7.105427357601E-015</text:p>
          </table:table-cell>
          <table:table-cell office:value-type="float" office:value="-0.00000000000818545231595635">
            <text:p>-8.18545231595635E-012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6800000">
            <text:p>6800000</text:p>
          </table:table-cell>
          <table:table-cell office:value-type="float" office:value="-0.000000000000021316282072803">
            <text:p>-2.1316282072803E-014</text:p>
          </table:table-cell>
          <table:table-cell office:value-type="float" office:value="-0.00000000000818545231595635">
            <text:p>-8.18545231595635E-012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6800000">
            <text:p>6800000</text:p>
          </table:table-cell>
          <table:table-cell office:value-type="float" office:value="-0.000000000000021316282072803">
            <text:p>-2.1316282072803E-014</text:p>
          </table:table-cell>
          <table:table-cell office:value-type="float" office:value="-0.00000000000818545231595635">
            <text:p>-8.18545231595635E-012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200">
            <text:p>-200</text:p>
          </table:table-cell>
          <table:table-cell office:value-type="float" office:value="6800000">
            <text:p>6800000</text:p>
          </table:table-cell>
          <table:table-cell office:value-type="float" office:value="-0.000000000000248689957516035">
            <text:p>-2.48689957516035E-013</text:p>
          </table:table-cell>
          <table:table-cell office:value-type="float" office:value="-0.000000000241016095969826">
            <text:p>-2.41016095969826E-010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500">
            <text:p>-500</text:p>
          </table:table-cell>
          <table:table-cell office:value-type="float" office:value="6800000">
            <text:p>6800000</text:p>
          </table:table-cell>
          <table:table-cell office:value-type="float" office:value="0.000000000000797584220890712">
            <text:p>7.97584220890712E-013</text:p>
          </table:table-cell>
          <table:table-cell office:value-type="float" office:value="-0.00000000000818545231595635">
            <text:p>-8.18545231595635E-012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-1000">
            <text:p>-1000</text:p>
          </table:table-cell>
          <table:table-cell office:value-type="float" office:value="6800000">
            <text:p>6800000</text:p>
          </table:table-cell>
          <table:table-cell office:value-type="float" office:value="0.000000000000797584220890712">
            <text:p>7.97584220890712E-013</text:p>
          </table:table-cell>
          <table:table-cell office:value-type="float" office:value="0.00000000015825207810849">
            <text:p>1.5825207810849E-010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2000">
            <text:p>-2000</text:p>
          </table:table-cell>
          <table:table-cell office:value-type="float" office:value="6800000">
            <text:p>6800000</text:p>
          </table:table-cell>
          <table:table-cell office:value-type="float" office:value="-0.00000000000300381941542582">
            <text:p>-3.00381941542582E-012</text:p>
          </table:table-cell>
          <table:table-cell office:value-type="float" office:value="0.00000000203181116376072">
            <text:p>0.000000002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-3000">
            <text:p>-3000</text:p>
          </table:table-cell>
          <table:table-cell office:value-type="float" office:value="6800000">
            <text:p>6800000</text:p>
          </table:table-cell>
          <table:table-cell office:value-type="float" office:value="0.0000000000021120882820469">
            <text:p>2.1120882820469E-012</text:p>
          </table:table-cell>
          <table:table-cell office:value-type="float" office:value="-0.000000000038198777474463">
            <text:p>-3.8198777474463E-011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6000">
            <text:p>-6000</text:p>
          </table:table-cell>
          <table:table-cell office:value-type="float" office:value="6800000.00000001">
            <text:p>6800000.00000001</text:p>
          </table:table-cell>
          <table:table-cell office:value-type="float" office:value="0.00000000000729905025309563">
            <text:p>7.29905025309563E-012</text:p>
          </table:table-cell>
          <table:table-cell office:value-type="float" office:value="-0.00000000488853402202949">
            <text:p>-4.88853402202949E-009</text:p>
          </table:table-cell>
          <table:table-cell office:value-type="float" office:value="7999.99999999999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6000">
            <text:p>-6000</text:p>
          </table:table-cell>
          <table:table-cell office:value-type="float" office:value="6800000.00000001">
            <text:p>6800000.00000001</text:p>
          </table:table-cell>
          <table:table-cell office:value-type="float" office:value="0.00000000000729905025309563">
            <text:p>7.29905025309563E-012</text:p>
          </table:table-cell>
          <table:table-cell office:value-type="float" office:value="-0.00000000488853402202949">
            <text:p>-4.88853402202949E-009</text:p>
          </table:table-cell>
          <table:table-cell office:value-type="float" office:value="7999.99999999999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reverse prop time</text:p>
          </table:table-cell>
          <table:table-cell table:style-name="ce1" office:value-type="string">
            <text:p>position magnitude</text:p>
          </table:table-cell>
          <table:table-cell table:style-name="ce1" office:value-type="string">
            <text:p>velocity magnitude</text:p>
          </table:table-cell>
          <table:table-cell table:style-name="ce1" office:value-type="string">
            <text:p>position % diff</text:p>
          </table:table-cell>
          <table:table-cell table:style-name="ce1" office:value-type="string">
            <text:p>velocity % diff</text:p>
          </table:table-cell>
          <table:table-cell table:number-columns-repeated="2"/>
        </table:table-row>
        <table:table-row table:style-name="ro1">
          <table:table-cell/>
          <table:table-cell table:formula="of:=[.A2]" office:value-type="float" office:value="0">
            <text:p>0</text:p>
          </table:table-cell>
          <table:table-cell table:formula="of:=SQRT([.C2]*[.C2]+[.E2]*[.E2]+[.G2]*[.G2])" office:value-type="float" office:value="6800000">
            <text:p>6800000</text:p>
          </table:table-cell>
          <table:table-cell table:formula="of:=SQRT([.D2]*[.D2]+[.F2]*[.F2]+[.H2]*[.H2])" office:value-type="float" office:value="8000">
            <text:p>8000</text:p>
          </table:table-cell>
          <table:table-cell table:formula="of:=ABS(([.C16]-6800000)/6800000)" office:value-type="float" office:value="0">
            <text:p>0</text:p>
          </table:table-cell>
          <table:table-cell table:formula="of:=ABS(([.D16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3]" office:value-type="float" office:value="10">
            <text:p>10</text:p>
          </table:table-cell>
          <table:table-cell table:formula="of:=SQRT([.C3]*[.C3]+[.E3]*[.E3]+[.G3]*[.G3])" office:value-type="float" office:value="6800000">
            <text:p>6800000</text:p>
          </table:table-cell>
          <table:table-cell table:formula="of:=SQRT([.D3]*[.D3]+[.F3]*[.F3]+[.H3]*[.H3])" office:value-type="float" office:value="8000">
            <text:p>8000</text:p>
          </table:table-cell>
          <table:table-cell table:formula="of:=ABS(([.C17]-6800000)/6800000)" office:value-type="float" office:value="0">
            <text:p>0</text:p>
          </table:table-cell>
          <table:table-cell table:formula="of:=ABS(([.D17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4]" office:value-type="float" office:value="50">
            <text:p>50</text:p>
          </table:table-cell>
          <table:table-cell table:formula="of:=SQRT([.C4]*[.C4]+[.E4]*[.E4]+[.G4]*[.G4])" office:value-type="float" office:value="6800000">
            <text:p>6800000</text:p>
          </table:table-cell>
          <table:table-cell table:formula="of:=SQRT([.D4]*[.D4]+[.F4]*[.F4]+[.H4]*[.H4])" office:value-type="float" office:value="8000">
            <text:p>8000</text:p>
          </table:table-cell>
          <table:table-cell table:formula="of:=ABS(([.C18]-6800000)/6800000)" office:value-type="float" office:value="0">
            <text:p>0</text:p>
          </table:table-cell>
          <table:table-cell table:formula="of:=ABS(([.D18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5]" office:value-type="float" office:value="100">
            <text:p>100</text:p>
          </table:table-cell>
          <table:table-cell table:formula="of:=SQRT([.C5]*[.C5]+[.E5]*[.E5]+[.G5]*[.G5])" office:value-type="float" office:value="6800000">
            <text:p>6800000</text:p>
          </table:table-cell>
          <table:table-cell table:formula="of:=SQRT([.D5]*[.D5]+[.F5]*[.F5]+[.H5]*[.H5])" office:value-type="float" office:value="8000">
            <text:p>8000</text:p>
          </table:table-cell>
          <table:table-cell table:formula="of:=ABS(([.C19]-6800000)/6800000)" office:value-type="float" office:value="0">
            <text:p>0</text:p>
          </table:table-cell>
          <table:table-cell table:formula="of:=ABS(([.D19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6]" office:value-type="float" office:value="200">
            <text:p>200</text:p>
          </table:table-cell>
          <table:table-cell table:formula="of:=SQRT([.C6]*[.C6]+[.E6]*[.E6]+[.G6]*[.G6])" office:value-type="float" office:value="6800000">
            <text:p>6800000</text:p>
          </table:table-cell>
          <table:table-cell table:formula="of:=SQRT([.D6]*[.D6]+[.F6]*[.F6]+[.H6]*[.H6])" office:value-type="float" office:value="8000">
            <text:p>8000</text:p>
          </table:table-cell>
          <table:table-cell table:formula="of:=ABS(([.C20]-6800000)/6800000)" office:value-type="float" office:value="0">
            <text:p>0</text:p>
          </table:table-cell>
          <table:table-cell table:formula="of:=ABS(([.D20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7]" office:value-type="float" office:value="500">
            <text:p>500</text:p>
          </table:table-cell>
          <table:table-cell table:formula="of:=SQRT([.C7]*[.C7]+[.E7]*[.E7]+[.G7]*[.G7])" office:value-type="float" office:value="6800000">
            <text:p>6800000</text:p>
          </table:table-cell>
          <table:table-cell table:formula="of:=SQRT([.D7]*[.D7]+[.F7]*[.F7]+[.H7]*[.H7])" office:value-type="float" office:value="8000">
            <text:p>8000</text:p>
          </table:table-cell>
          <table:table-cell table:formula="of:=ABS(([.C21]-6800000)/6800000)" office:value-type="float" office:value="0">
            <text:p>0</text:p>
          </table:table-cell>
          <table:table-cell table:formula="of:=ABS(([.D21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8]" office:value-type="float" office:value="1000">
            <text:p>1000</text:p>
          </table:table-cell>
          <table:table-cell table:formula="of:=SQRT([.C8]*[.C8]+[.E8]*[.E8]+[.G8]*[.G8])" office:value-type="float" office:value="6800000">
            <text:p>6800000</text:p>
          </table:table-cell>
          <table:table-cell table:formula="of:=SQRT([.D8]*[.D8]+[.F8]*[.F8]+[.H8]*[.H8])" office:value-type="float" office:value="8000">
            <text:p>8000</text:p>
          </table:table-cell>
          <table:table-cell table:formula="of:=ABS(([.C22]-6800000)/6800000)" office:value-type="float" office:value="0">
            <text:p>0</text:p>
          </table:table-cell>
          <table:table-cell table:formula="of:=ABS(([.D22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9]" office:value-type="float" office:value="2000">
            <text:p>2000</text:p>
          </table:table-cell>
          <table:table-cell table:formula="of:=SQRT([.C9]*[.C9]+[.E9]*[.E9]+[.G9]*[.G9])" office:value-type="float" office:value="6800000">
            <text:p>6800000</text:p>
          </table:table-cell>
          <table:table-cell table:formula="of:=SQRT([.D9]*[.D9]+[.F9]*[.F9]+[.H9]*[.H9])" office:value-type="float" office:value="8000">
            <text:p>8000</text:p>
          </table:table-cell>
          <table:table-cell table:formula="of:=ABS(([.C23]-6800000)/6800000)" office:value-type="float" office:value="0">
            <text:p>0</text:p>
          </table:table-cell>
          <table:table-cell table:formula="of:=ABS(([.D23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10]" office:value-type="float" office:value="3000">
            <text:p>3000</text:p>
          </table:table-cell>
          <table:table-cell table:formula="of:=SQRT([.C10]*[.C10]+[.E10]*[.E10]+[.G10]*[.G10])" office:value-type="float" office:value="6800000">
            <text:p>6800000</text:p>
          </table:table-cell>
          <table:table-cell table:formula="of:=SQRT([.D10]*[.D10]+[.F10]*[.F10]+[.H10]*[.H10])" office:value-type="float" office:value="8000">
            <text:p>8000</text:p>
          </table:table-cell>
          <table:table-cell table:formula="of:=ABS(([.C24]-6800000)/6800000)" office:value-type="float" office:value="0">
            <text:p>0</text:p>
          </table:table-cell>
          <table:table-cell table:formula="of:=ABS(([.D24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11]" office:value-type="float" office:value="6000">
            <text:p>6000</text:p>
          </table:table-cell>
          <table:table-cell table:formula="of:=SQRT([.C11]*[.C11]+[.E11]*[.E11]+[.G11]*[.G11])" office:value-type="float" office:value="6800000.00000001">
            <text:p>6800000.00000001</text:p>
          </table:table-cell>
          <table:table-cell table:formula="of:=SQRT([.D11]*[.D11]+[.F11]*[.F11]+[.H11]*[.H11])" office:value-type="float" office:value="7999.99999999999">
            <text:p>8000</text:p>
          </table:table-cell>
          <table:table-cell table:formula="of:=ABS(([.C25]-6800000)/6800000)" office:value-type="float" office:value="0">
            <text:p>0</text:p>
          </table:table-cell>
          <table:table-cell table:formula="of:=ABS(([.D25]-8000)/8000)" office:value-type="float" office:value="0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2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herical Earth Moon Sun" table:style-name="ta1">
        <table:shapes>
          <draw:frame draw:z-index="0" draw:style-name="gr1" draw:text-style-name="P1" svg:width="6.2988in" svg:height="3.5429in" svg:x="4.235in" svg:y="4.6055in">
            <draw:object draw:notify-on-update-of-ranges="'Spherical Earth Moon Sun'.F16:'Spherical Earth Moon Sun'.F25 'Spherical Earth Moon Sun'.B16:'Spherical Earth Moon Sun'.B25 'Spherical Earth Moon Sun'.E15:'Spherical Earth Moon Sun'.E15 'Spherical Earth Moon Sun'.E16:'Spherical Earth Moon Sun'.E25 'Spherical Earth Moon Sun'.B16:'Spherical Earth Moon Sun'.B25 'Spherical Earth Moon Sun'.F15:'Spherical Earth Moon Sun'.F15 'Spherical Earth Moon Sun'.F16:'Spherical Earth Moon Sun'.F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ys.exec.out.time {s}</text:p>
          </table:table-cell>
          <table:table-cell office:value-type="string">
            <text:p>test.prop_time {--}</text:p>
          </table:table-cell>
          <table:table-cell office:value-type="string">
            <text:p>test.body.composite_body.state.trans.position[0] {m}</text:p>
          </table:table-cell>
          <table:table-cell office:value-type="string">
            <text:p>test.body.composite_body.state.trans.velocity[0] {m/s}</text:p>
          </table:table-cell>
          <table:table-cell office:value-type="string">
            <text:p>test.body.composite_body.state.trans.position[1] {m}</text:p>
          </table:table-cell>
          <table:table-cell office:value-type="string">
            <text:p>test.body.composite_body.state.trans.velocity[1] {m/s}</text:p>
          </table:table-cell>
          <table:table-cell office:value-type="string">
            <text:p>test.body.composite_body.state.trans.position[2] {m}</text:p>
          </table:table-cell>
          <table:table-cell office:value-type="string">
            <text:p>test.body.composite_body.state.trans.velocity[2] {m/s}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800000">
            <text:p>6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6800000">
            <text:p>6800000</text:p>
          </table:table-cell>
          <table:table-cell office:value-type="float" office:value="-0.000000000161556101829774">
            <text:p>-1.61556101829774E-010</text:p>
          </table:table-cell>
          <table:table-cell office:value-type="float" office:value="-0.0000000000345607986673713">
            <text:p>-3.45607986673713E-011</text:p>
          </table:table-cell>
          <table:table-cell office:value-type="float" office:value="8000">
            <text:p>8000</text:p>
          </table:table-cell>
          <table:table-cell office:value-type="float" office:value="0.0000000000324418719837534">
            <text:p>3.24418719837534E-011</text:p>
          </table:table-cell>
          <table:table-cell office:value-type="float" office:value="0.0000000000103360029880007">
            <text:p>1.03360029880007E-0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6799999.99999993">
            <text:p>6799999.99999993</text:p>
          </table:table-cell>
          <table:table-cell office:value-type="float" office:value="-0.00000000439685798880873">
            <text:p>-4.39685798880873E-009</text:p>
          </table:table-cell>
          <table:table-cell office:value-type="float" office:value="-0.00000000512136466568336">
            <text:p>-5.12136466568336E-009</text:p>
          </table:table-cell>
          <table:table-cell office:value-type="float" office:value="7999.99999999973">
            <text:p>7999.9999999997</text:p>
          </table:table-cell>
          <table:table-cell office:value-type="float" office:value="0.00000000406939744050777">
            <text:p>4.06939744050777E-009</text:p>
          </table:table-cell>
          <table:table-cell office:value-type="float" office:value="0.000000000259713585124399">
            <text:p>2.59713585124399E-01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6799999.99999941">
            <text:p>6799999.99999941</text:p>
          </table:table-cell>
          <table:table-cell office:value-type="float" office:value="-0.0000000177726420247382">
            <text:p>-1.77726420247382E-008</text:p>
          </table:table-cell>
          <table:table-cell office:value-type="float" office:value="-0.0000000553982317796908">
            <text:p>-5.53982317796908E-008</text:p>
          </table:table-cell>
          <table:table-cell office:value-type="float" office:value="7999.99999999862">
            <text:p>7999.9999999986</text:p>
          </table:table-cell>
          <table:table-cell office:value-type="float" office:value="0.0000000276079625392231">
            <text:p>2.76079625392231E-008</text:p>
          </table:table-cell>
          <table:table-cell office:value-type="float" office:value="0.000000000939138035269847">
            <text:p>9.39138035269847E-01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200">
            <text:p>-200</text:p>
          </table:table-cell>
          <table:table-cell office:value-type="float" office:value="6799999.99999527">
            <text:p>6799999.99999527</text:p>
          </table:table-cell>
          <table:table-cell office:value-type="float" office:value="-0.0000000715972419129685">
            <text:p>-7.15972419129685E-008</text:p>
          </table:table-cell>
          <table:table-cell office:value-type="float" office:value="-0.000000679649019730277">
            <text:p>-6.79649019730277E-007</text:p>
          </table:table-cell>
          <table:table-cell office:value-type="float" office:value="7999.99999999212">
            <text:p>7999.9999999921</text:p>
          </table:table-cell>
          <table:table-cell office:value-type="float" office:value="0.000000133967241181234">
            <text:p>0.000000134</text:p>
          </table:table-cell>
          <table:table-cell office:value-type="float" office:value="0.00000000288227278138741">
            <text:p>2.88227278138741E-00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500">
            <text:p>-500</text:p>
          </table:table-cell>
          <table:table-cell office:value-type="float" office:value="6799999.99992757">
            <text:p>6799999.99992757</text:p>
          </table:table-cell>
          <table:table-cell office:value-type="float" office:value="-0.000000454462631083175">
            <text:p>-4.54462631083175E-007</text:p>
          </table:table-cell>
          <table:table-cell office:value-type="float" office:value="-0.0000207378634513589">
            <text:p>-2.07378634513589E-005</text:p>
          </table:table-cell>
          <table:table-cell office:value-type="float" office:value="7999.99999991301">
            <text:p>7999.999999913</text:p>
          </table:table-cell>
          <table:table-cell office:value-type="float" office:value="-0.00000204337561465169">
            <text:p>-2.04337561465169E-006</text:p>
          </table:table-cell>
          <table:table-cell office:value-type="float" office:value="0.00000000170393704903165">
            <text:p>1.70393704903165E-00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-1000">
            <text:p>-1000</text:p>
          </table:table-cell>
          <table:table-cell office:value-type="float" office:value="6799999.99949903">
            <text:p>6799999.99949903</text:p>
          </table:table-cell>
          <table:table-cell office:value-type="float" office:value="-0.00000178124408201086">
            <text:p>-1.78124408201086E-006</text:p>
          </table:table-cell>
          <table:table-cell office:value-type="float" office:value="-0.000271495759989193">
            <text:p>-0.0002714958</text:p>
          </table:table-cell>
          <table:table-cell office:value-type="float" office:value="7999.99999950391">
            <text:p>7999.9999995039</text:p>
          </table:table-cell>
          <table:table-cell office:value-type="float" office:value="-0.0000649985948289462">
            <text:p>-6.49985948289462E-005</text:p>
          </table:table-cell>
          <table:table-cell office:value-type="float" office:value="-0.0000000788363993045719">
            <text:p>-7.88363993045719E-00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2000">
            <text:p>-2000</text:p>
          </table:table-cell>
          <table:table-cell office:value-type="float" office:value="6799999.99952837">
            <text:p>6799999.99952837</text:p>
          </table:table-cell>
          <table:table-cell office:value-type="float" office:value="-0.00000211242172731829">
            <text:p>-2.11242172731829E-006</text:p>
          </table:table-cell>
          <table:table-cell office:value-type="float" office:value="-0.00421201432618545">
            <text:p>-0.0042120143</text:p>
          </table:table-cell>
          <table:table-cell office:value-type="float" office:value="7999.99999657869">
            <text:p>7999.9999965787</text:p>
          </table:table-cell>
          <table:table-cell office:value-type="float" office:value="-0.000890770717029678">
            <text:p>-0.0008907707</text:p>
          </table:table-cell>
          <table:table-cell office:value-type="float" office:value="-0.000000415952271363546">
            <text:p>-0.00000041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-3000">
            <text:p>-3000</text:p>
          </table:table-cell>
          <table:table-cell office:value-type="float" office:value="6800000.00889329">
            <text:p>6800000.00889329</text:p>
          </table:table-cell>
          <table:table-cell office:value-type="float" office:value="0.0000141167132774456">
            <text:p>1.41167132774456E-005</text:p>
          </table:table-cell>
          <table:table-cell office:value-type="float" office:value="-0.0191797069101085">
            <text:p>-0.0191797069</text:p>
          </table:table-cell>
          <table:table-cell office:value-type="float" office:value="7999.99998594405">
            <text:p>7999.9999859441</text:p>
          </table:table-cell>
          <table:table-cell office:value-type="float" office:value="-0.00268667658990499">
            <text:p>-0.0026866766</text:p>
          </table:table-cell>
          <table:table-cell office:value-type="float" office:value="-0.000000148073483511797">
            <text:p>-1.48073483511797E-00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6000">
            <text:p>-6000</text:p>
          </table:table-cell>
          <table:table-cell office:value-type="float" office:value="6800000.0205362">
            <text:p>6800000.0205362</text:p>
          </table:table-cell>
          <table:table-cell office:value-type="float" office:value="-0.0000512435216801777">
            <text:p>-5.12435216801777E-005</text:p>
          </table:table-cell>
          <table:table-cell office:value-type="float" office:value="0.0660791875197901">
            <text:p>0.0660791875</text:p>
          </table:table-cell>
          <table:table-cell office:value-type="float" office:value="7999.99996918821">
            <text:p>7999.9999691882</text:p>
          </table:table-cell>
          <table:table-cell office:value-type="float" office:value="-0.0105717603791789">
            <text:p>-0.0105717604</text:p>
          </table:table-cell>
          <table:table-cell office:value-type="float" office:value="0.000000896877135998894">
            <text:p>8.96877135998894E-00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6000">
            <text:p>-6000</text:p>
          </table:table-cell>
          <table:table-cell office:value-type="float" office:value="6800000.0205362">
            <text:p>6800000.0205362</text:p>
          </table:table-cell>
          <table:table-cell office:value-type="float" office:value="-0.0000512435216801777">
            <text:p>-5.12435216801777E-005</text:p>
          </table:table-cell>
          <table:table-cell office:value-type="float" office:value="0.0660791875197901">
            <text:p>0.0660791875</text:p>
          </table:table-cell>
          <table:table-cell office:value-type="float" office:value="7999.99996918821">
            <text:p>7999.9999691882</text:p>
          </table:table-cell>
          <table:table-cell office:value-type="float" office:value="-0.0105717603791789">
            <text:p>-0.0105717604</text:p>
          </table:table-cell>
          <table:table-cell office:value-type="float" office:value="0.000000896877135998894">
            <text:p>8.96877135998894E-007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reverse prop time</text:p>
          </table:table-cell>
          <table:table-cell table:style-name="ce1" office:value-type="string">
            <text:p>position magnitude</text:p>
          </table:table-cell>
          <table:table-cell table:style-name="ce1" office:value-type="string">
            <text:p>velocity magnitude</text:p>
          </table:table-cell>
          <table:table-cell table:style-name="ce1" office:value-type="string">
            <text:p>position % diff</text:p>
          </table:table-cell>
          <table:table-cell table:style-name="ce1" office:value-type="string">
            <text:p>velocity % diff</text:p>
          </table:table-cell>
          <table:table-cell table:number-columns-repeated="2"/>
        </table:table-row>
        <table:table-row table:style-name="ro1">
          <table:table-cell/>
          <table:table-cell table:formula="of:=[.A2]" office:value-type="float" office:value="0">
            <text:p>0</text:p>
          </table:table-cell>
          <table:table-cell table:formula="of:=SQRT([.C2]*[.C2]+[.E2]*[.E2]+[.G2]*[.G2])" office:value-type="float" office:value="6800000">
            <text:p>6800000</text:p>
          </table:table-cell>
          <table:table-cell table:formula="of:=SQRT([.D2]*[.D2]+[.F2]*[.F2]+[.H2]*[.H2])" office:value-type="float" office:value="8000">
            <text:p>8000</text:p>
          </table:table-cell>
          <table:table-cell table:formula="of:=ABS(([.C16]-6800000)/6800000)" office:value-type="float" office:value="0">
            <text:p>0</text:p>
          </table:table-cell>
          <table:table-cell table:formula="of:=ABS(([.D16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3]" office:value-type="float" office:value="10">
            <text:p>10</text:p>
          </table:table-cell>
          <table:table-cell table:formula="of:=SQRT([.C3]*[.C3]+[.E3]*[.E3]+[.G3]*[.G3])" office:value-type="float" office:value="6800000">
            <text:p>6800000</text:p>
          </table:table-cell>
          <table:table-cell table:formula="of:=SQRT([.D3]*[.D3]+[.F3]*[.F3]+[.H3]*[.H3])" office:value-type="float" office:value="8000">
            <text:p>8000</text:p>
          </table:table-cell>
          <table:table-cell table:formula="of:=ABS(([.C17]-6800000)/6800000)" office:value-type="float" office:value="0">
            <text:p>0</text:p>
          </table:table-cell>
          <table:table-cell table:formula="of:=ABS(([.D17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4]" office:value-type="float" office:value="50">
            <text:p>50</text:p>
          </table:table-cell>
          <table:table-cell table:formula="of:=SQRT([.C4]*[.C4]+[.E4]*[.E4]+[.G4]*[.G4])" office:value-type="float" office:value="6799999.99999993">
            <text:p>6799999.99999993</text:p>
          </table:table-cell>
          <table:table-cell table:formula="of:=SQRT([.D4]*[.D4]+[.F4]*[.F4]+[.H4]*[.H4])" office:value-type="float" office:value="7999.99999999973">
            <text:p>7999.9999999997</text:p>
          </table:table-cell>
          <table:table-cell table:formula="of:=ABS(([.C18]-6800000)/6800000)" office:value-type="float" office:value="0.0000000000000101349809590508">
            <text:p>1.01349809590508E-014</text:p>
          </table:table-cell>
          <table:table-cell table:formula="of:=ABS(([.D18]-8000)/8000)" office:value-type="float" office:value="0.0000000000000338786776410416">
            <text:p>3.38786776410416E-014</text:p>
          </table:table-cell>
          <table:table-cell table:number-columns-repeated="2"/>
        </table:table-row>
        <table:table-row table:style-name="ro1">
          <table:table-cell/>
          <table:table-cell table:formula="of:=[.A5]" office:value-type="float" office:value="100">
            <text:p>100</text:p>
          </table:table-cell>
          <table:table-cell table:formula="of:=SQRT([.C5]*[.C5]+[.E5]*[.E5]+[.G5]*[.G5])" office:value-type="float" office:value="6799999.99999941">
            <text:p>6799999.99999941</text:p>
          </table:table-cell>
          <table:table-cell table:formula="of:=SQRT([.D5]*[.D5]+[.F5]*[.F5]+[.H5]*[.H5])" office:value-type="float" office:value="7999.99999999862">
            <text:p>7999.9999999986</text:p>
          </table:table-cell>
          <table:table-cell table:formula="of:=ABS(([.C19]-6800000)/6800000)" office:value-type="float" office:value="0.0000000000000861473381519318">
            <text:p>8.61473381519318E-014</text:p>
          </table:table-cell>
          <table:table-cell table:formula="of:=ABS(([.D19]-8000)/8000)" office:value-type="float" office:value="0.0000000000001730313670123">
            <text:p>1.730313670123E-013</text:p>
          </table:table-cell>
          <table:table-cell table:number-columns-repeated="2"/>
        </table:table-row>
        <table:table-row table:style-name="ro1">
          <table:table-cell/>
          <table:table-cell table:formula="of:=[.A6]" office:value-type="float" office:value="200">
            <text:p>200</text:p>
          </table:table-cell>
          <table:table-cell table:formula="of:=SQRT([.C6]*[.C6]+[.E6]*[.E6]+[.G6]*[.G6])" office:value-type="float" office:value="6799999.99999527">
            <text:p>6799999.99999527</text:p>
          </table:table-cell>
          <table:table-cell table:formula="of:=SQRT([.D6]*[.D6]+[.F6]*[.F6]+[.H6]*[.H6])" office:value-type="float" office:value="7999.99999999212">
            <text:p>7999.9999999921</text:p>
          </table:table-cell>
          <table:table-cell table:formula="of:=ABS(([.C20]-6800000)/6800000)" office:value-type="float" office:value="0.000000000000696026665322921">
            <text:p>6.96026665322921E-013</text:p>
          </table:table-cell>
          <table:table-cell table:formula="of:=ABS(([.D20]-8000)/8000)" office:value-type="float" office:value="0.000000000000984755388344638">
            <text:p>9.84755388344638E-013</text:p>
          </table:table-cell>
          <table:table-cell table:number-columns-repeated="2"/>
        </table:table-row>
        <table:table-row table:style-name="ro1">
          <table:table-cell/>
          <table:table-cell table:formula="of:=[.A7]" office:value-type="float" office:value="500">
            <text:p>500</text:p>
          </table:table-cell>
          <table:table-cell table:formula="of:=SQRT([.C7]*[.C7]+[.E7]*[.E7]+[.G7]*[.G7])" office:value-type="float" office:value="6799999.99992757">
            <text:p>6799999.99992757</text:p>
          </table:table-cell>
          <table:table-cell table:formula="of:=SQRT([.D7]*[.D7]+[.F7]*[.F7]+[.H7]*[.H7])" office:value-type="float" office:value="7999.99999991301">
            <text:p>7999.999999913</text:p>
          </table:table-cell>
          <table:table-cell table:formula="of:=ABS(([.C21]-6800000)/6800000)" office:value-type="float" office:value="0.0000000000106521389063667">
            <text:p>1.06521389063667E-011</text:p>
          </table:table-cell>
          <table:table-cell table:formula="of:=ABS(([.D21]-8000)/8000)" office:value-type="float" office:value="0.0000000000108733502202085">
            <text:p>1.08733502202085E-011</text:p>
          </table:table-cell>
          <table:table-cell table:number-columns-repeated="2"/>
        </table:table-row>
        <table:table-row table:style-name="ro1">
          <table:table-cell/>
          <table:table-cell table:formula="of:=[.A8]" office:value-type="float" office:value="1000">
            <text:p>1000</text:p>
          </table:table-cell>
          <table:table-cell table:formula="of:=SQRT([.C8]*[.C8]+[.E8]*[.E8]+[.G8]*[.G8])" office:value-type="float" office:value="6799999.99949903">
            <text:p>6799999.99949903</text:p>
          </table:table-cell>
          <table:table-cell table:formula="of:=SQRT([.D8]*[.D8]+[.F8]*[.F8]+[.H8]*[.H8])" office:value-type="float" office:value="7999.99999950391">
            <text:p>7999.9999995039</text:p>
          </table:table-cell>
          <table:table-cell table:formula="of:=ABS(([.C22]-6800000)/6800000)" office:value-type="float" office:value="0.0000000000736722722649574">
            <text:p>7.36722722649574E-011</text:p>
          </table:table-cell>
          <table:table-cell table:formula="of:=ABS(([.D22]-8000)/8000)" office:value-type="float" office:value="0.0000000000620110540694441">
            <text:p>6.20110540694441E-011</text:p>
          </table:table-cell>
          <table:table-cell table:number-columns-repeated="2"/>
        </table:table-row>
        <table:table-row table:style-name="ro1">
          <table:table-cell/>
          <table:table-cell table:formula="of:=[.A9]" office:value-type="float" office:value="2000">
            <text:p>2000</text:p>
          </table:table-cell>
          <table:table-cell table:formula="of:=SQRT([.C9]*[.C9]+[.E9]*[.E9]+[.G9]*[.G9])" office:value-type="float" office:value="6799999.99952837">
            <text:p>6799999.99952837</text:p>
          </table:table-cell>
          <table:table-cell table:formula="of:=SQRT([.D9]*[.D9]+[.F9]*[.F9]+[.H9]*[.H9])" office:value-type="float" office:value="7999.99999657869">
            <text:p>7999.9999965787</text:p>
          </table:table-cell>
          <table:table-cell table:formula="of:=ABS(([.C23]-6800000)/6800000)" office:value-type="float" office:value="0.0000000000693569617236362">
            <text:p>6.93569617236362E-011</text:p>
          </table:table-cell>
          <table:table-cell table:formula="of:=ABS(([.D23]-8000)/8000)" office:value-type="float" office:value="0.000000000427664303970232">
            <text:p>4.27664303970232E-010</text:p>
          </table:table-cell>
          <table:table-cell table:number-columns-repeated="2"/>
        </table:table-row>
        <table:table-row table:style-name="ro1">
          <table:table-cell/>
          <table:table-cell table:formula="of:=[.A10]" office:value-type="float" office:value="3000">
            <text:p>3000</text:p>
          </table:table-cell>
          <table:table-cell table:formula="of:=SQRT([.C10]*[.C10]+[.E10]*[.E10]+[.G10]*[.G10])" office:value-type="float" office:value="6800000.00889329">
            <text:p>6800000.00889329</text:p>
          </table:table-cell>
          <table:table-cell table:formula="of:=SQRT([.D10]*[.D10]+[.F10]*[.F10]+[.H10]*[.H10])" office:value-type="float" office:value="7999.99998594405">
            <text:p>7999.9999859441</text:p>
          </table:table-cell>
          <table:table-cell table:formula="of:=ABS(([.C24]-6800000)/6800000)" office:value-type="float" office:value="0.000000001307836295489">
            <text:p>1.307836295489E-009</text:p>
          </table:table-cell>
          <table:table-cell table:formula="of:=ABS(([.D24]-8000)/8000)" office:value-type="float" office:value="0.0000000017569936971995">
            <text:p>1.7569936971995E-009</text:p>
          </table:table-cell>
          <table:table-cell table:number-columns-repeated="2"/>
        </table:table-row>
        <table:table-row table:style-name="ro1">
          <table:table-cell/>
          <table:table-cell table:formula="of:=[.A11]" office:value-type="float" office:value="6000">
            <text:p>6000</text:p>
          </table:table-cell>
          <table:table-cell table:formula="of:=SQRT([.C11]*[.C11]+[.E11]*[.E11]+[.G11]*[.G11])" office:value-type="float" office:value="6800000.0205362">
            <text:p>6800000.0205362</text:p>
          </table:table-cell>
          <table:table-cell table:formula="of:=SQRT([.D11]*[.D11]+[.F11]*[.F11]+[.H11]*[.H11])" office:value-type="float" office:value="7999.99996918821">
            <text:p>7999.9999691882</text:p>
          </table:table-cell>
          <table:table-cell table:formula="of:=ABS(([.C25]-6800000)/6800000)" office:value-type="float" office:value="0.00000000302002929589328">
            <text:p>0.000000003</text:p>
          </table:table-cell>
          <table:table-cell table:formula="of:=ABS(([.D25]-8000)/8000)" office:value-type="float" office:value="0.00000000385147382075957">
            <text:p>3.85147382075957E-00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2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4x4 Earth only" table:style-name="ta1">
        <table:shapes>
          <draw:frame draw:z-index="0" draw:style-name="gr1" draw:text-style-name="P1" svg:width="6.2988in" svg:height="3.5429in" svg:x="4.235in" svg:y="4.6055in">
            <draw:object draw:notify-on-update-of-ranges="'4x4 Earth only'.F16:'4x4 Earth only'.F25 '4x4 Earth only'.B16:'4x4 Earth only'.B25 '4x4 Earth only'.E15:'4x4 Earth only'.E15 '4x4 Earth only'.E16:'4x4 Earth only'.E25 '4x4 Earth only'.B16:'4x4 Earth only'.B25 '4x4 Earth only'.F15:'4x4 Earth only'.F15 '4x4 Earth only'.F16:'4x4 Earth only'.F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ys.exec.out.time {s}</text:p>
          </table:table-cell>
          <table:table-cell office:value-type="string">
            <text:p>test.prop_time {--}</text:p>
          </table:table-cell>
          <table:table-cell office:value-type="string">
            <text:p>test.body.composite_body.state.trans.position[0] {m}</text:p>
          </table:table-cell>
          <table:table-cell office:value-type="string">
            <text:p>test.body.composite_body.state.trans.velocity[0] {m/s}</text:p>
          </table:table-cell>
          <table:table-cell office:value-type="string">
            <text:p>test.body.composite_body.state.trans.position[1] {m}</text:p>
          </table:table-cell>
          <table:table-cell office:value-type="string">
            <text:p>test.body.composite_body.state.trans.velocity[1] {m/s}</text:p>
          </table:table-cell>
          <table:table-cell office:value-type="string">
            <text:p>test.body.composite_body.state.trans.position[2] {m}</text:p>
          </table:table-cell>
          <table:table-cell office:value-type="string">
            <text:p>test.body.composite_body.state.trans.velocity[2] {m/s}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800000">
            <text:p>6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6800000.00020291">
            <text:p>6800000.00020291</text:p>
          </table:table-cell>
          <table:table-cell office:value-type="float" office:value="0.0000897820032417229">
            <text:p>0.000089782</text:p>
          </table:table-cell>
          <table:table-cell office:value-type="float" office:value="0.000214154197237804">
            <text:p>0.0002141542</text:p>
          </table:table-cell>
          <table:table-cell office:value-type="float" office:value="8000.00006611732">
            <text:p>8000.0000661173</text:p>
          </table:table-cell>
          <table:table-cell office:value-type="float" office:value="-0.00000216409015027074">
            <text:p>-2.16409015027074E-006</text:p>
          </table:table-cell>
          <table:table-cell office:value-type="float" office:value="-0.000000671522463565352">
            <text:p>-6.71522463565352E-00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6800000.00127399">
            <text:p>6800000.00127399</text:p>
          </table:table-cell>
          <table:table-cell office:value-type="float" office:value="0.000124273223633509">
            <text:p>0.0001242732</text:p>
          </table:table-cell>
          <table:table-cell office:value-type="float" office:value="0.00398299874359509">
            <text:p>0.0039829987</text:p>
          </table:table-cell>
          <table:table-cell office:value-type="float" office:value="8000.00019264584">
            <text:p>8000.0001926459</text:p>
          </table:table-cell>
          <table:table-cell office:value-type="float" office:value="-0.0000367816943934956">
            <text:p>-3.67816943934956E-005</text:p>
          </table:table-cell>
          <table:table-cell office:value-type="float" office:value="-0.00000184100777505164">
            <text:p>-0.00000184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6800000.00528425">
            <text:p>6800000.00528425</text:p>
          </table:table-cell>
          <table:table-cell office:value-type="float" office:value="0.000177012205544003">
            <text:p>0.0001770122</text:p>
          </table:table-cell>
          <table:table-cell office:value-type="float" office:value="0.015551496043372">
            <text:p>0.015551496</text:p>
          </table:table-cell>
          <table:table-cell office:value-type="float" office:value="8000.00034708878">
            <text:p>8000.0003470888</text:p>
          </table:table-cell>
          <table:table-cell office:value-type="float" office:value="-0.000123906741023994">
            <text:p>-0.0001239067</text:p>
          </table:table-cell>
          <table:table-cell office:value-type="float" office:value="-0.00000299194518075898">
            <text:p>-2.99194518075898E-00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200">
            <text:p>-200</text:p>
          </table:table-cell>
          <table:table-cell office:value-type="float" office:value="6800000.02610815">
            <text:p>6800000.02610815</text:p>
          </table:table-cell>
          <table:table-cell office:value-type="float" office:value="0.000315032788792635">
            <text:p>0.0003150328</text:p>
          </table:table-cell>
          <table:table-cell office:value-type="float" office:value="0.0596297359988967">
            <text:p>0.059629736</text:p>
          </table:table-cell>
          <table:table-cell office:value-type="float" office:value="8000.00063947877">
            <text:p>8000.0006394788</text:p>
          </table:table-cell>
          <table:table-cell office:value-type="float" office:value="-0.00028795630571513">
            <text:p>-0.0002879563</text:p>
          </table:table-cell>
          <table:table-cell office:value-type="float" office:value="-0.00000404724939847709">
            <text:p>-4.04724939847709E-00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500">
            <text:p>-500</text:p>
          </table:table-cell>
          <table:table-cell office:value-type="float" office:value="6800000.26063001">
            <text:p>6800000.26063001</text:p>
          </table:table-cell>
          <table:table-cell office:value-type="float" office:value="0.00101645232709124">
            <text:p>0.0010164523</text:p>
          </table:table-cell>
          <table:table-cell office:value-type="float" office:value="0.300859471914009">
            <text:p>0.3008594719</text:p>
          </table:table-cell>
          <table:table-cell office:value-type="float" office:value="8000.00130568052">
            <text:p>8000.0013056805</text:p>
          </table:table-cell>
          <table:table-cell office:value-type="float" office:value="0.00228413056986352">
            <text:p>0.0022841306</text:p>
          </table:table-cell>
          <table:table-cell office:value-type="float" office:value="0.00000287414098749194">
            <text:p>2.87414098749194E-00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-1000">
            <text:p>-1000</text:p>
          </table:table-cell>
          <table:table-cell office:value-type="float" office:value="6800001.51029228">
            <text:p>6800001.51029228</text:p>
          </table:table-cell>
          <table:table-cell office:value-type="float" office:value="0.00330208941582555">
            <text:p>0.0033020894</text:p>
          </table:table-cell>
          <table:table-cell office:value-type="float" office:value="0.42994337656819">
            <text:p>0.4299433766</text:p>
          </table:table-cell>
          <table:table-cell office:value-type="float" office:value="8000.00129658713">
            <text:p>8000.0012965871</text:p>
          </table:table-cell>
          <table:table-cell office:value-type="float" office:value="0.0158273558117162">
            <text:p>0.0158273558</text:p>
          </table:table-cell>
          <table:table-cell office:value-type="float" office:value="0.0000207003253367665">
            <text:p>2.07003253367665E-00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2000">
            <text:p>-2000</text:p>
          </table:table-cell>
          <table:table-cell office:value-type="float" office:value="6800005.85779392">
            <text:p>6800005.85779392</text:p>
          </table:table-cell>
          <table:table-cell office:value-type="float" office:value="0.0108488950201249">
            <text:p>0.010848895</text:p>
          </table:table-cell>
          <table:table-cell office:value-type="float" office:value="-3.22294371629596">
            <text:p>-3.2229437163</text:p>
          </table:table-cell>
          <table:table-cell office:value-type="float" office:value="7999.99826305898">
            <text:p>7999.998263059</text:p>
          </table:table-cell>
          <table:table-cell office:value-type="float" office:value="0.000700805544388211">
            <text:p>0.0007008055</text:p>
          </table:table-cell>
          <table:table-cell office:value-type="float" office:value="0.0000317659560712541">
            <text:p>0.00003176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-3000">
            <text:p>-3000</text:p>
          </table:table-cell>
          <table:table-cell office:value-type="float" office:value="6800010.21120422">
            <text:p>6800010.21120422</text:p>
          </table:table-cell>
          <table:table-cell office:value-type="float" office:value="0.0208488200431063">
            <text:p>0.02084882</text:p>
          </table:table-cell>
          <table:table-cell office:value-type="float" office:value="-11.5377300200544">
            <text:p>-11.5377300201</text:p>
          </table:table-cell>
          <table:table-cell office:value-type="float" office:value="7999.99460208217">
            <text:p>7999.9946020822</text:p>
          </table:table-cell>
          <table:table-cell office:value-type="float" office:value="-0.00351372858733189">
            <text:p>-0.0035137286</text:p>
          </table:table-cell>
          <table:table-cell office:value-type="float" office:value="0.0000330556468535253">
            <text:p>3.30556468535253E-005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6000">
            <text:p>-6000</text:p>
          </table:table-cell>
          <table:table-cell office:value-type="float" office:value="6800021.41101497">
            <text:p>6800021.41101497</text:p>
          </table:table-cell>
          <table:table-cell office:value-type="float" office:value="0.123243411742873">
            <text:p>0.1232434117</text:p>
          </table:table-cell>
          <table:table-cell office:value-type="float" office:value="-113.642538485617">
            <text:p>-113.6425384856</text:p>
          </table:table-cell>
          <table:table-cell office:value-type="float" office:value="7999.98748502574">
            <text:p>7999.9874850257</text:p>
          </table:table-cell>
          <table:table-cell office:value-type="float" office:value="-0.00133972392781494">
            <text:p>-0.0013397239</text:p>
          </table:table-cell>
          <table:table-cell office:value-type="float" office:value="0.00000836802578661192">
            <text:p>0.00000836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6000">
            <text:p>-6000</text:p>
          </table:table-cell>
          <table:table-cell office:value-type="float" office:value="6800021.41101497">
            <text:p>6800021.41101497</text:p>
          </table:table-cell>
          <table:table-cell office:value-type="float" office:value="0.123243411742873">
            <text:p>0.1232434117</text:p>
          </table:table-cell>
          <table:table-cell office:value-type="float" office:value="-113.642538485617">
            <text:p>-113.6425384856</text:p>
          </table:table-cell>
          <table:table-cell office:value-type="float" office:value="7999.98748502574">
            <text:p>7999.9874850257</text:p>
          </table:table-cell>
          <table:table-cell office:value-type="float" office:value="-0.00133972392781494">
            <text:p>-0.0013397239</text:p>
          </table:table-cell>
          <table:table-cell office:value-type="float" office:value="0.00000836802578661192">
            <text:p>0.000008368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reverse prop time</text:p>
          </table:table-cell>
          <table:table-cell table:style-name="ce1" office:value-type="string">
            <text:p>position magnitude</text:p>
          </table:table-cell>
          <table:table-cell table:style-name="ce1" office:value-type="string">
            <text:p>velocity magnitude</text:p>
          </table:table-cell>
          <table:table-cell table:style-name="ce1" office:value-type="string">
            <text:p>position % diff</text:p>
          </table:table-cell>
          <table:table-cell table:style-name="ce1" office:value-type="string">
            <text:p>velocity % diff</text:p>
          </table:table-cell>
          <table:table-cell table:number-columns-repeated="2"/>
        </table:table-row>
        <table:table-row table:style-name="ro1">
          <table:table-cell/>
          <table:table-cell table:formula="of:=[.A2]" office:value-type="float" office:value="0">
            <text:p>0</text:p>
          </table:table-cell>
          <table:table-cell table:formula="of:=SQRT([.C2]*[.C2]+[.E2]*[.E2]+[.G2]*[.G2])" office:value-type="float" office:value="6800000">
            <text:p>6800000</text:p>
          </table:table-cell>
          <table:table-cell table:formula="of:=SQRT([.D2]*[.D2]+[.F2]*[.F2]+[.H2]*[.H2])" office:value-type="float" office:value="8000">
            <text:p>8000</text:p>
          </table:table-cell>
          <table:table-cell table:formula="of:=ABS(([.C16]-6800000)/6800000)" office:value-type="float" office:value="0">
            <text:p>0</text:p>
          </table:table-cell>
          <table:table-cell table:formula="of:=ABS(([.D16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3]" office:value-type="float" office:value="10">
            <text:p>10</text:p>
          </table:table-cell>
          <table:table-cell table:formula="of:=SQRT([.C3]*[.C3]+[.E3]*[.E3]+[.G3]*[.G3])" office:value-type="float" office:value="6800000.00020291">
            <text:p>6800000.00020291</text:p>
          </table:table-cell>
          <table:table-cell table:formula="of:=SQRT([.D3]*[.D3]+[.F3]*[.F3]+[.H3]*[.H3])" office:value-type="float" office:value="8000.00006611732">
            <text:p>8000.0000661173</text:p>
          </table:table-cell>
          <table:table-cell table:formula="of:=ABS(([.C17]-6800000)/6800000)" office:value-type="float" office:value="0.0000000000298395752906799">
            <text:p>2.98395752906799E-011</text:p>
          </table:table-cell>
          <table:table-cell table:formula="of:=ABS(([.D17]-8000)/8000)" office:value-type="float" office:value="0.00000000826466521175462">
            <text:p>8.26466521175462E-009</text:p>
          </table:table-cell>
          <table:table-cell table:number-columns-repeated="2"/>
        </table:table-row>
        <table:table-row table:style-name="ro1">
          <table:table-cell/>
          <table:table-cell table:formula="of:=[.A4]" office:value-type="float" office:value="50">
            <text:p>50</text:p>
          </table:table-cell>
          <table:table-cell table:formula="of:=SQRT([.C4]*[.C4]+[.E4]*[.E4]+[.G4]*[.G4])" office:value-type="float" office:value="6800000.00127399">
            <text:p>6800000.00127399</text:p>
          </table:table-cell>
          <table:table-cell table:formula="of:=SQRT([.D4]*[.D4]+[.F4]*[.F4]+[.H4]*[.H4])" office:value-type="float" office:value="8000.00019264585">
            <text:p>8000.0001926459</text:p>
          </table:table-cell>
          <table:table-cell table:formula="of:=ABS(([.C18]-6800000)/6800000)" office:value-type="float" office:value="0.000000000187351697069757">
            <text:p>1.87351697069757E-010</text:p>
          </table:table-cell>
          <table:table-cell table:formula="of:=ABS(([.D18]-8000)/8000)" office:value-type="float" office:value="0.0000000240807306681745">
            <text:p>2.40807306681745E-008</text:p>
          </table:table-cell>
          <table:table-cell table:number-columns-repeated="2"/>
        </table:table-row>
        <table:table-row table:style-name="ro1">
          <table:table-cell/>
          <table:table-cell table:formula="of:=[.A5]" office:value-type="float" office:value="100">
            <text:p>100</text:p>
          </table:table-cell>
          <table:table-cell table:formula="of:=SQRT([.C5]*[.C5]+[.E5]*[.E5]+[.G5]*[.G5])" office:value-type="float" office:value="6800000.00528425">
            <text:p>6800000.00528425</text:p>
          </table:table-cell>
          <table:table-cell table:formula="of:=SQRT([.D5]*[.D5]+[.F5]*[.F5]+[.H5]*[.H5])" office:value-type="float" office:value="8000.00034708878">
            <text:p>8000.0003470888</text:p>
          </table:table-cell>
          <table:table-cell table:formula="of:=ABS(([.C19]-6800000)/6800000)" office:value-type="float" office:value="0.00000000077709583017756">
            <text:p>7.7709583017756E-010</text:p>
          </table:table-cell>
          <table:table-cell table:formula="of:=ABS(([.D19]-8000)/8000)" office:value-type="float" office:value="0.0000000433860974453637">
            <text:p>4.33860974453637E-008</text:p>
          </table:table-cell>
          <table:table-cell table:number-columns-repeated="2"/>
        </table:table-row>
        <table:table-row table:style-name="ro1">
          <table:table-cell/>
          <table:table-cell table:formula="of:=[.A6]" office:value-type="float" office:value="200">
            <text:p>200</text:p>
          </table:table-cell>
          <table:table-cell table:formula="of:=SQRT([.C6]*[.C6]+[.E6]*[.E6]+[.G6]*[.G6])" office:value-type="float" office:value="6800000.02610815">
            <text:p>6800000.02610815</text:p>
          </table:table-cell>
          <table:table-cell table:formula="of:=SQRT([.D6]*[.D6]+[.F6]*[.F6]+[.H6]*[.H6])" office:value-type="float" office:value="8000.00063947877">
            <text:p>8000.0006394788</text:p>
          </table:table-cell>
          <table:table-cell table:formula="of:=ABS(([.C20]-6800000)/6800000)" office:value-type="float" office:value="0.00000000383943442583961">
            <text:p>3.83943442583961E-009</text:p>
          </table:table-cell>
          <table:table-cell table:formula="of:=ABS(([.D20]-8000)/8000)" office:value-type="float" office:value="0.0000000799348462123817">
            <text:p>7.99348462123817E-008</text:p>
          </table:table-cell>
          <table:table-cell table:number-columns-repeated="2"/>
        </table:table-row>
        <table:table-row table:style-name="ro1">
          <table:table-cell/>
          <table:table-cell table:formula="of:=[.A7]" office:value-type="float" office:value="500">
            <text:p>500</text:p>
          </table:table-cell>
          <table:table-cell table:formula="of:=SQRT([.C7]*[.C7]+[.E7]*[.E7]+[.G7]*[.G7])" office:value-type="float" office:value="6800000.26063002">
            <text:p>6800000.26063002</text:p>
          </table:table-cell>
          <table:table-cell table:formula="of:=SQRT([.D7]*[.D7]+[.F7]*[.F7]+[.H7]*[.H7])" office:value-type="float" office:value="8000.00130568058">
            <text:p>8000.0013056806</text:p>
          </table:table-cell>
          <table:table-cell table:formula="of:=ABS(([.C21]-6800000)/6800000)" office:value-type="float" office:value="0.0000000383279434240916">
            <text:p>3.83279434240916E-008</text:p>
          </table:table-cell>
          <table:table-cell table:formula="of:=ABS(([.D21]-8000)/8000)" office:value-type="float" office:value="0.000000163210072855691">
            <text:p>1.63210072855691E-007</text:p>
          </table:table-cell>
          <table:table-cell table:number-columns-repeated="2"/>
        </table:table-row>
        <table:table-row table:style-name="ro1">
          <table:table-cell/>
          <table:table-cell table:formula="of:=[.A8]" office:value-type="float" office:value="1000">
            <text:p>1000</text:p>
          </table:table-cell>
          <table:table-cell table:formula="of:=SQRT([.C8]*[.C8]+[.E8]*[.E8]+[.G8]*[.G8])" office:value-type="float" office:value="6800001.5102923">
            <text:p>6800001.5102923</text:p>
          </table:table-cell>
          <table:table-cell table:formula="of:=SQRT([.D8]*[.D8]+[.F8]*[.F8]+[.H8]*[.H8])" office:value-type="float" office:value="8000.00129658781">
            <text:p>8000.0012965878</text:p>
          </table:table-cell>
          <table:table-cell table:formula="of:=ABS(([.C22]-6800000)/6800000)" office:value-type="float" office:value="0.000000222101808279095">
            <text:p>2.22101808279095E-007</text:p>
          </table:table-cell>
          <table:table-cell table:formula="of:=ABS(([.D22]-8000)/8000)" office:value-type="float" office:value="0.000000162073475848956">
            <text:p>1.62073475848956E-007</text:p>
          </table:table-cell>
          <table:table-cell table:number-columns-repeated="2"/>
        </table:table-row>
        <table:table-row table:style-name="ro1">
          <table:table-cell/>
          <table:table-cell table:formula="of:=[.A9]" office:value-type="float" office:value="2000">
            <text:p>2000</text:p>
          </table:table-cell>
          <table:table-cell table:formula="of:=SQRT([.C9]*[.C9]+[.E9]*[.E9]+[.G9]*[.G9])" office:value-type="float" office:value="6800005.85779469">
            <text:p>6800005.85779469</text:p>
          </table:table-cell>
          <table:table-cell table:formula="of:=SQRT([.D9]*[.D9]+[.F9]*[.F9]+[.H9]*[.H9])" office:value-type="float" office:value="7999.99826306634">
            <text:p>7999.9982630663</text:p>
          </table:table-cell>
          <table:table-cell table:formula="of:=ABS(([.C23]-6800000)/6800000)" office:value-type="float" office:value="0.00000086144039489548">
            <text:p>8.6144039489548E-007</text:p>
          </table:table-cell>
          <table:table-cell table:formula="of:=ABS(([.D23]-8000)/8000)" office:value-type="float" office:value="0.000000217116707517562">
            <text:p>2.17116707517562E-007</text:p>
          </table:table-cell>
          <table:table-cell table:number-columns-repeated="2"/>
        </table:table-row>
        <table:table-row table:style-name="ro1">
          <table:table-cell/>
          <table:table-cell table:formula="of:=[.A10]" office:value-type="float" office:value="3000">
            <text:p>3000</text:p>
          </table:table-cell>
          <table:table-cell table:formula="of:=SQRT([.C10]*[.C10]+[.E10]*[.E10]+[.G10]*[.G10])" office:value-type="float" office:value="6800010.21121401">
            <text:p>6800010.21121401</text:p>
          </table:table-cell>
          <table:table-cell table:formula="of:=SQRT([.D10]*[.D10]+[.F10]*[.F10]+[.H10]*[.H10])" office:value-type="float" office:value="7999.99460210933">
            <text:p>7999.9946021093</text:p>
          </table:table-cell>
          <table:table-cell table:formula="of:=ABS(([.C24]-6800000)/6800000)" office:value-type="float" office:value="0.00000150164911879555">
            <text:p>1.50164911879555E-006</text:p>
          </table:table-cell>
          <table:table-cell table:formula="of:=ABS(([.D24]-8000)/8000)" office:value-type="float" office:value="0.000000674736333394321">
            <text:p>6.74736333394321E-007</text:p>
          </table:table-cell>
          <table:table-cell table:number-columns-repeated="2"/>
        </table:table-row>
        <table:table-row table:style-name="ro1">
          <table:table-cell/>
          <table:table-cell table:formula="of:=[.A11]" office:value-type="float" office:value="6000">
            <text:p>6000</text:p>
          </table:table-cell>
          <table:table-cell table:formula="of:=SQRT([.C11]*[.C11]+[.E11]*[.E11]+[.G11]*[.G11])" office:value-type="float" office:value="6800021.41196457">
            <text:p>6800021.41196457</text:p>
          </table:table-cell>
          <table:table-cell table:formula="of:=SQRT([.D11]*[.D11]+[.F11]*[.F11]+[.H11]*[.H11])" office:value-type="float" office:value="7999.98748597505">
            <text:p>7999.9874859751</text:p>
          </table:table-cell>
          <table:table-cell table:formula="of:=ABS(([.C25]-6800000)/6800000)" office:value-type="float" office:value="0.0000031488183196908">
            <text:p>3.1488183196908E-006</text:p>
          </table:table-cell>
          <table:table-cell table:formula="of:=ABS(([.D25]-8000)/8000)" office:value-type="float" office:value="0.0000015642531186586">
            <text:p>1.5642531186586E-006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2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4x4 Earth Moon Sun" table:style-name="ta1">
        <table:shapes>
          <draw:frame draw:z-index="0" draw:style-name="gr1" draw:text-style-name="P1" svg:width="6.2988in" svg:height="3.5429in" svg:x="4.2028in" svg:y="4.5846in">
            <draw:object draw:notify-on-update-of-ranges="'4x4 Earth Moon Sun'.F16:'4x4 Earth Moon Sun'.F25 '4x4 Earth Moon Sun'.B16:'4x4 Earth Moon Sun'.B25 '4x4 Earth Moon Sun'.E15:'4x4 Earth Moon Sun'.E15 '4x4 Earth Moon Sun'.E16:'4x4 Earth Moon Sun'.E25 '4x4 Earth Moon Sun'.B16:'4x4 Earth Moon Sun'.B25 '4x4 Earth Moon Sun'.F15:'4x4 Earth Moon Sun'.F15 '4x4 Earth Moon Sun'.F16:'4x4 Earth Moon Sun'.F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ys.exec.out.time {s}</text:p>
          </table:table-cell>
          <table:table-cell office:value-type="string">
            <text:p>test.prop_time {--}</text:p>
          </table:table-cell>
          <table:table-cell office:value-type="string">
            <text:p>test.body.composite_body.state.trans.position[0] {m}</text:p>
          </table:table-cell>
          <table:table-cell office:value-type="string">
            <text:p>test.body.composite_body.state.trans.velocity[0] {m/s}</text:p>
          </table:table-cell>
          <table:table-cell office:value-type="string">
            <text:p>test.body.composite_body.state.trans.position[1] {m}</text:p>
          </table:table-cell>
          <table:table-cell office:value-type="string">
            <text:p>test.body.composite_body.state.trans.velocity[1] {m/s}</text:p>
          </table:table-cell>
          <table:table-cell office:value-type="string">
            <text:p>test.body.composite_body.state.trans.position[2] {m}</text:p>
          </table:table-cell>
          <table:table-cell office:value-type="string">
            <text:p>test.body.composite_body.state.trans.velocity[2] {m/s}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800000">
            <text:p>6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6800000.00020291">
            <text:p>6800000.00020291</text:p>
          </table:table-cell>
          <table:table-cell office:value-type="float" office:value="0.000089781841655423">
            <text:p>8.9781841655423E-005</text:p>
          </table:table-cell>
          <table:table-cell office:value-type="float" office:value="0.000214154180866899">
            <text:p>0.0002141542</text:p>
          </table:table-cell>
          <table:table-cell office:value-type="float" office:value="8000.00006611731">
            <text:p>8000.0000661173</text:p>
          </table:table-cell>
          <table:table-cell office:value-type="float" office:value="-0.00000216405777019054">
            <text:p>-2.16405777019054E-006</text:p>
          </table:table-cell>
          <table:table-cell office:value-type="float" office:value="-0.000000671512138119735">
            <text:p>-6.71512138119735E-00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6800000.00127392">
            <text:p>6800000.00127392</text:p>
          </table:table-cell>
          <table:table-cell office:value-type="float" office:value="0.000124268826919405">
            <text:p>0.0001242688</text:p>
          </table:table-cell>
          <table:table-cell office:value-type="float" office:value="0.00398299353946641">
            <text:p>0.0039829935</text:p>
          </table:table-cell>
          <table:table-cell office:value-type="float" office:value="8000.00019264558">
            <text:p>8000.0001926456</text:p>
          </table:table-cell>
          <table:table-cell office:value-type="float" office:value="-0.0000367776323129917">
            <text:p>-3.67776323129917E-005</text:p>
          </table:table-cell>
          <table:table-cell office:value-type="float" office:value="-0.00000184074828182379">
            <text:p>-1.84074828182379E-00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6800000.00528366">
            <text:p>6800000.00528366</text:p>
          </table:table-cell>
          <table:table-cell office:value-type="float" office:value="0.000176994432012023">
            <text:p>0.0001769944</text:p>
          </table:table-cell>
          <table:table-cell office:value-type="float" office:value="0.0155514400476022">
            <text:p>0.01555144</text:p>
          </table:table-cell>
          <table:table-cell office:value-type="float" office:value="8000.00034708739">
            <text:p>8000.0003470874</text:p>
          </table:table-cell>
          <table:table-cell office:value-type="float" office:value="-0.000123879186874342">
            <text:p>-0.0001238792</text:p>
          </table:table-cell>
          <table:table-cell office:value-type="float" office:value="-0.00000299100684420681">
            <text:p>-0.00000299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200">
            <text:p>-200</text:p>
          </table:table-cell>
          <table:table-cell office:value-type="float" office:value="6800000.02610344">
            <text:p>6800000.02610344</text:p>
          </table:table-cell>
          <table:table-cell office:value-type="float" office:value="0.000314961188760066">
            <text:p>0.0003149612</text:p>
          </table:table-cell>
          <table:table-cell office:value-type="float" office:value="0.0596290540324844">
            <text:p>0.059629054</text:p>
          </table:table-cell>
          <table:table-cell office:value-type="float" office:value="8000.0006394709">
            <text:p>8000.0006394709</text:p>
          </table:table-cell>
          <table:table-cell office:value-type="float" office:value="-0.000287822687172033">
            <text:p>-0.0002878227</text:p>
          </table:table-cell>
          <table:table-cell office:value-type="float" office:value="-0.00000404436968389968">
            <text:p>-4.04436968389968E-00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500">
            <text:p>-500</text:p>
          </table:table-cell>
          <table:table-cell office:value-type="float" office:value="6800000.26055753">
            <text:p>6800000.26055753</text:p>
          </table:table-cell>
          <table:table-cell office:value-type="float" office:value="0.00101599772889216">
            <text:p>0.0010159977</text:p>
          </table:table-cell>
          <table:table-cell office:value-type="float" office:value="0.300838752827985">
            <text:p>0.3008387528</text:p>
          </table:table-cell>
          <table:table-cell office:value-type="float" office:value="8000.00130559358">
            <text:p>8000.0013055936</text:p>
          </table:table-cell>
          <table:table-cell office:value-type="float" office:value="0.0022820859846906">
            <text:p>0.002282086</text:p>
          </table:table-cell>
          <table:table-cell office:value-type="float" office:value="0.00000287584311225942">
            <text:p>2.87584311225942E-00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-1000">
            <text:p>-1000</text:p>
          </table:table-cell>
          <table:table-cell office:value-type="float" office:value="6800001.50979138">
            <text:p>6800001.50979138</text:p>
          </table:table-cell>
          <table:table-cell office:value-type="float" office:value="0.00330030781153745">
            <text:p>0.0033003078</text:p>
          </table:table-cell>
          <table:table-cell office:value-type="float" office:value="0.429672170274898">
            <text:p>0.4296721703</text:p>
          </table:table-cell>
          <table:table-cell office:value-type="float" office:value="8000.00129609158">
            <text:p>8000.0012960916</text:p>
          </table:table-cell>
          <table:table-cell office:value-type="float" office:value="0.0157624154683262">
            <text:p>0.0157624155</text:p>
          </table:table-cell>
          <table:table-cell office:value-type="float" office:value="0.0000206216313829138">
            <text:p>2.06216313829138E-00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2000">
            <text:p>-2000</text:p>
          </table:table-cell>
          <table:table-cell office:value-type="float" office:value="6800005.8573318">
            <text:p>6800005.8573318</text:p>
          </table:table-cell>
          <table:table-cell office:value-type="float" office:value="0.0108468006921374">
            <text:p>0.0108468007</text:p>
          </table:table-cell>
          <table:table-cell office:value-type="float" office:value="-3.22715854094258">
            <text:p>-3.2271585409</text:p>
          </table:table-cell>
          <table:table-cell office:value-type="float" office:value="7999.99825963426">
            <text:p>7999.9982596343</text:p>
          </table:table-cell>
          <table:table-cell office:value-type="float" office:value="-0.000187761581350676">
            <text:p>-0.0001877616</text:p>
          </table:table-cell>
          <table:table-cell office:value-type="float" office:value="0.0000313527214766991">
            <text:p>3.13527214766991E-00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-3000">
            <text:p>-3000</text:p>
          </table:table-cell>
          <table:table-cell office:value-type="float" office:value="6800010.22009667">
            <text:p>6800010.22009667</text:p>
          </table:table-cell>
          <table:table-cell office:value-type="float" office:value="0.0208629419208268">
            <text:p>0.0208629419</text:p>
          </table:table-cell>
          <table:table-cell office:value-type="float" office:value="-11.5568590798439">
            <text:p>-11.5568590798</text:p>
          </table:table-cell>
          <table:table-cell office:value-type="float" office:value="7999.99458802906">
            <text:p>7999.9945880291</text:p>
          </table:table-cell>
          <table:table-cell office:value-type="float" office:value="-0.00618702803803237">
            <text:p>-0.006187028</text:p>
          </table:table-cell>
          <table:table-cell office:value-type="float" office:value="0.0000329141528556936">
            <text:p>3.29141528556936E-005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6000">
            <text:p>-6000</text:p>
          </table:table-cell>
          <table:table-cell office:value-type="float" office:value="6800021.43114216">
            <text:p>6800021.43114216</text:p>
          </table:table-cell>
          <table:table-cell office:value-type="float" office:value="0.123192803136497">
            <text:p>0.1231928031</text:p>
          </table:table-cell>
          <table:table-cell office:value-type="float" office:value="-113.577346212236">
            <text:p>-113.5773462122</text:p>
          </table:table-cell>
          <table:table-cell office:value-type="float" office:value="7999.98745461071">
            <text:p>7999.9874546107</text:p>
          </table:table-cell>
          <table:table-cell office:value-type="float" office:value="-0.011870816886287">
            <text:p>-0.0118708169</text:p>
          </table:table-cell>
          <table:table-cell office:value-type="float" office:value="0.00000927662709274157">
            <text:p>9.27662709274157E-00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6000">
            <text:p>-6000</text:p>
          </table:table-cell>
          <table:table-cell office:value-type="float" office:value="6800021.43114216">
            <text:p>6800021.43114216</text:p>
          </table:table-cell>
          <table:table-cell office:value-type="float" office:value="0.123192803136497">
            <text:p>0.1231928031</text:p>
          </table:table-cell>
          <table:table-cell office:value-type="float" office:value="-113.577346212236">
            <text:p>-113.5773462122</text:p>
          </table:table-cell>
          <table:table-cell office:value-type="float" office:value="7999.98745461071">
            <text:p>7999.9874546107</text:p>
          </table:table-cell>
          <table:table-cell office:value-type="float" office:value="-0.011870816886287">
            <text:p>-0.0118708169</text:p>
          </table:table-cell>
          <table:table-cell office:value-type="float" office:value="0.00000927662709274157">
            <text:p>9.27662709274157E-00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reverse prop time</text:p>
          </table:table-cell>
          <table:table-cell table:style-name="ce1" office:value-type="string">
            <text:p>position magnitude</text:p>
          </table:table-cell>
          <table:table-cell table:style-name="ce1" office:value-type="string">
            <text:p>velocity magnitude</text:p>
          </table:table-cell>
          <table:table-cell table:style-name="ce1" office:value-type="string">
            <text:p>position % diff</text:p>
          </table:table-cell>
          <table:table-cell table:style-name="ce1" office:value-type="string">
            <text:p>velocity % diff</text:p>
          </table:table-cell>
          <table:table-cell table:number-columns-repeated="2"/>
        </table:table-row>
        <table:table-row table:style-name="ro1">
          <table:table-cell/>
          <table:table-cell table:formula="of:=[.A2]" office:value-type="float" office:value="0">
            <text:p>0</text:p>
          </table:table-cell>
          <table:table-cell table:formula="of:=SQRT([.C2]*[.C2]+[.E2]*[.E2]+[.G2]*[.G2])" office:value-type="float" office:value="6800000">
            <text:p>6800000</text:p>
          </table:table-cell>
          <table:table-cell table:formula="of:=SQRT([.D2]*[.D2]+[.F2]*[.F2]+[.H2]*[.H2])" office:value-type="float" office:value="8000">
            <text:p>8000</text:p>
          </table:table-cell>
          <table:table-cell table:formula="of:=ABS(([.C16]-6800000)/6800000)" office:value-type="float" office:value="0">
            <text:p>0</text:p>
          </table:table-cell>
          <table:table-cell table:formula="of:=ABS(([.D16]-8000)/8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3]" office:value-type="float" office:value="10">
            <text:p>10</text:p>
          </table:table-cell>
          <table:table-cell table:formula="of:=SQRT([.C3]*[.C3]+[.E3]*[.E3]+[.G3]*[.G3])" office:value-type="float" office:value="6800000.00020291">
            <text:p>6800000.00020291</text:p>
          </table:table-cell>
          <table:table-cell table:formula="of:=SQRT([.D3]*[.D3]+[.F3]*[.F3]+[.H3]*[.H3])" office:value-type="float" office:value="8000.00006611731">
            <text:p>8000.0000661173</text:p>
          </table:table-cell>
          <table:table-cell table:formula="of:=ABS(([.C17]-6800000)/6800000)" office:value-type="float" office:value="0.0000000000298395752906799">
            <text:p>2.98395752906799E-011</text:p>
          </table:table-cell>
          <table:table-cell table:formula="of:=ABS(([.D17]-8000)/8000)" office:value-type="float" office:value="0.0000000082646639611994">
            <text:p>8.2646639611994E-009</text:p>
          </table:table-cell>
          <table:table-cell table:number-columns-repeated="2"/>
        </table:table-row>
        <table:table-row table:style-name="ro1">
          <table:table-cell/>
          <table:table-cell table:formula="of:=[.A4]" office:value-type="float" office:value="50">
            <text:p>50</text:p>
          </table:table-cell>
          <table:table-cell table:formula="of:=SQRT([.C4]*[.C4]+[.E4]*[.E4]+[.G4]*[.G4])" office:value-type="float" office:value="6800000.00127392">
            <text:p>6800000.00127392</text:p>
          </table:table-cell>
          <table:table-cell table:formula="of:=SQRT([.D4]*[.D4]+[.F4]*[.F4]+[.H4]*[.H4])" office:value-type="float" office:value="8000.00019264558">
            <text:p>8000.0001926456</text:p>
          </table:table-cell>
          <table:table-cell table:formula="of:=ABS(([.C18]-6800000)/6800000)" office:value-type="float" office:value="0.000000000187341288170394">
            <text:p>1.87341288170394E-010</text:p>
          </table:table-cell>
          <table:table-cell table:formula="of:=ABS(([.D18]-8000)/8000)" office:value-type="float" office:value="0.0000000240806971305574">
            <text:p>2.40806971305574E-008</text:p>
          </table:table-cell>
          <table:table-cell table:number-columns-repeated="2"/>
        </table:table-row>
        <table:table-row table:style-name="ro1">
          <table:table-cell/>
          <table:table-cell table:formula="of:=[.A5]" office:value-type="float" office:value="100">
            <text:p>100</text:p>
          </table:table-cell>
          <table:table-cell table:formula="of:=SQRT([.C5]*[.C5]+[.E5]*[.E5]+[.G5]*[.G5])" office:value-type="float" office:value="6800000.00528366">
            <text:p>6800000.00528366</text:p>
          </table:table-cell>
          <table:table-cell table:formula="of:=SQRT([.D5]*[.D5]+[.F5]*[.F5]+[.H5]*[.H5])" office:value-type="float" office:value="8000.00034708739">
            <text:p>8000.0003470874</text:p>
          </table:table-cell>
          <table:table-cell table:formula="of:=ABS(([.C19]-6800000)/6800000)" office:value-type="float" office:value="0.000000000777008861084195">
            <text:p>7.77008861084195E-010</text:p>
          </table:table-cell>
          <table:table-cell table:formula="of:=ABS(([.D19]-8000)/8000)" office:value-type="float" office:value="0.0000000433859238455625">
            <text:p>4.33859238455625E-008</text:p>
          </table:table-cell>
          <table:table-cell table:number-columns-repeated="2"/>
        </table:table-row>
        <table:table-row table:style-name="ro1">
          <table:table-cell/>
          <table:table-cell table:formula="of:=[.A6]" office:value-type="float" office:value="200">
            <text:p>200</text:p>
          </table:table-cell>
          <table:table-cell table:formula="of:=SQRT([.C6]*[.C6]+[.E6]*[.E6]+[.G6]*[.G6])" office:value-type="float" office:value="6800000.02610344">
            <text:p>6800000.02610344</text:p>
          </table:table-cell>
          <table:table-cell table:formula="of:=SQRT([.D6]*[.D6]+[.F6]*[.F6]+[.H6]*[.H6])" office:value-type="float" office:value="8000.00063947091">
            <text:p>8000.0006394709</text:p>
          </table:table-cell>
          <table:table-cell table:formula="of:=ABS(([.C20]-6800000)/6800000)" office:value-type="float" office:value="0.00000000383874113835833">
            <text:p>3.83874113835833E-009</text:p>
          </table:table-cell>
          <table:table-cell table:formula="of:=ABS(([.D20]-8000)/8000)" office:value-type="float" office:value="0.0000000799338631622959">
            <text:p>7.99338631622959E-008</text:p>
          </table:table-cell>
          <table:table-cell table:number-columns-repeated="2"/>
        </table:table-row>
        <table:table-row table:style-name="ro1">
          <table:table-cell/>
          <table:table-cell table:formula="of:=[.A7]" office:value-type="float" office:value="500">
            <text:p>500</text:p>
          </table:table-cell>
          <table:table-cell table:formula="of:=SQRT([.C7]*[.C7]+[.E7]*[.E7]+[.G7]*[.G7])" office:value-type="float" office:value="6800000.26055754">
            <text:p>6800000.26055754</text:p>
          </table:table-cell>
          <table:table-cell table:formula="of:=SQRT([.D7]*[.D7]+[.F7]*[.F7]+[.H7]*[.H7])" office:value-type="float" office:value="8000.00130559365">
            <text:p>8000.0013055937</text:p>
          </table:table-cell>
          <table:table-cell table:formula="of:=ABS(([.C21]-6800000)/6800000)" office:value-type="float" office:value="0.0000000383172849850619">
            <text:p>3.83172849850619E-008</text:p>
          </table:table-cell>
          <table:table-cell table:formula="of:=ABS(([.D21]-8000)/8000)" office:value-type="float" office:value="0.000000163199206099307">
            <text:p>1.63199206099307E-007</text:p>
          </table:table-cell>
          <table:table-cell table:number-columns-repeated="2"/>
        </table:table-row>
        <table:table-row table:style-name="ro1">
          <table:table-cell/>
          <table:table-cell table:formula="of:=[.A8]" office:value-type="float" office:value="1000">
            <text:p>1000</text:p>
          </table:table-cell>
          <table:table-cell table:formula="of:=SQRT([.C8]*[.C8]+[.E8]*[.E8]+[.G8]*[.G8])" office:value-type="float" office:value="6800001.50979139">
            <text:p>6800001.50979139</text:p>
          </table:table-cell>
          <table:table-cell table:formula="of:=SQRT([.D8]*[.D8]+[.F8]*[.F8]+[.H8]*[.H8])" office:value-type="float" office:value="8000.00129609226">
            <text:p>8000.0012960923</text:p>
          </table:table-cell>
          <table:table-cell table:formula="of:=ABS(([.C22]-6800000)/6800000)" office:value-type="float" office:value="0.000000222028145730934">
            <text:p>0.000000222</text:p>
          </table:table-cell>
          <table:table-cell table:formula="of:=ABS(([.D22]-8000)/8000)" office:value-type="float" office:value="0.000000162011533006989">
            <text:p>0.000000162</text:p>
          </table:table-cell>
          <table:table-cell table:number-columns-repeated="2"/>
        </table:table-row>
        <table:table-row table:style-name="ro1">
          <table:table-cell/>
          <table:table-cell table:formula="of:=[.A9]" office:value-type="float" office:value="2000">
            <text:p>2000</text:p>
          </table:table-cell>
          <table:table-cell table:formula="of:=SQRT([.C9]*[.C9]+[.E9]*[.E9]+[.G9]*[.G9])" office:value-type="float" office:value="6800005.85733257">
            <text:p>6800005.85733257</text:p>
          </table:table-cell>
          <table:table-cell table:formula="of:=SQRT([.D9]*[.D9]+[.F9]*[.F9]+[.H9]*[.H9])" office:value-type="float" office:value="7999.99825964161">
            <text:p>7999.9982596416</text:p>
          </table:table-cell>
          <table:table-cell table:formula="of:=ABS(([.C23]-6800000)/6800000)" office:value-type="float" office:value="0.000000861372436698088">
            <text:p>8.61372436698088E-007</text:p>
          </table:table-cell>
          <table:table-cell table:formula="of:=ABS(([.D23]-8000)/8000)" office:value-type="float" office:value="0.000000217544798488234">
            <text:p>2.17544798488234E-007</text:p>
          </table:table-cell>
          <table:table-cell table:number-columns-repeated="2"/>
        </table:table-row>
        <table:table-row table:style-name="ro1">
          <table:table-cell/>
          <table:table-cell table:formula="of:=[.A10]" office:value-type="float" office:value="3000">
            <text:p>3000</text:p>
          </table:table-cell>
          <table:table-cell table:formula="of:=SQRT([.C10]*[.C10]+[.E10]*[.E10]+[.G10]*[.G10])" office:value-type="float" office:value="6800010.22010649">
            <text:p>6800010.22010649</text:p>
          </table:table-cell>
          <table:table-cell table:formula="of:=SQRT([.D10]*[.D10]+[.F10]*[.F10]+[.H10]*[.H10])" office:value-type="float" office:value="7999.99458805627">
            <text:p>7999.9945880563</text:p>
          </table:table-cell>
          <table:table-cell table:formula="of:=ABS(([.C24]-6800000)/6800000)" office:value-type="float" office:value="0.00000150295683621045">
            <text:p>0.000001503</text:p>
          </table:table-cell>
          <table:table-cell table:formula="of:=ABS(([.D24]-8000)/8000)" office:value-type="float" office:value="0.000000676492966590558">
            <text:p>6.76492966590558E-007</text:p>
          </table:table-cell>
          <table:table-cell table:number-columns-repeated="2"/>
        </table:table-row>
        <table:table-row table:style-name="ro1">
          <table:table-cell/>
          <table:table-cell table:formula="of:=[.A11]" office:value-type="float" office:value="6000">
            <text:p>6000</text:p>
          </table:table-cell>
          <table:table-cell table:formula="of:=SQRT([.C11]*[.C11]+[.E11]*[.E11]+[.G11]*[.G11])" office:value-type="float" office:value="6800021.43209067">
            <text:p>6800021.43209067</text:p>
          </table:table-cell>
          <table:table-cell table:formula="of:=SQRT([.D11]*[.D11]+[.F11]*[.F11]+[.H11]*[.H11])" office:value-type="float" office:value="7999.98745555924">
            <text:p>7999.9874555592</text:p>
          </table:table-cell>
          <table:table-cell table:formula="of:=ABS(([.C25]-6800000)/6800000)" office:value-type="float" office:value="0.00000315177803954986">
            <text:p>3.15177803954986E-006</text:p>
          </table:table-cell>
          <table:table-cell table:formula="of:=ABS(([.D25]-8000)/8000)" office:value-type="float" office:value="0.00000156805509493552">
            <text:p>1.56805509493552E-006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2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0000-00-00T16:27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16:30:47</dc:date>
    <meta:generator>LibreOffice/4.0.4.2$Linux_X86_64 LibreOffice_project/400m0$Build-2</meta:generator>
    <meta:editing-duration>PT25M</meta:editing-duration>
    <meta:editing-cycles>13</meta:editing-cycles>
    <meta:document-statistic meta:table-count="5" meta:cell-count="7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1.778cm" svg:y="0.316cm" chart:style-name="ch2">
          <text:p>Difference between IC and Final State of Reverse Propagation</text:p>
        </chart:title>
        <chart:subtitle svg:x="5.324cm" svg:y="1.275cm" chart:style-name="ch3">
          <text:p>SET_reverse_8x8_Earth_only</text:p>
        </chart:subtitle>
        <chart:legend svg:x="11.724cm" svg:y="1.028cm" style:legend-expansion="custom" chartooo:width="3.33cm" chartooo:height="1.096cm" style:legend-expansion-aspect-ratio="3.03832116788321" chart:style-name="ch4"/>
        <chart:plot-area chart:style-name="ch5" table:cell-range-address="'8x8 Earth Only'.E15:'8x8 Earth Only'.F25 '8x8 Earth Only'.B16:'8x8 Earth Only'.B25" chart:data-source-has-labels="both" svg:x="1.251cm" svg:y="2.318cm" svg:width="13.999cm" svg:height="5.52cm">
          <chartooo:coordinate-region svg:x="3.169cm" svg:y="2.517cm" svg:width="11.709cm" svg:height="4.674cm"/>
          <chart:axis chart:dimension="x" chart:name="primary-x" chart:style-name="ch6" chartooo:axis-type="auto">
            <chart:title svg:x="6.261cm" svg:y="8.018cm" chart:style-name="ch7">
              <text:p>Reverse Propagation Time</text:p>
            </chart:title>
            <chart:categories table:cell-range-address="'8x8 Earth Only'.F16:'8x8 Earth Only'.F25"/>
          </chart:axis>
          <chart:axis chart:dimension="y" chart:name="primary-y" chart:style-name="ch8">
            <chart:title svg:x="0.371cm" svg:y="7.49cm" chart:style-name="ch9">
              <text:p>% difference in vector magnitud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8x8 Earth Only'.E16:'8x8 Earth Only'.E25" chart:label-cell-address="'8x8 Earth Only'.E15:'8x8 Earth Only'.E15" chart:class="chart:scatter">
            <chart:domain table:cell-range-address="'8x8 Earth Only'.B16:'8x8 Earth Only'.B25"/>
            <chart:data-point chart:repeated="10"/>
          </chart:series>
          <chart:series chart:attached-axis="primary-y" chart:style-name="ch13" chart:values-cell-range-address="'8x8 Earth Only'.F16:'8x8 Earth Only'.F25" chart:label-cell-address="'8x8 Earth Only'.F15:'8x8 Earth Only'.F15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sition % diff</text:p>
                <draw:g>
                  <svg:desc>'8x8 Earth Only'.E15:'8x8 Earth Only'.E15</svg:desc>
                </draw:g>
              </table:table-cell>
              <table:table-cell office:value-type="string">
                <text:p>velocity % diff</text:p>
                <draw:g>
                  <svg:desc>'8x8 Earth Only'.F15:'8x8 Earth Only'.F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8x8 Earth Only'.F16:'8x8 Earth Only'.F25</svg:desc>
                </draw:g>
              </table:table-cell>
              <table:table-cell office:value-type="float" office:value="0">
                <text:p>0</text:p>
                <draw:g>
                  <svg:desc>'8x8 Earth Only'.B16:'8x8 Earth Only'.B25</svg:desc>
                </draw:g>
              </table:table-cell>
              <table:table-cell office:value-type="float" office:value="0">
                <text:p>0</text:p>
                <draw:g>
                  <svg:desc>'8x8 Earth Only'.E16:'8x8 Earth Only'.E25</svg:desc>
                </draw:g>
              </table:table-cell>
              <table:table-cell office:value-type="float" office:value="0">
                <text:p>0</text:p>
                <draw:g>
                  <svg:desc>'8x8 Earth Only'.F16:'8x8 Earth Only'.F25</svg:desc>
                </draw:g>
              </table:table-cell>
            </table:table-row>
            <table:table-row>
              <table:table-cell office:value-type="float" office:value="0.00000000775071907810343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00000000297441147267818">
                <text:p>0.0000000000297441147267818</text:p>
              </table:table-cell>
              <table:table-cell office:value-type="float" office:value="0.00000000775071907810343">
                <text:p>0.00000000775071907810343</text:p>
              </table:table-cell>
            </table:table-row>
            <table:table-row>
              <table:table-cell office:value-type="float" office:value="0.0000000226686910309581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.000000000175838084781871">
                <text:p>0.000000000175838084781871</text:p>
              </table:table-cell>
              <table:table-cell office:value-type="float" office:value="0.0000000226686910309581">
                <text:p>0.0000000226686910309581</text:p>
              </table:table-cell>
            </table:table-row>
            <table:table-row>
              <table:table-cell office:value-type="float" office:value="0.0000000411803218867135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00000000693600022179239">
                <text:p>0.000000000693600022179239</text:p>
              </table:table-cell>
              <table:table-cell office:value-type="float" office:value="0.0000000411803218867135">
                <text:p>0.0000000411803218867135</text:p>
              </table:table-cell>
            </table:table-row>
            <table:table-row>
              <table:table-cell office:value-type="float" office:value="0.0000000776154221284742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.00000000336747794576427">
                <text:p>0.00000000336747794576427</text:p>
              </table:table-cell>
              <table:table-cell office:value-type="float" office:value="0.0000000776154221284742">
                <text:p>0.0000000776154221284742</text:p>
              </table:table-cell>
            </table:table-row>
            <table:table-row>
              <table:table-cell office:value-type="float" office:value="0.000000164662008273808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.0000000379420893595499">
                <text:p>0.0000000379420893595499</text:p>
              </table:table-cell>
              <table:table-cell office:value-type="float" office:value="0.000000164662008273808">
                <text:p>0.000000164662008273808</text:p>
              </table:table-cell>
            </table:table-row>
            <table:table-row>
              <table:table-cell office:value-type="float" office:value="0.00000016372946959109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.000000220057671506177">
                <text:p>0.000000220057671506177</text:p>
              </table:table-cell>
              <table:table-cell office:value-type="float" office:value="0.00000016372946959109">
                <text:p>0.00000016372946959109</text:p>
              </table:table-cell>
            </table:table-row>
            <table:table-row>
              <table:table-cell office:value-type="float" office:value="0.000000215269687942055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0.000000861067156827844">
                <text:p>0.000000861067156827844</text:p>
              </table:table-cell>
              <table:table-cell office:value-type="float" office:value="0.000000215269687942055">
                <text:p>0.000000215269687942055</text:p>
              </table:table-cell>
            </table:table-row>
            <table:table-row>
              <table:table-cell office:value-type="float" office:value="0.000000675810512348107">
                <text:p>0</text:p>
              </table:table-cell>
              <table:table-cell office:value-type="float" office:value="3000">
                <text:p>3000</text:p>
              </table:table-cell>
              <table:table-cell office:value-type="float" office:value="0.00000150410978890517">
                <text:p>0.00000150410978890517</text:p>
              </table:table-cell>
              <table:table-cell office:value-type="float" office:value="0.000000675810512348107">
                <text:p>0.000000675810512348107</text:p>
              </table:table-cell>
            </table:table-row>
            <table:table-row>
              <table:table-cell office:value-type="float" office:value="0.00000156434299810826">
                <text:p>0</text:p>
              </table:table-cell>
              <table:table-cell office:value-type="float" office:value="6000">
                <text:p>6000</text:p>
              </table:table-cell>
              <table:table-cell office:value-type="float" office:value="0.00000315094998750069">
                <text:p>0.00000315094998750069</text:p>
              </table:table-cell>
              <table:table-cell office:value-type="float" office:value="0.00000156434299810826">
                <text:p>0.00000156434299810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maximum="0.0000000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1.778cm" svg:y="0.316cm" chart:style-name="ch2">
          <text:p>Difference between IC and Final State of Reverse Propagation</text:p>
        </chart:title>
        <chart:subtitle svg:x="4.834cm" svg:y="1.275cm" chart:style-name="ch3">
          <text:p>SET_reverse_Spherical_Earth_only</text:p>
        </chart:subtitle>
        <chart:legend svg:x="11.724cm" svg:y="1.028cm" style:legend-expansion="custom" chartooo:width="3.33cm" chartooo:height="1.096cm" style:legend-expansion-aspect-ratio="3.03832116788321" chart:style-name="ch4"/>
        <chart:plot-area chart:style-name="ch5" table:cell-range-address="'Spherical Earth Only'.E15:'Spherical Earth Only'.F25 'Spherical Earth Only'.B16:'Spherical Earth Only'.B25" chart:data-source-has-labels="both" svg:x="1.251cm" svg:y="2.318cm" svg:width="13.999cm" svg:height="5.52cm">
          <chartooo:coordinate-region svg:x="3.169cm" svg:y="2.517cm" svg:width="11.709cm" svg:height="4.674cm"/>
          <chart:axis chart:dimension="x" chart:name="primary-x" chart:style-name="ch6" chartooo:axis-type="auto">
            <chart:title svg:x="6.261cm" svg:y="8.018cm" chart:style-name="ch7">
              <text:p>Reverse Propagation Time</text:p>
            </chart:title>
            <chart:categories table:cell-range-address="'Spherical Earth Only'.F16:'Spherical Earth Only'.F25"/>
          </chart:axis>
          <chart:axis chart:dimension="y" chart:name="primary-y" chart:style-name="ch8">
            <chart:title svg:x="0.371cm" svg:y="7.49cm" chart:style-name="ch9">
              <text:p>% difference in vector magnitud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Spherical Earth Only'.E16:'Spherical Earth Only'.E25" chart:label-cell-address="'Spherical Earth Only'.E15:'Spherical Earth Only'.E15" chart:class="chart:scatter">
            <chart:domain table:cell-range-address="'Spherical Earth Only'.B16:'Spherical Earth Only'.B25"/>
            <chart:data-point chart:repeated="10"/>
          </chart:series>
          <chart:series chart:attached-axis="primary-y" chart:style-name="ch13" chart:values-cell-range-address="'Spherical Earth Only'.F16:'Spherical Earth Only'.F25" chart:label-cell-address="'Spherical Earth Only'.F15:'Spherical Earth Only'.F15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sition % diff</text:p>
                <draw:g>
                  <svg:desc>'Spherical Earth Only'.E15:'Spherical Earth Only'.E15</svg:desc>
                </draw:g>
              </table:table-cell>
              <table:table-cell office:value-type="string">
                <text:p>velocity % diff</text:p>
                <draw:g>
                  <svg:desc>'Spherical Earth Only'.F15:'Spherical Earth Only'.F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pherical Earth Only'.F16:'Spherical Earth Only'.F25</svg:desc>
                </draw:g>
              </table:table-cell>
              <table:table-cell office:value-type="float" office:value="0">
                <text:p>0</text:p>
                <draw:g>
                  <svg:desc>'Spherical Earth Only'.B16:'Spherical Earth Only'.B25</svg:desc>
                </draw:g>
              </table:table-cell>
              <table:table-cell office:value-type="float" office:value="0">
                <text:p>0</text:p>
                <draw:g>
                  <svg:desc>'Spherical Earth Only'.E16:'Spherical Earth Only'.E25</svg:desc>
                </draw:g>
              </table:table-cell>
              <table:table-cell office:value-type="float" office:value="0">
                <text:p>0</text:p>
                <draw:g>
                  <svg:desc>'Spherical Earth Only'.F16:'Spherical Earth Only'.F25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1.778cm" svg:y="0.316cm" chart:style-name="ch2">
          <text:p>Difference between IC and Final State of Reverse Propagation</text:p>
        </chart:title>
        <chart:subtitle svg:x="4.252cm" svg:y="1.275cm" chart:style-name="ch3">
          <text:p>SET_reverse_Spherical_Earth_Moon_Sun</text:p>
        </chart:subtitle>
        <chart:legend svg:x="11.724cm" svg:y="1.028cm" style:legend-expansion="custom" chartooo:width="3.33cm" chartooo:height="1.096cm" style:legend-expansion-aspect-ratio="3.03832116788321" chart:style-name="ch4"/>
        <chart:plot-area chart:style-name="ch5" table:cell-range-address="'Spherical Earth Moon Sun'.E15:'Spherical Earth Moon Sun'.F25 'Spherical Earth Moon Sun'.B16:'Spherical Earth Moon Sun'.B25" chart:data-source-has-labels="both" svg:x="1.251cm" svg:y="2.318cm" svg:width="13.999cm" svg:height="5.52cm">
          <chartooo:coordinate-region svg:x="3.169cm" svg:y="2.517cm" svg:width="11.709cm" svg:height="4.674cm"/>
          <chart:axis chart:dimension="x" chart:name="primary-x" chart:style-name="ch6" chartooo:axis-type="auto">
            <chart:title svg:x="6.261cm" svg:y="8.018cm" chart:style-name="ch7">
              <text:p>Reverse Propagation Time</text:p>
            </chart:title>
            <chart:categories table:cell-range-address="'Spherical Earth Moon Sun'.F16:'Spherical Earth Moon Sun'.F25"/>
          </chart:axis>
          <chart:axis chart:dimension="y" chart:name="primary-y" chart:style-name="ch8">
            <chart:title svg:x="0.371cm" svg:y="7.49cm" chart:style-name="ch9">
              <text:p>% difference in vector magnitud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Spherical Earth Moon Sun'.E16:'Spherical Earth Moon Sun'.E25" chart:label-cell-address="'Spherical Earth Moon Sun'.E15:'Spherical Earth Moon Sun'.E15" chart:class="chart:scatter">
            <chart:domain table:cell-range-address="'Spherical Earth Moon Sun'.B16:'Spherical Earth Moon Sun'.B25"/>
            <chart:data-point chart:repeated="10"/>
          </chart:series>
          <chart:series chart:attached-axis="primary-y" chart:style-name="ch13" chart:values-cell-range-address="'Spherical Earth Moon Sun'.F16:'Spherical Earth Moon Sun'.F25" chart:label-cell-address="'Spherical Earth Moon Sun'.F15:'Spherical Earth Moon Sun'.F15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sition % diff</text:p>
                <draw:g>
                  <svg:desc>'Spherical Earth Moon Sun'.E15:'Spherical Earth Moon Sun'.E15</svg:desc>
                </draw:g>
              </table:table-cell>
              <table:table-cell office:value-type="string">
                <text:p>velocity % diff</text:p>
                <draw:g>
                  <svg:desc>'Spherical Earth Moon Sun'.F15:'Spherical Earth Moon Sun'.F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pherical Earth Moon Sun'.F16:'Spherical Earth Moon Sun'.F25</svg:desc>
                </draw:g>
              </table:table-cell>
              <table:table-cell office:value-type="float" office:value="0">
                <text:p>0</text:p>
                <draw:g>
                  <svg:desc>'Spherical Earth Moon Sun'.B16:'Spherical Earth Moon Sun'.B25</svg:desc>
                </draw:g>
              </table:table-cell>
              <table:table-cell office:value-type="float" office:value="0">
                <text:p>0</text:p>
                <draw:g>
                  <svg:desc>'Spherical Earth Moon Sun'.E16:'Spherical Earth Moon Sun'.E25</svg:desc>
                </draw:g>
              </table:table-cell>
              <table:table-cell office:value-type="float" office:value="0">
                <text:p>0</text:p>
                <draw:g>
                  <svg:desc>'Spherical Earth Moon Sun'.F16:'Spherical Earth Moon Sun'.F25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00000000000338786776410416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.0000000000000101349809590508">
                <text:p>0.0000000000000101349809590508</text:p>
              </table:table-cell>
              <table:table-cell office:value-type="float" office:value="0.0000000000000338786776410416">
                <text:p>0.0000000000000338786776410416</text:p>
              </table:table-cell>
            </table:table-row>
            <table:table-row>
              <table:table-cell office:value-type="float" office:value="0.0000000000001730313670123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000000000000861473381519318">
                <text:p>0.0000000000000861473381519318</text:p>
              </table:table-cell>
              <table:table-cell office:value-type="float" office:value="0.0000000000001730313670123">
                <text:p>0.0000000000001730313670123</text:p>
              </table:table-cell>
            </table:table-row>
            <table:table-row>
              <table:table-cell office:value-type="float" office:value="0.000000000000984755388344638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.000000000000696026665322921">
                <text:p>0.000000000000696026665322921</text:p>
              </table:table-cell>
              <table:table-cell office:value-type="float" office:value="0.000000000000984755388344638">
                <text:p>0.000000000000984755388344638</text:p>
              </table:table-cell>
            </table:table-row>
            <table:table-row>
              <table:table-cell office:value-type="float" office:value="0.0000000000108733502202085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.0000000000106521389063667">
                <text:p>0.0000000000106521389063667</text:p>
              </table:table-cell>
              <table:table-cell office:value-type="float" office:value="0.0000000000108733502202085">
                <text:p>0.0000000000108733502202085</text:p>
              </table:table-cell>
            </table:table-row>
            <table:table-row>
              <table:table-cell office:value-type="float" office:value="0.0000000000620110540694441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.0000000000736722722649574">
                <text:p>0.0000000000736722722649574</text:p>
              </table:table-cell>
              <table:table-cell office:value-type="float" office:value="0.0000000000620110540694441">
                <text:p>0.0000000000620110540694441</text:p>
              </table:table-cell>
            </table:table-row>
            <table:table-row>
              <table:table-cell office:value-type="float" office:value="0.000000000427664303970232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0.0000000000693569617236362">
                <text:p>0.0000000000693569617236362</text:p>
              </table:table-cell>
              <table:table-cell office:value-type="float" office:value="0.000000000427664303970232">
                <text:p>0.000000000427664303970232</text:p>
              </table:table-cell>
            </table:table-row>
            <table:table-row>
              <table:table-cell office:value-type="float" office:value="0.0000000017569936971995">
                <text:p>0</text:p>
              </table:table-cell>
              <table:table-cell office:value-type="float" office:value="3000">
                <text:p>3000</text:p>
              </table:table-cell>
              <table:table-cell office:value-type="float" office:value="0.000000001307836295489">
                <text:p>0.000000001307836295489</text:p>
              </table:table-cell>
              <table:table-cell office:value-type="float" office:value="0.0000000017569936971995">
                <text:p>0.0000000017569936971995</text:p>
              </table:table-cell>
            </table:table-row>
            <table:table-row>
              <table:table-cell office:value-type="float" office:value="0.00000000385147382075957">
                <text:p>0</text:p>
              </table:table-cell>
              <table:table-cell office:value-type="float" office:value="6000">
                <text:p>6000</text:p>
              </table:table-cell>
              <table:table-cell office:value-type="float" office:value="0.00000000302002929589328">
                <text:p>0.00000000302002929589328</text:p>
              </table:table-cell>
              <table:table-cell office:value-type="float" office:value="0.00000000385147382075957">
                <text:p>0.000000003851473820759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1.778cm" svg:y="0.316cm" chart:style-name="ch2">
          <text:p>Difference between IC and Final State of Reverse Propagation</text:p>
        </chart:title>
        <chart:subtitle svg:x="5.324cm" svg:y="1.275cm" chart:style-name="ch3">
          <text:p>SET_reverse_4x4_Earth_only</text:p>
        </chart:subtitle>
        <chart:legend svg:x="11.724cm" svg:y="1.028cm" style:legend-expansion="custom" chartooo:width="3.33cm" chartooo:height="1.096cm" style:legend-expansion-aspect-ratio="3.03832116788321" chart:style-name="ch4"/>
        <chart:plot-area chart:style-name="ch5" table:cell-range-address="'4x4 Earth only'.E15:'4x4 Earth only'.F25 '4x4 Earth only'.B16:'4x4 Earth only'.B25" chart:data-source-has-labels="both" svg:x="1.251cm" svg:y="2.318cm" svg:width="13.999cm" svg:height="5.52cm">
          <chartooo:coordinate-region svg:x="3.169cm" svg:y="2.517cm" svg:width="11.709cm" svg:height="4.674cm"/>
          <chart:axis chart:dimension="x" chart:name="primary-x" chart:style-name="ch6" chartooo:axis-type="auto">
            <chart:title svg:x="6.261cm" svg:y="8.018cm" chart:style-name="ch7">
              <text:p>Reverse Propagation Time</text:p>
            </chart:title>
            <chart:categories table:cell-range-address="'4x4 Earth only'.F16:'4x4 Earth only'.F25"/>
          </chart:axis>
          <chart:axis chart:dimension="y" chart:name="primary-y" chart:style-name="ch8">
            <chart:title svg:x="0.371cm" svg:y="7.49cm" chart:style-name="ch9">
              <text:p>% difference in vector magnitud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4x4 Earth only'.E16:'4x4 Earth only'.E25" chart:label-cell-address="'4x4 Earth only'.E15:'4x4 Earth only'.E15" chart:class="chart:scatter">
            <chart:domain table:cell-range-address="'4x4 Earth only'.B16:'4x4 Earth only'.B25"/>
            <chart:data-point chart:repeated="10"/>
          </chart:series>
          <chart:series chart:attached-axis="primary-y" chart:style-name="ch13" chart:values-cell-range-address="'4x4 Earth only'.F16:'4x4 Earth only'.F25" chart:label-cell-address="'4x4 Earth only'.F15:'4x4 Earth only'.F15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sition % diff</text:p>
                <draw:g>
                  <svg:desc>'4x4 Earth only'.E15:'4x4 Earth only'.E15</svg:desc>
                </draw:g>
              </table:table-cell>
              <table:table-cell office:value-type="string">
                <text:p>velocity % diff</text:p>
                <draw:g>
                  <svg:desc>'4x4 Earth only'.F15:'4x4 Earth only'.F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4x4 Earth only'.F16:'4x4 Earth only'.F25</svg:desc>
                </draw:g>
              </table:table-cell>
              <table:table-cell office:value-type="float" office:value="0">
                <text:p>0</text:p>
                <draw:g>
                  <svg:desc>'4x4 Earth only'.B16:'4x4 Earth only'.B25</svg:desc>
                </draw:g>
              </table:table-cell>
              <table:table-cell office:value-type="float" office:value="0">
                <text:p>0</text:p>
                <draw:g>
                  <svg:desc>'4x4 Earth only'.E16:'4x4 Earth only'.E25</svg:desc>
                </draw:g>
              </table:table-cell>
              <table:table-cell office:value-type="float" office:value="0">
                <text:p>0</text:p>
                <draw:g>
                  <svg:desc>'4x4 Earth only'.F16:'4x4 Earth only'.F25</svg:desc>
                </draw:g>
              </table:table-cell>
            </table:table-row>
            <table:table-row>
              <table:table-cell office:value-type="float" office:value="0.00000000826466521175462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00000000298395752906799">
                <text:p>0.0000000000298395752906799</text:p>
              </table:table-cell>
              <table:table-cell office:value-type="float" office:value="0.00000000826466521175462">
                <text:p>0.00000000826466521175462</text:p>
              </table:table-cell>
            </table:table-row>
            <table:table-row>
              <table:table-cell office:value-type="float" office:value="0.0000000240807306681745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.000000000187351697069757">
                <text:p>0.000000000187351697069757</text:p>
              </table:table-cell>
              <table:table-cell office:value-type="float" office:value="0.0000000240807306681745">
                <text:p>0.0000000240807306681745</text:p>
              </table:table-cell>
            </table:table-row>
            <table:table-row>
              <table:table-cell office:value-type="float" office:value="0.0000000433860974453637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0000000077709583017756">
                <text:p>0.00000000077709583017756</text:p>
              </table:table-cell>
              <table:table-cell office:value-type="float" office:value="0.0000000433860974453637">
                <text:p>0.0000000433860974453637</text:p>
              </table:table-cell>
            </table:table-row>
            <table:table-row>
              <table:table-cell office:value-type="float" office:value="0.000000079934846212381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.00000000383943442583961">
                <text:p>0.00000000383943442583961</text:p>
              </table:table-cell>
              <table:table-cell office:value-type="float" office:value="0.0000000799348462123817">
                <text:p>0.0000000799348462123817</text:p>
              </table:table-cell>
            </table:table-row>
            <table:table-row>
              <table:table-cell office:value-type="float" office:value="0.000000163210072855691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.0000000383279434240916">
                <text:p>0.0000000383279434240916</text:p>
              </table:table-cell>
              <table:table-cell office:value-type="float" office:value="0.000000163210072855691">
                <text:p>0.000000163210072855691</text:p>
              </table:table-cell>
            </table:table-row>
            <table:table-row>
              <table:table-cell office:value-type="float" office:value="0.000000162073475848956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.000000222101808279095">
                <text:p>0.000000222101808279095</text:p>
              </table:table-cell>
              <table:table-cell office:value-type="float" office:value="0.000000162073475848956">
                <text:p>0.000000162073475848956</text:p>
              </table:table-cell>
            </table:table-row>
            <table:table-row>
              <table:table-cell office:value-type="float" office:value="0.000000217116707517562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0.00000086144039489548">
                <text:p>0.00000086144039489548</text:p>
              </table:table-cell>
              <table:table-cell office:value-type="float" office:value="0.000000217116707517562">
                <text:p>0.000000217116707517562</text:p>
              </table:table-cell>
            </table:table-row>
            <table:table-row>
              <table:table-cell office:value-type="float" office:value="0.000000674736333394321">
                <text:p>0</text:p>
              </table:table-cell>
              <table:table-cell office:value-type="float" office:value="3000">
                <text:p>3000</text:p>
              </table:table-cell>
              <table:table-cell office:value-type="float" office:value="0.00000150164911879555">
                <text:p>0.00000150164911879555</text:p>
              </table:table-cell>
              <table:table-cell office:value-type="float" office:value="0.000000674736333394321">
                <text:p>0.000000674736333394321</text:p>
              </table:table-cell>
            </table:table-row>
            <table:table-row>
              <table:table-cell office:value-type="float" office:value="0.0000015642531186586">
                <text:p>0</text:p>
              </table:table-cell>
              <table:table-cell office:value-type="float" office:value="6000">
                <text:p>6000</text:p>
              </table:table-cell>
              <table:table-cell office:value-type="float" office:value="0.0000031488183196908">
                <text:p>0.0000031488183196908</text:p>
              </table:table-cell>
              <table:table-cell office:value-type="float" office:value="0.0000015642531186586">
                <text:p>0.00000156425311865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1.778cm" svg:y="0.316cm" chart:style-name="ch2">
          <text:p>Difference between IC and Final State of Reverse Propagation</text:p>
        </chart:title>
        <chart:subtitle svg:x="4.742cm" svg:y="1.275cm" chart:style-name="ch3">
          <text:p>SET_reverse_4x4_Earth_Moon_Sun</text:p>
        </chart:subtitle>
        <chart:legend svg:x="11.724cm" svg:y="1.028cm" style:legend-expansion="custom" chartooo:width="3.33cm" chartooo:height="1.096cm" style:legend-expansion-aspect-ratio="3.03832116788321" chart:style-name="ch4"/>
        <chart:plot-area chart:style-name="ch5" table:cell-range-address="'4x4 Earth Moon Sun'.E15:'4x4 Earth Moon Sun'.F25 '4x4 Earth Moon Sun'.B16:'4x4 Earth Moon Sun'.B25" chart:data-source-has-labels="both" svg:x="1.251cm" svg:y="2.318cm" svg:width="13.999cm" svg:height="5.52cm">
          <chartooo:coordinate-region svg:x="3.169cm" svg:y="2.517cm" svg:width="11.709cm" svg:height="4.674cm"/>
          <chart:axis chart:dimension="x" chart:name="primary-x" chart:style-name="ch6" chartooo:axis-type="auto">
            <chart:title svg:x="6.261cm" svg:y="8.018cm" chart:style-name="ch7">
              <text:p>Reverse Propagation Time</text:p>
            </chart:title>
            <chart:categories table:cell-range-address="'4x4 Earth Moon Sun'.F16:'4x4 Earth Moon Sun'.F25"/>
          </chart:axis>
          <chart:axis chart:dimension="y" chart:name="primary-y" chart:style-name="ch8">
            <chart:title svg:x="0.371cm" svg:y="7.49cm" chart:style-name="ch9">
              <text:p>% difference in vector magnitud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4x4 Earth Moon Sun'.E16:'4x4 Earth Moon Sun'.E25" chart:label-cell-address="'4x4 Earth Moon Sun'.E15:'4x4 Earth Moon Sun'.E15" chart:class="chart:scatter">
            <chart:domain table:cell-range-address="'4x4 Earth Moon Sun'.B16:'4x4 Earth Moon Sun'.B25"/>
            <chart:data-point chart:repeated="10"/>
          </chart:series>
          <chart:series chart:attached-axis="primary-y" chart:style-name="ch13" chart:values-cell-range-address="'4x4 Earth Moon Sun'.F16:'4x4 Earth Moon Sun'.F25" chart:label-cell-address="'4x4 Earth Moon Sun'.F15:'4x4 Earth Moon Sun'.F15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sition % diff</text:p>
                <draw:g>
                  <svg:desc>'4x4 Earth Moon Sun'.E15:'4x4 Earth Moon Sun'.E15</svg:desc>
                </draw:g>
              </table:table-cell>
              <table:table-cell office:value-type="string">
                <text:p>velocity % diff</text:p>
                <draw:g>
                  <svg:desc>'4x4 Earth Moon Sun'.F15:'4x4 Earth Moon Sun'.F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4x4 Earth Moon Sun'.F16:'4x4 Earth Moon Sun'.F25</svg:desc>
                </draw:g>
              </table:table-cell>
              <table:table-cell office:value-type="float" office:value="0">
                <text:p>0</text:p>
                <draw:g>
                  <svg:desc>'4x4 Earth Moon Sun'.B16:'4x4 Earth Moon Sun'.B25</svg:desc>
                </draw:g>
              </table:table-cell>
              <table:table-cell office:value-type="float" office:value="0">
                <text:p>0</text:p>
                <draw:g>
                  <svg:desc>'4x4 Earth Moon Sun'.E16:'4x4 Earth Moon Sun'.E25</svg:desc>
                </draw:g>
              </table:table-cell>
              <table:table-cell office:value-type="float" office:value="0">
                <text:p>0</text:p>
                <draw:g>
                  <svg:desc>'4x4 Earth Moon Sun'.F16:'4x4 Earth Moon Sun'.F25</svg:desc>
                </draw:g>
              </table:table-cell>
            </table:table-row>
            <table:table-row>
              <table:table-cell office:value-type="float" office:value="0.0000000082646639611994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00000000298395752906799">
                <text:p>0.0000000000298395752906799</text:p>
              </table:table-cell>
              <table:table-cell office:value-type="float" office:value="0.0000000082646639611994">
                <text:p>0.0000000082646639611994</text:p>
              </table:table-cell>
            </table:table-row>
            <table:table-row>
              <table:table-cell office:value-type="float" office:value="0.0000000240806971305574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.000000000187341288170394">
                <text:p>0.000000000187341288170394</text:p>
              </table:table-cell>
              <table:table-cell office:value-type="float" office:value="0.0000000240806971305574">
                <text:p>0.0000000240806971305574</text:p>
              </table:table-cell>
            </table:table-row>
            <table:table-row>
              <table:table-cell office:value-type="float" office:value="0.0000000433859238455625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00000000777008861084195">
                <text:p>0.000000000777008861084195</text:p>
              </table:table-cell>
              <table:table-cell office:value-type="float" office:value="0.0000000433859238455625">
                <text:p>0.0000000433859238455625</text:p>
              </table:table-cell>
            </table:table-row>
            <table:table-row>
              <table:table-cell office:value-type="float" office:value="0.0000000799338631622959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.00000000383874113835833">
                <text:p>0.00000000383874113835833</text:p>
              </table:table-cell>
              <table:table-cell office:value-type="float" office:value="0.0000000799338631622959">
                <text:p>0.0000000799338631622959</text:p>
              </table:table-cell>
            </table:table-row>
            <table:table-row>
              <table:table-cell office:value-type="float" office:value="0.000000163199206099307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.0000000383172849850619">
                <text:p>0.0000000383172849850619</text:p>
              </table:table-cell>
              <table:table-cell office:value-type="float" office:value="0.000000163199206099307">
                <text:p>0.000000163199206099307</text:p>
              </table:table-cell>
            </table:table-row>
            <table:table-row>
              <table:table-cell office:value-type="float" office:value="0.000000162011533006989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.000000222028145730934">
                <text:p>0.000000222028145730934</text:p>
              </table:table-cell>
              <table:table-cell office:value-type="float" office:value="0.000000162011533006989">
                <text:p>0.000000162011533006989</text:p>
              </table:table-cell>
            </table:table-row>
            <table:table-row>
              <table:table-cell office:value-type="float" office:value="0.000000217544798488234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0.000000861372436698088">
                <text:p>0.000000861372436698088</text:p>
              </table:table-cell>
              <table:table-cell office:value-type="float" office:value="0.000000217544798488234">
                <text:p>0.000000217544798488234</text:p>
              </table:table-cell>
            </table:table-row>
            <table:table-row>
              <table:table-cell office:value-type="float" office:value="0.000000676492966590558">
                <text:p>0</text:p>
              </table:table-cell>
              <table:table-cell office:value-type="float" office:value="3000">
                <text:p>3000</text:p>
              </table:table-cell>
              <table:table-cell office:value-type="float" office:value="0.00000150295683621045">
                <text:p>0.00000150295683621045</text:p>
              </table:table-cell>
              <table:table-cell office:value-type="float" office:value="0.000000676492966590558">
                <text:p>0.000000676492966590558</text:p>
              </table:table-cell>
            </table:table-row>
            <table:table-row>
              <table:table-cell office:value-type="float" office:value="0.00000156805509493552">
                <text:p>0</text:p>
              </table:table-cell>
              <table:table-cell office:value-type="float" office:value="6000">
                <text:p>6000</text:p>
              </table:table-cell>
              <table:table-cell office:value-type="float" office:value="0.00000315177803954986">
                <text:p>0.00000315177803954986</text:p>
              </table:table-cell>
              <table:table-cell office:value-type="float" office:value="0.00000156805509493552">
                <text:p>0.000001568055094935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