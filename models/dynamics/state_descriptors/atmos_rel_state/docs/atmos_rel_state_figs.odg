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8cm" svg:stroke-color="#0066b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2_20_Dots_20_3_20_Dashes" svg:stroke-color="#ed1c24" draw:marker-end="Arrow" draw:marker-end-width="0.3cm" draw:fill="none" draw:fill-color="#ed1c24" draw:textarea-vertical-align="middle"/>
    </style:style>
    <style:style style:name="gr3" style:family="graphic" style:parent-style-name="objectwithoutfill">
      <style:graphic-properties draw:stroke="dash" draw:stroke-dash="Ultrafine_20_Dashed" svg:stroke-width="0.028cm" svg:stroke-color="#00a65d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Ultrafine_20_2_20_Dots_20_3_20_Dashes" svg:stroke-width="0.028cm" svg:stroke-color="#00a65d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color="#ed1c24" draw:marker-end="Arrow" draw:marker-end-width="0.3cm" draw:fill="none" draw:fill-color="#ed1c24" draw:textarea-vertical-align="middle"/>
    </style:style>
    <style:style style:name="gr6" style:family="graphic" style:parent-style-name="objectwithoutfill">
      <style:graphic-properties draw:stroke="dash" draw:stroke-dash="_32__20_Dots_20_1_20_Dash" svg:stroke-color="#ed1c24" draw:marker-end="Arrow" draw:marker-end-width="0.3cm" draw:fill="none" draw:fill-color="#ed1c24" draw:textarea-vertical-align="middle"/>
    </style:style>
    <style:style style:name="gr7" style:family="graphic" style:parent-style-name="objectwithoutfill">
      <style:graphic-properties draw:stroke="dash" draw:stroke-dash="_32__20_Dots_20_1_20_Dash" svg:stroke-width="0.028cm" svg:stroke-color="#0066b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1.22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9d85be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8cm"/>
    </style:style>
    <style:style style:name="gr14" style:family="graphic" style:parent-style-name="standard">
      <style:graphic-properties draw:stroke="none" svg:stroke-color="#000000" draw:fill="none" draw:fill-color="#ffffff" fo:min-height="0.883cm"/>
    </style:style>
    <style:style style:name="gr15" style:family="graphic" style:parent-style-name="objectwithoutfill">
      <style:graphic-properties svg:stroke-width="0.028cm" svg:stroke-color="#0066b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00a65d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1.094cm"/>
    </style:style>
    <style:style style:name="gr1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19cm"/>
    </style:style>
    <style:style style:name="gr24" style:family="graphic" style:parent-style-name="standard">
      <style:graphic-properties draw:stroke="none" svg:stroke-color="#000000" draw:fill="none" draw:fill-color="#ffffff" fo:min-height="0.959cm"/>
    </style:style>
    <style:style style:name="gr25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fill-color="#ed1c24" draw:textarea-vertical-align="middle"/>
    </style:style>
    <style:style style:name="gr26" style:family="graphic" style:parent-style-name="objectwithoutfill">
      <style:graphic-properties svg:stroke-color="#000000" draw:marker-end="Arrow" draw:marker-end-width="0.3cm" draw:fill="none" draw:fill-color="#ed1c24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973cm"/>
    </style:style>
    <style:style style:name="gr28" style:family="graphic" style:parent-style-name="standard">
      <style:graphic-properties draw:stroke="none" svg:stroke-color="#000000" draw:fill="none" draw:fill-color="#ffffff" fo:min-height="0.888cm"/>
    </style:style>
    <style:style style:name="gr29" style:family="graphic" style:parent-style-name="objectwithoutfill">
      <style:graphic-properties draw:stroke="dash" draw:stroke-dash="Ultrafine_20_Dashed" draw:fill="none" draw:textarea-vertical-align="middle"/>
    </style:style>
    <style:style style:name="gr30" style:family="graphic" style:parent-style-name="objectwithoutfill">
      <style:graphic-properties draw:stroke="dash" draw:stroke-dash="Ultrafine_20_2_20_Dots_20_3_20_Dashes" svg:stroke-color="#000000" draw:marker-start="Arrow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OpenSymbol" fo:font-size="14pt" fo:language="el" fo:country="GR" style:font-size-asian="18pt" style:font-size-complex="18pt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sub 58%" fo:font-size="12pt" style:font-size-asian="18pt" style:font-size-complex="18pt"/>
    </style:style>
    <style:style style:name="T3" style:family="text">
      <style:text-properties style:font-name="Symbol" fo:font-size="10pt" fo:language="el" fo:country="GR" style:font-size-asian="18pt" style:font-size-complex="18pt"/>
    </style:style>
    <style:style style:name="T4" style:family="text">
      <style:text-properties style:font-name="OpenSymbol" fo:font-size="14pt" fo:language="el" fo:country="GR" style:font-size-asian="18pt" style:font-size-complex="18pt"/>
    </style:style>
    <style:style style:name="T5" style:family="text">
      <style:text-properties style:text-position="sub 58%" style:font-name="Symbol" fo:font-size="10pt" fo:language="el" fo:country="GR" style:font-size-asian="18pt" style:font-size-complex="18pt"/>
    </style:style>
    <style:style style:name="T6" style:family="text">
      <style:text-properties style:font-name="Symbol" fo:font-size="10pt" fo:language="el" fo:country="GR" fo:font-style="italic" style:font-size-asian="18pt" style:font-style-asian="italic" style:font-size-complex="18pt" style:font-style-complex="italic"/>
    </style:style>
    <style:style style:name="T7" style:family="text">
      <style:text-properties style:text-position="sub 58%" style:font-name="Liberation Sans1" fo:font-size="10pt" fo:language="el" fo:country="GR" fo:font-style="italic" style:font-size-asian="18pt" style:font-style-asian="italic" style:font-size-complex="18pt" style:font-style-complex="italic"/>
    </style:style>
    <style:style style:name="T8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64cm" svg:y1="8.239cm" svg:x2="3.794cm" svg:y2="4.302cm">
          <text:p/>
        </draw:line>
        <draw:line draw:style-name="gr2" draw:text-style-name="P2" draw:layer="layout" svg:x1="5.064cm" svg:y1="8.239cm" svg:x2="11.287cm" svg:y2="11.795cm">
          <text:p/>
        </draw:line>
        <draw:line draw:style-name="gr3" draw:text-style-name="P1" draw:layer="layout" svg:x1="5.064cm" svg:y1="8.239cm" svg:x2="9.636cm" svg:y2="5.191cm">
          <text:p/>
        </draw:line>
        <draw:line draw:style-name="gr4" draw:text-style-name="P1" draw:layer="layout" svg:x1="5.064cm" svg:y1="8.239cm" svg:x2="9.382cm" svg:y2="6.842cm">
          <text:p/>
        </draw:line>
        <draw:line draw:style-name="gr5" draw:text-style-name="P2" draw:layer="layout" svg:x1="5.064cm" svg:y1="8.239cm" svg:x2="12.176cm" svg:y2="11.033cm">
          <text:p/>
        </draw:line>
        <draw:line draw:style-name="gr6" draw:text-style-name="P2" draw:layer="layout" svg:x1="5.064cm" svg:y1="8.239cm" svg:x2="10.779cm" svg:y2="13.827cm">
          <draw:glue-point draw:id="4" svg:x="2.111cm" svg:y="2.045cm"/>
          <draw:glue-point draw:id="5" svg:x="2.111cm" svg:y="2.045cm"/>
          <text:p/>
        </draw:line>
        <draw:line draw:style-name="gr7" draw:text-style-name="P1" draw:layer="layout" svg:x1="5.064cm" svg:y1="8.239cm" svg:x2="4.81cm" svg:y2="4.429cm">
          <text:p/>
        </draw:line>
        <draw:frame draw:style-name="gr8" draw:text-style-name="P3" draw:layer="layout" svg:width="3.301cm" svg:height="0.889cm" svg:x="12.05cm" svg:y="10.624cm">
          <draw:text-box>
            <text:p><text:span text:style-name="T1">x, x</text:span><text:span text:style-name="T2">R</text:span></text:p>
          </draw:text-box>
        </draw:frame>
        <draw:frame draw:style-name="gr8" draw:text-style-name="P3" draw:layer="layout" svg:width="6.604cm" svg:height="0.889cm" svg:x="11.16cm" svg:y="11.414cm">
          <draw:text-box>
            <text:p><text:span text:style-name="T1">x</text:span><text:span text:style-name="T2">RY</text:span></text:p>
          </draw:text-box>
        </draw:frame>
        <draw:frame draw:style-name="gr9" draw:text-style-name="P3" draw:layer="layout" svg:width="4.564cm" svg:height="1.477cm" svg:x="11.033cm" svg:y="13.827cm">
          <draw:text-box>
            <text:p><text:span text:style-name="T1">x</text:span><text:span text:style-name="T2">RYP</text:span></text:p>
          </draw:text-box>
        </draw:frame>
        <draw:frame draw:style-name="gr9" draw:text-style-name="P3" draw:layer="layout" svg:width="1.27cm" svg:height="1.477cm" svg:x="9.636cm" svg:y="4.937cm">
          <draw:text-box>
            <text:p><text:span text:style-name="T1">y</text:span><text:span text:style-name="T2">R</text:span></text:p>
          </draw:text-box>
        </draw:frame>
        <draw:frame draw:style-name="gr9" draw:text-style-name="P3" draw:layer="layout" svg:width="8.763cm" svg:height="1.477cm" svg:x="9.128cm" svg:y="6.461cm">
          <draw:text-box>
            <text:p><text:span text:style-name="T2"><text:s/></text:span><text:span text:style-name="T1">y</text:span><text:span text:style-name="T2">RY</text:span><text:span text:style-name="T1">, y</text:span><text:span text:style-name="T2">RYP</text:span></text:p>
          </draw:text-box>
        </draw:frame>
        <draw:frame draw:style-name="gr9" draw:text-style-name="P3" draw:layer="layout" svg:width="8.128cm" svg:height="1.477cm" svg:x="2.905cm" svg:y="3.714cm">
          <draw:text-box>
            <text:p><text:span text:style-name="T1">z</text:span><text:span text:style-name="T2">R</text:span><text:span text:style-name="T1">, z</text:span><text:span text:style-name="T2">RY</text:span></text:p>
          </draw:text-box>
        </draw:frame>
        <draw:frame draw:style-name="gr9" draw:text-style-name="P3" draw:layer="layout" svg:width="5.715cm" svg:height="1.477cm" svg:x="4.429cm" svg:y="3.968cm">
          <draw:text-box>
            <text:p><text:span text:style-name="T1">z</text:span><text:span text:style-name="T2">RYP</text:span></text:p>
          </draw:text-box>
        </draw:frame>
        <draw:line draw:style-name="gr10" draw:text-style-name="P1" draw:layer="layout" svg:x1="10.513cm" svg:y1="10.384cm" svg:x2="9.751cm" svg:y2="10.917cm">
          <text:p/>
        </draw:line>
        <draw:line draw:style-name="gr10" draw:text-style-name="P1" draw:layer="layout" svg:x1="9.746cm" svg:y1="10.925cm" svg:x2="9.111cm" svg:y2="12.195cm">
          <text:p/>
        </draw:line>
        <draw:line draw:style-name="gr10" draw:text-style-name="P1" draw:layer="layout" svg:x1="10.531cm" svg:y1="10.37cm" svg:x2="9.109cm" svg:y2="12.199cm">
          <text:p/>
        </draw:line>
        <draw:line draw:style-name="gr11" draw:text-style-name="P1" draw:layer="controls" svg:x1="9.876cm" svg:y1="10.829cm" svg:x2="9.749cm" svg:y2="10.753cm">
          <text:p/>
        </draw:line>
        <draw:line draw:style-name="gr11" draw:text-style-name="P1" draw:layer="controls" svg:x1="9.179cm" svg:y1="12.054cm" svg:x2="9.046cm" svg:y2="11.934cm">
          <text:p/>
        </draw:line>
        <draw:line draw:style-name="gr11" draw:text-style-name="P1" draw:layer="controls" svg:x1="9.95cm" svg:y1="10.802cm" svg:x2="9.858cm" svg:y2="11.009cm">
          <text:p/>
        </draw:line>
        <draw:line draw:style-name="gr11" draw:text-style-name="P1" draw:layer="controls" svg:x1="9.609cm" svg:y1="10.836cm" svg:x2="9.753cm" svg:y2="10.751cm">
          <text:p/>
        </draw:line>
        <draw:line draw:style-name="gr11" draw:text-style-name="P1" draw:layer="controls" svg:x1="9.636cm" svg:y1="11.16cm" svg:x2="9.862cm" svg:y2="11.008cm">
          <text:p/>
        </draw:line>
        <draw:circle draw:style-name="gr12" draw:text-style-name="P4" draw:layer="controls" svg:width="2.794cm" svg:height="2.794cm" svg:x="5.572cm" svg:y="6.969cm" draw:kind="arc" draw:start-angle="293.51" draw:end-angle="313.98">
          <text:p/>
        </draw:circle>
        <draw:circle draw:style-name="gr12" draw:text-style-name="P4" draw:layer="controls" svg:width="3.302cm" svg:height="3.302cm" svg:x="4.302cm" svg:y="8.239cm" draw:kind="arc" draw:start-angle="335.57" draw:end-angle="7.6">
          <text:p/>
        </draw:circle>
        <draw:ellipse draw:style-name="gr12" draw:text-style-name="P4" draw:layer="controls" svg:width="2.286cm" svg:height="2.667cm" draw:transform="rotate (0.496546172192387) translate (5.83cm 9.237cm)" draw:kind="arc" draw:start-angle="263.42" draw:end-angle="346.99">
          <text:p/>
        </draw:ellipse>
        <draw:frame draw:style-name="gr13" draw:text-style-name="P5" draw:layer="controls" svg:width="0.889cm" svg:height="1.022cm" svg:x="7.559cm" svg:y="9.297cm">
          <draw:text-box>
            <text:p><text:span text:style-name="T3">-y</text:span></text:p>
            <text:p><text:span text:style-name="T4"/></text:p>
          </draw:text-box>
        </draw:frame>
        <draw:frame draw:style-name="gr13" draw:text-style-name="P5" draw:layer="controls" svg:width="0.889cm" svg:height="1.022cm" svg:x="7.35cm" svg:y="9.962cm">
          <draw:text-box>
            <text:p><text:span text:style-name="T3">a</text:span></text:p>
            <text:p><text:span text:style-name="T4"/></text:p>
          </draw:text-box>
        </draw:frame>
        <draw:frame draw:style-name="gr14" draw:text-style-name="P5" draw:layer="controls" svg:width="3.302cm" svg:height="1.138cm" svg:x="8.366cm" svg:y="10.525cm">
          <draw:text-box>
            <text:p><text:span text:style-name="T3">a</text:span><text:span text:style-name="T5">T</text:span></text:p>
            <text:p><text:span text:style-name="T4"/></text:p>
          </draw:text-box>
        </draw:frame>
        <draw:line draw:style-name="gr11" draw:text-style-name="P1" draw:layer="controls" svg:x1="9.056cm" svg:y1="11.941cm" svg:x2="9.005cm" svg:y2="12.093cm">
          <text:p/>
        </draw:line>
        <draw:circle draw:style-name="gr12" draw:text-style-name="P4" draw:layer="controls" svg:width="0.508cm" svg:height="0.508cm" svg:x="9.255cm" svg:y="11.287cm" draw:kind="arc" draw:start-angle="30.73" draw:end-angle="77.7">
          <text:p/>
        </draw:circle>
        <draw:frame draw:style-name="gr13" draw:text-style-name="P5" draw:layer="controls" svg:width="0.889cm" svg:height="1.022cm" svg:x="9.382cm" svg:y="10.956cm">
          <draw:text-box>
            <text:p><text:span text:style-name="T6">f</text:span></text:p>
            <text:p><text:span text:style-name="T4"/></text:p>
          </draw:text-box>
        </draw:frame>
        <draw:line draw:style-name="gr15" draw:text-style-name="P1" draw:layer="controls" svg:x1="5.064cm" svg:y1="8.239cm" svg:x2="5.064cm" svg:y2="3.54cm">
          <text:p/>
        </draw:line>
        <draw:frame draw:style-name="gr9" draw:text-style-name="P3" draw:layer="controls" svg:width="8.128cm" svg:height="1.477cm" svg:x="4.683cm" svg:y="3.032cm">
          <draw:text-box>
            <text:p><text:span text:style-name="T1">z</text:span></text:p>
          </draw:text-box>
        </draw:frame>
        <draw:circle draw:style-name="gr12" draw:text-style-name="P4" draw:layer="controls" svg:width="4.699cm" svg:height="4.699cm" svg:x="2.905cm" svg:y="4.937cm" draw:kind="arc" draw:start-angle="94.16" draw:end-angle="119.96">
          <text:p/>
        </draw:circle>
        <draw:frame draw:style-name="gr13" draw:text-style-name="P5" draw:layer="controls" svg:width="0.889cm" svg:height="1.022cm" svg:x="4.048cm" svg:y="4.681cm">
          <draw:text-box>
            <text:p><text:span text:style-name="T3">q</text:span></text:p>
            <text:p><text:span text:style-name="T4"/></text:p>
          </draw:text-box>
        </draw:frame>
        <draw:line draw:style-name="gr16" draw:text-style-name="P1" draw:layer="controls" svg:x1="5.079cm" svg:y1="8.272cm" svg:x2="10.017cm" svg:y2="6.207cm">
          <text:p/>
        </draw:line>
        <draw:frame draw:style-name="gr9" draw:text-style-name="P3" draw:layer="controls" svg:width="1.27cm" svg:height="1.477cm" svg:x="9.763cm" svg:y="5.746cm">
          <draw:text-box>
            <text:p><text:span text:style-name="T1">y</text:span></text:p>
          </draw:text-box>
        </draw:frame>
        <draw:frame draw:style-name="gr13" draw:text-style-name="P5" draw:layer="controls" svg:width="0.889cm" svg:height="1.022cm" svg:x="7.35cm" svg:y="6.586cm">
          <draw:text-box>
            <text:p><text:span text:style-name="T3">q</text:span></text:p>
            <text:p><text:span text:style-name="T4"/></text:p>
          </draw:text-box>
        </draw:frame>
        <draw:frame draw:style-name="gr17" draw:text-style-name="P5" draw:layer="controls" svg:width="1.27cm" svg:height="1.344cm" svg:x="6.461cm" svg:y="7.022cm">
          <draw:text-box>
            <text:p><text:span text:style-name="T3">-y</text:span></text:p>
            <text:p><text:span text:style-name="T4"/></text:p>
          </draw:text-box>
        </draw:frame>
        <draw:frame draw:style-name="gr13" draw:text-style-name="P5" draw:layer="controls" svg:width="0.889cm" svg:height="1.022cm" svg:x="4.175cm" svg:y="5.318cm">
          <draw:text-box>
            <text:p><text:span text:style-name="T3">a</text:span></text:p>
            <text:p><text:span text:style-name="T4"/></text:p>
          </draw:text-box>
        </draw:frame>
        <draw:ellipse draw:style-name="gr12" draw:text-style-name="P4" draw:layer="controls" svg:width="6.096cm" svg:height="2.286cm" svg:x="1.056cm" svg:y="6.103cm" draw:kind="arc" draw:start-angle="341.86" draw:end-angle="16.98">
          <text:p/>
        </draw:ellipse>
        <draw:ellipse draw:style-name="gr12" draw:text-style-name="P4" draw:layer="controls" svg:width="5.207cm" svg:height="4.191cm" svg:x="2.524cm" svg:y="5.572cm" draw:kind="arc" draw:start-angle="13.44" draw:end-angle="28.43">
          <text:p/>
        </draw:ellipse>
        <draw:ellipse draw:style-name="gr12" draw:text-style-name="P4" draw:layer="controls" svg:width="3.048cm" svg:height="4.191cm" svg:x="2.778cm" svg:y="5.699cm" draw:kind="arc" draw:start-angle="67.25" draw:end-angle="91.15">
          <text:p/>
        </draw:ellipse>
      </draw:page>
      <draw:page draw:name="page2" draw:style-name="dp1" draw:master-page-name="Default">
        <draw:line draw:style-name="gr18" draw:text-style-name="P1" draw:layer="layout" svg:x1="10.906cm" svg:y1="9.636cm" svg:x2="10.906cm" svg:y2="6.461cm">
          <text:p/>
        </draw:line>
        <draw:line draw:style-name="gr19" draw:text-style-name="P1" draw:layer="layout" svg:x1="10.906cm" svg:y1="9.636cm" svg:x2="14.081cm" svg:y2="9.636cm">
          <text:p/>
        </draw:line>
        <draw:line draw:style-name="gr20" draw:text-style-name="P1" draw:layer="layout" svg:x1="10.906cm" svg:y1="9.636cm" svg:x2="8.239cm" svg:y2="12.176cm">
          <text:p/>
        </draw:line>
        <draw:line draw:style-name="gr21" draw:text-style-name="P1" draw:layer="layout" svg:x1="10.906cm" svg:y1="9.636cm" svg:x2="13.7cm" svg:y2="13.319cm">
          <text:p/>
        </draw:line>
        <draw:line draw:style-name="gr22" draw:text-style-name="P1" draw:layer="layout" svg:x1="13.7cm" svg:y1="10.779cm" svg:x2="13.7cm" svg:y2="13.446cm">
          <text:p/>
        </draw:line>
        <draw:line draw:style-name="gr22" draw:text-style-name="P1" draw:layer="layout" svg:x1="10.906cm" svg:y1="9.636cm" svg:x2="13.7cm" svg:y2="10.779cm">
          <text:p/>
        </draw:line>
        <draw:frame draw:style-name="gr23" draw:text-style-name="P3" draw:layer="layout" svg:width="1.524cm" svg:height="1.269cm" svg:x="10.779cm" svg:y="5.826cm">
          <draw:text-box>
            <text:p><text:span text:style-name="T1">z</text:span></text:p>
          </draw:text-box>
        </draw:frame>
        <draw:frame draw:style-name="gr23" draw:text-style-name="P3" draw:layer="layout" svg:width="1.524cm" svg:height="1.269cm" svg:x="7.731cm" svg:y="11.795cm">
          <draw:text-box>
            <text:p><text:span text:style-name="T1">x</text:span></text:p>
          </draw:text-box>
        </draw:frame>
        <draw:frame draw:style-name="gr23" draw:text-style-name="P3" draw:layer="layout" svg:width="1.524cm" svg:height="1.269cm" svg:x="14.081cm" svg:y="9.383cm">
          <draw:text-box>
            <text:p><text:span text:style-name="T1">y</text:span></text:p>
          </draw:text-box>
        </draw:frame>
        <draw:frame draw:style-name="gr23" draw:text-style-name="P3" draw:layer="layout" svg:width="5.334cm" svg:height="1.269cm" svg:x="13.446cm" svg:y="13.319cm">
          <draw:text-box>
            <text:p><text:span text:style-name="T1">V</text:span><text:span text:style-name="T2">fs,TD</text:span></text:p>
          </draw:text-box>
        </draw:frame>
        <draw:frame draw:style-name="gr24" draw:text-style-name="P5" draw:layer="layout" svg:width="2.286cm" svg:height="1.209cm" svg:x="12.176cm" svg:y="10.586cm">
          <draw:text-box>
            <text:p><text:span text:style-name="T6">f</text:span><text:span text:style-name="T7">fs</text:span></text:p>
            <text:p><text:span text:style-name="T4"/></text:p>
          </draw:text-box>
        </draw:frame>
        <draw:frame draw:style-name="gr24" draw:text-style-name="P5" draw:layer="layout" svg:width="2.286cm" svg:height="1.209cm" svg:x="10.398cm" svg:y="10.205cm">
          <draw:text-box>
            <text:p><text:span text:style-name="T6">a</text:span><text:span text:style-name="T7">fs</text:span></text:p>
            <text:p><text:span text:style-name="T4"/></text:p>
          </draw:text-box>
        </draw:frame>
        <draw:ellipse draw:style-name="gr12" draw:text-style-name="P4" draw:layer="layout" svg:width="5.969cm" svg:height="5.461cm" svg:x="6.461cm" svg:y="7.477cm" draw:kind="arc" draw:start-angle="336.31" draw:end-angle="359.07">
          <text:p/>
        </draw:ellipse>
        <draw:ellipse draw:style-name="gr12" draw:text-style-name="P4" draw:layer="layout" svg:width="5.588cm" svg:height="2.413cm" svg:x="7.985cm" svg:y="7.858cm" draw:kind="arc" draw:start-angle="259.77" draw:end-angle="298.65">
          <text:p/>
        </draw:ellipse>
      </draw:page>
      <draw:page draw:name="page3" draw:style-name="dp1" draw:master-page-name="Default">
        <draw:line draw:style-name="gr1" draw:text-style-name="P1" draw:layer="layout" svg:x1="5.064cm" svg:y1="8.239cm" svg:x2="3.794cm" svg:y2="4.302cm">
          <text:p/>
        </draw:line>
        <draw:line draw:style-name="gr2" draw:text-style-name="P2" draw:layer="layout" svg:x1="5.064cm" svg:y1="8.239cm" svg:x2="11.287cm" svg:y2="11.795cm">
          <text:p/>
        </draw:line>
        <draw:line draw:style-name="gr3" draw:text-style-name="P1" draw:layer="layout" svg:x1="5.064cm" svg:y1="8.239cm" svg:x2="9.636cm" svg:y2="5.191cm">
          <text:p/>
        </draw:line>
        <draw:line draw:style-name="gr4" draw:text-style-name="P1" draw:layer="layout" svg:x1="5.064cm" svg:y1="8.239cm" svg:x2="9.382cm" svg:y2="6.842cm">
          <text:p/>
        </draw:line>
        <draw:line draw:style-name="gr5" draw:text-style-name="P2" draw:layer="layout" svg:x1="5.064cm" svg:y1="8.239cm" svg:x2="12.176cm" svg:y2="11.033cm">
          <text:p/>
        </draw:line>
        <draw:line draw:style-name="gr6" draw:text-style-name="P2" draw:layer="layout" svg:x1="5.064cm" svg:y1="8.239cm" svg:x2="10.779cm" svg:y2="13.827cm">
          <draw:glue-point draw:id="4" svg:x="2.111cm" svg:y="2.045cm"/>
          <draw:glue-point draw:id="5" svg:x="2.111cm" svg:y="2.045cm"/>
          <text:p/>
        </draw:line>
        <draw:line draw:style-name="gr7" draw:text-style-name="P1" draw:layer="layout" svg:x1="5.064cm" svg:y1="8.239cm" svg:x2="4.81cm" svg:y2="4.429cm">
          <text:p/>
        </draw:line>
        <draw:frame draw:style-name="gr8" draw:text-style-name="P3" draw:layer="layout" svg:width="3.301cm" svg:height="0.889cm" svg:x="12.05cm" svg:y="10.624cm">
          <draw:text-box>
            <text:p><text:span text:style-name="T1">x</text:span><text:span text:style-name="T2">Traj</text:span><text:span text:style-name="T1">, x</text:span><text:span text:style-name="T2">Wind</text:span></text:p>
          </draw:text-box>
        </draw:frame>
        <draw:frame draw:style-name="gr8" draw:text-style-name="P3" draw:layer="layout" svg:width="6.604cm" svg:height="0.889cm" svg:x="11.16cm" svg:y="11.414cm">
          <draw:text-box>
            <text:p><text:span text:style-name="T1">x</text:span><text:span text:style-name="T2">Stab</text:span></text:p>
          </draw:text-box>
        </draw:frame>
        <draw:frame draw:style-name="gr9" draw:text-style-name="P3" draw:layer="layout" svg:width="4.564cm" svg:height="1.477cm" svg:x="11.033cm" svg:y="13.827cm">
          <draw:text-box>
            <text:p><text:span text:style-name="T1">x</text:span><text:span text:style-name="T2">Body</text:span></text:p>
          </draw:text-box>
        </draw:frame>
        <draw:frame draw:style-name="gr9" draw:text-style-name="P3" draw:layer="layout" svg:width="4.318cm" svg:height="1.477cm" svg:x="9.636cm" svg:y="4.937cm">
          <draw:text-box>
            <text:p><text:span text:style-name="T1">y</text:span><text:span text:style-name="T2">Wind</text:span></text:p>
          </draw:text-box>
        </draw:frame>
        <draw:frame draw:style-name="gr9" draw:text-style-name="P3" draw:layer="layout" svg:width="8.763cm" svg:height="1.477cm" svg:x="9.128cm" svg:y="6.461cm">
          <draw:text-box>
            <text:p><text:span text:style-name="T2"><text:s/></text:span><text:span text:style-name="T1">y</text:span><text:span text:style-name="T2">Stab</text:span><text:span text:style-name="T1">, y</text:span><text:span text:style-name="T2">Body</text:span></text:p>
          </draw:text-box>
        </draw:frame>
        <draw:frame draw:style-name="gr9" draw:text-style-name="P3" draw:layer="layout" svg:width="8.128cm" svg:height="1.477cm" svg:x="2.27cm" svg:y="3.587cm">
          <draw:text-box>
            <text:p><text:span text:style-name="T1">z</text:span><text:span text:style-name="T2">Wind</text:span><text:span text:style-name="T1">, z</text:span><text:span text:style-name="T2">Stab</text:span></text:p>
          </draw:text-box>
        </draw:frame>
        <draw:frame draw:style-name="gr9" draw:text-style-name="P3" draw:layer="layout" svg:width="5.715cm" svg:height="1.477cm" svg:x="4.429cm" svg:y="3.968cm">
          <draw:text-box>
            <text:p><text:span text:style-name="T1">z</text:span><text:span text:style-name="T2">Body</text:span></text:p>
          </draw:text-box>
        </draw:frame>
        <draw:line draw:style-name="gr10" draw:text-style-name="P1" draw:layer="layout" svg:x1="10.513cm" svg:y1="10.384cm" svg:x2="9.751cm" svg:y2="10.917cm">
          <text:p/>
        </draw:line>
        <draw:line draw:style-name="gr10" draw:text-style-name="P1" draw:layer="layout" svg:x1="9.746cm" svg:y1="10.925cm" svg:x2="9.111cm" svg:y2="12.195cm">
          <text:p/>
        </draw:line>
        <draw:line draw:style-name="gr10" draw:text-style-name="P1" draw:layer="layout" svg:x1="10.531cm" svg:y1="10.37cm" svg:x2="9.109cm" svg:y2="12.199cm">
          <text:p/>
        </draw:line>
        <draw:line draw:style-name="gr11" draw:text-style-name="P1" draw:layer="layout" svg:x1="9.876cm" svg:y1="10.829cm" svg:x2="9.749cm" svg:y2="10.753cm">
          <text:p/>
        </draw:line>
        <draw:line draw:style-name="gr11" draw:text-style-name="P1" draw:layer="layout" svg:x1="9.179cm" svg:y1="12.054cm" svg:x2="9.046cm" svg:y2="11.934cm">
          <text:p/>
        </draw:line>
        <draw:line draw:style-name="gr11" draw:text-style-name="P1" draw:layer="layout" svg:x1="9.95cm" svg:y1="10.802cm" svg:x2="9.858cm" svg:y2="11.009cm">
          <text:p/>
        </draw:line>
        <draw:line draw:style-name="gr11" draw:text-style-name="P1" draw:layer="layout" svg:x1="9.609cm" svg:y1="10.836cm" svg:x2="9.753cm" svg:y2="10.751cm">
          <text:p/>
        </draw:line>
        <draw:line draw:style-name="gr11" draw:text-style-name="P1" draw:layer="layout" svg:x1="9.636cm" svg:y1="11.16cm" svg:x2="9.862cm" svg:y2="11.008cm">
          <text:p/>
        </draw:line>
        <draw:circle draw:style-name="gr12" draw:text-style-name="P4" draw:layer="layout" svg:width="2.794cm" svg:height="2.794cm" svg:x="5.572cm" svg:y="6.969cm" draw:kind="arc" draw:start-angle="293.51" draw:end-angle="313.98">
          <text:p/>
        </draw:circle>
        <draw:circle draw:style-name="gr12" draw:text-style-name="P4" draw:layer="layout" svg:width="3.302cm" svg:height="3.302cm" svg:x="4.302cm" svg:y="8.239cm" draw:kind="arc" draw:start-angle="335.57" draw:end-angle="7.6">
          <text:p/>
        </draw:circle>
        <draw:ellipse draw:style-name="gr12" draw:text-style-name="P4" draw:layer="layout" svg:width="2.286cm" svg:height="2.667cm" draw:transform="rotate (0.496546172192387) translate (5.83cm 9.237cm)" draw:kind="arc" draw:start-angle="263.42" draw:end-angle="346.99">
          <text:p/>
        </draw:ellipse>
        <draw:frame draw:style-name="gr13" draw:text-style-name="P5" draw:layer="layout" svg:width="0.889cm" svg:height="1.022cm" svg:x="7.559cm" svg:y="9.297cm">
          <draw:text-box>
            <text:p><text:span text:style-name="T3">y</text:span></text:p>
            <text:p><text:span text:style-name="T4"/></text:p>
          </draw:text-box>
        </draw:frame>
        <draw:frame draw:style-name="gr13" draw:text-style-name="P5" draw:layer="layout" svg:width="0.889cm" svg:height="1.022cm" svg:x="7.35cm" svg:y="9.962cm">
          <draw:text-box>
            <text:p><text:span text:style-name="T3">a</text:span></text:p>
            <text:p><text:span text:style-name="T4"/></text:p>
          </draw:text-box>
        </draw:frame>
        <draw:frame draw:style-name="gr14" draw:text-style-name="P5" draw:layer="layout" svg:width="3.302cm" svg:height="1.138cm" svg:x="8.366cm" svg:y="10.525cm">
          <draw:text-box>
            <text:p><text:span text:style-name="T3">a</text:span><text:span text:style-name="T5">T</text:span></text:p>
            <text:p><text:span text:style-name="T4"/></text:p>
          </draw:text-box>
        </draw:frame>
        <draw:line draw:style-name="gr11" draw:text-style-name="P1" draw:layer="layout" svg:x1="9.056cm" svg:y1="11.941cm" svg:x2="9.005cm" svg:y2="12.093cm">
          <text:p/>
        </draw:line>
        <draw:circle draw:style-name="gr12" draw:text-style-name="P4" draw:layer="layout" svg:width="0.508cm" svg:height="0.508cm" svg:x="9.255cm" svg:y="11.287cm" draw:kind="arc" draw:start-angle="30.73" draw:end-angle="77.7">
          <text:p/>
        </draw:circle>
        <draw:frame draw:style-name="gr13" draw:text-style-name="P5" draw:layer="layout" svg:width="0.889cm" svg:height="1.022cm" svg:x="9.382cm" svg:y="10.956cm">
          <draw:text-box>
            <text:p><text:span text:style-name="T6">f</text:span></text:p>
            <text:p><text:span text:style-name="T4"/></text:p>
          </draw:text-box>
        </draw:frame>
        <draw:line draw:style-name="gr15" draw:text-style-name="P1" draw:layer="layout" svg:x1="5.064cm" svg:y1="8.239cm" svg:x2="5.064cm" svg:y2="3.54cm">
          <text:p/>
        </draw:line>
        <draw:circle draw:style-name="gr12" draw:text-style-name="P4" draw:layer="layout" svg:width="4.699cm" svg:height="4.699cm" svg:x="2.905cm" svg:y="4.937cm" draw:kind="arc" draw:start-angle="94.16" draw:end-angle="119.96">
          <text:p/>
        </draw:circle>
        <draw:frame draw:style-name="gr13" draw:text-style-name="P5" draw:layer="layout" svg:width="0.889cm" svg:height="1.022cm" svg:x="4.048cm" svg:y="4.681cm">
          <draw:text-box>
            <text:p><text:span text:style-name="T3">q</text:span></text:p>
            <text:p><text:span text:style-name="T4"/></text:p>
          </draw:text-box>
        </draw:frame>
        <draw:line draw:style-name="gr16" draw:text-style-name="P1" draw:layer="layout" svg:x1="5.079cm" svg:y1="8.272cm" svg:x2="10.017cm" svg:y2="6.207cm">
          <text:p/>
        </draw:line>
        <draw:frame draw:style-name="gr9" draw:text-style-name="P3" draw:layer="layout" svg:width="3.429cm" svg:height="1.477cm" svg:x="9.763cm" svg:y="5.746cm">
          <draw:text-box>
            <text:p><text:span text:style-name="T1">y</text:span><text:span text:style-name="T2">Traj</text:span></text:p>
          </draw:text-box>
        </draw:frame>
        <draw:frame draw:style-name="gr13" draw:text-style-name="P5" draw:layer="layout" svg:width="0.889cm" svg:height="1.022cm" svg:x="7.35cm" svg:y="6.586cm">
          <draw:text-box>
            <text:p><text:span text:style-name="T3">q</text:span></text:p>
            <text:p><text:span text:style-name="T4"/></text:p>
          </draw:text-box>
        </draw:frame>
        <draw:frame draw:style-name="gr17" draw:text-style-name="P5" draw:layer="layout" svg:width="1.27cm" svg:height="1.344cm" svg:x="6.461cm" svg:y="7.022cm">
          <draw:text-box>
            <text:p><text:span text:style-name="T3">-y</text:span></text:p>
            <text:p><text:span text:style-name="T4"/></text:p>
          </draw:text-box>
        </draw:frame>
        <draw:frame draw:style-name="gr13" draw:text-style-name="P5" draw:layer="layout" svg:width="0.889cm" svg:height="1.022cm" svg:x="4.175cm" svg:y="5.318cm">
          <draw:text-box>
            <text:p><text:span text:style-name="T3">a</text:span></text:p>
            <text:p><text:span text:style-name="T4"/></text:p>
          </draw:text-box>
        </draw:frame>
        <draw:ellipse draw:style-name="gr12" draw:text-style-name="P4" draw:layer="layout" svg:width="6.096cm" svg:height="2.286cm" svg:x="1.056cm" svg:y="6.103cm" draw:kind="arc" draw:start-angle="341.86" draw:end-angle="16.98">
          <text:p/>
        </draw:ellipse>
        <draw:ellipse draw:style-name="gr12" draw:text-style-name="P4" draw:layer="layout" svg:width="5.207cm" svg:height="4.191cm" svg:x="2.524cm" svg:y="5.572cm" draw:kind="arc" draw:start-angle="13.44" draw:end-angle="28.43">
          <text:p/>
        </draw:ellipse>
        <draw:ellipse draw:style-name="gr12" draw:text-style-name="P4" draw:layer="layout" svg:width="3.048cm" svg:height="4.191cm" svg:x="2.778cm" svg:y="5.699cm" draw:kind="arc" draw:start-angle="67.25" draw:end-angle="91.15">
          <text:p/>
        </draw:ellipse>
        <draw:frame draw:style-name="gr9" draw:text-style-name="P3" draw:layer="layout" svg:width="3.429cm" svg:height="1.477cm" svg:x="4.81cm" svg:y="2.778cm">
          <draw:text-box>
            <text:p><text:span text:style-name="T1">z</text:span><text:span text:style-name="T2">Traj</text:span></text:p>
          </draw:text-box>
        </draw:frame>
        <draw:line draw:style-name="gr5" draw:text-style-name="P2" draw:layer="layout" svg:x1="16.113cm" svg:y1="9.356cm" svg:x2="13.573cm" svg:y2="8.365cm">
          <text:p/>
        </draw:line>
        <draw:line draw:style-name="gr3" draw:text-style-name="P1" draw:layer="layout" svg:x1="16.113cm" svg:y1="9.382cm" svg:x2="18.653cm" svg:y2="7.68cm">
          <text:p/>
        </draw:line>
        <draw:line draw:style-name="gr1" draw:text-style-name="P1" draw:layer="layout" svg:x1="16.113cm" svg:y1="9.351cm" svg:x2="16.875cm" svg:y2="11.764cm">
          <text:p/>
        </draw:line>
        <draw:frame draw:style-name="gr8" draw:text-style-name="P7" draw:layer="layout" svg:width="6.477cm" svg:height="0.889cm" svg:x="11.795cm" svg:y="7.604cm">
          <draw:text-box>
            <text:p text:style-name="P6"><text:span text:style-name="T8">drag-accel</text:span></text:p>
          </draw:text-box>
        </draw:frame>
        <draw:frame draw:style-name="gr8" draw:text-style-name="P7" draw:layer="layout" svg:width="3.302cm" svg:height="0.889cm" svg:x="16.494cm" svg:y="6.969cm">
          <draw:text-box>
            <text:p text:style-name="P6"><text:span text:style-name="T8">side-accel</text:span></text:p>
          </draw:text-box>
        </draw:frame>
        <draw:frame draw:style-name="gr8" draw:text-style-name="P7" draw:layer="layout" svg:width="4.572cm" svg:height="0.889cm" svg:x="15.224cm" svg:y="11.795cm">
          <draw:text-box>
            <text:p text:style-name="P6"><text:span text:style-name="T8">lift-accel</text:span></text:p>
          </draw:text-box>
        </draw:frame>
      </draw:page>
      <draw:page draw:name="page4" draw:style-name="dp1" draw:master-page-name="Default">
        <draw:line draw:style-name="gr25" draw:text-style-name="P2" draw:layer="layout" svg:x1="5.064cm" svg:y1="8.239cm" svg:x2="9.763cm" svg:y2="10.906cm">
          <text:p/>
        </draw:line>
        <draw:line draw:style-name="gr4" draw:text-style-name="P1" draw:layer="layout" svg:x1="5.064cm" svg:y1="8.239cm" svg:x2="9.255cm" svg:y2="5.699cm">
          <text:p/>
        </draw:line>
        <draw:line draw:style-name="gr26" draw:text-style-name="P2" draw:layer="layout" svg:x1="5.064cm" svg:y1="8.239cm" svg:x2="10.525cm" svg:y2="10.398cm">
          <text:p/>
        </draw:line>
        <draw:line draw:style-name="gr6" draw:text-style-name="P2" draw:layer="layout" svg:x1="5.064cm" svg:y1="8.239cm" svg:x2="10.779cm" svg:y2="13.827cm">
          <draw:glue-point draw:id="4" svg:x="2.111cm" svg:y="2.045cm"/>
          <draw:glue-point draw:id="5" svg:x="2.111cm" svg:y="2.045cm"/>
          <text:p/>
        </draw:line>
        <draw:line draw:style-name="gr7" draw:text-style-name="P1" draw:layer="layout" svg:x1="5.064cm" svg:y1="8.366cm" svg:x2="5.318cm" svg:y2="4.81cm">
          <text:p/>
        </draw:line>
        <draw:frame draw:style-name="gr8" draw:text-style-name="P3" draw:layer="layout" svg:width="3.301cm" svg:height="0.889cm" svg:x="10.525cm" svg:y="9.636cm">
          <draw:text-box>
            <text:p><text:span text:style-name="T1">v</text:span><text:span text:style-name="T2">fs</text:span></text:p>
          </draw:text-box>
        </draw:frame>
        <draw:frame draw:style-name="gr8" draw:text-style-name="P3" draw:layer="layout" svg:width="3.556cm" svg:height="0.889cm" draw:transform="rotate (-0.473158760215663) translate (8.503cm 9.51cm)">
          <draw:text-box>
            <text:p><text:span text:style-name="T1">x-z projection</text:span></text:p>
          </draw:text-box>
        </draw:frame>
        <draw:frame draw:style-name="gr9" draw:text-style-name="P3" draw:layer="layout" svg:width="4.564cm" svg:height="1.477cm" svg:x="11.033cm" svg:y="13.827cm">
          <draw:text-box>
            <text:p><text:span text:style-name="T1">x</text:span><text:span text:style-name="T2">Body</text:span></text:p>
          </draw:text-box>
        </draw:frame>
        <draw:frame draw:style-name="gr27" draw:text-style-name="P3" draw:layer="layout" svg:width="1.905cm" svg:height="1.223cm" svg:x="8.874cm" svg:y="4.73cm">
          <draw:text-box>
            <text:p><text:span text:style-name="T1">y</text:span><text:span text:style-name="T2">Body</text:span></text:p>
          </draw:text-box>
        </draw:frame>
        <draw:line draw:style-name="gr10" draw:text-style-name="P1" draw:layer="layout" svg:x1="10.513cm" svg:y1="10.384cm" svg:x2="9.751cm" svg:y2="10.917cm">
          <text:p/>
        </draw:line>
        <draw:line draw:style-name="gr10" draw:text-style-name="P1" draw:layer="layout" svg:x1="9.746cm" svg:y1="10.925cm" svg:x2="9.111cm" svg:y2="12.195cm">
          <text:p/>
        </draw:line>
        <draw:line draw:style-name="gr10" draw:text-style-name="P1" draw:layer="layout" svg:x1="10.531cm" svg:y1="10.37cm" svg:x2="9.109cm" svg:y2="12.199cm">
          <text:p/>
        </draw:line>
        <draw:line draw:style-name="gr11" draw:text-style-name="P1" draw:layer="layout" svg:x1="9.876cm" svg:y1="10.829cm" svg:x2="9.749cm" svg:y2="10.753cm">
          <text:p/>
        </draw:line>
        <draw:line draw:style-name="gr11" draw:text-style-name="P1" draw:layer="layout" svg:x1="9.179cm" svg:y1="12.054cm" svg:x2="9.046cm" svg:y2="11.934cm">
          <text:p/>
        </draw:line>
        <draw:line draw:style-name="gr11" draw:text-style-name="P1" draw:layer="layout" svg:x1="9.95cm" svg:y1="10.802cm" svg:x2="9.858cm" svg:y2="11.009cm">
          <text:p/>
        </draw:line>
        <draw:line draw:style-name="gr11" draw:text-style-name="P1" draw:layer="layout" svg:x1="9.609cm" svg:y1="10.836cm" svg:x2="9.753cm" svg:y2="10.751cm">
          <text:p/>
        </draw:line>
        <draw:line draw:style-name="gr11" draw:text-style-name="P1" draw:layer="layout" svg:x1="9.636cm" svg:y1="11.16cm" svg:x2="9.862cm" svg:y2="11.008cm">
          <text:p/>
        </draw:line>
        <draw:circle draw:style-name="gr12" draw:text-style-name="P4" draw:layer="layout" svg:width="2.794cm" svg:height="2.794cm" svg:x="5.572cm" svg:y="6.969cm" draw:kind="arc" draw:start-angle="293.51" draw:end-angle="313.98">
          <text:p/>
        </draw:circle>
        <draw:circle draw:style-name="gr12" draw:text-style-name="P4" draw:layer="layout" svg:width="3.302cm" svg:height="3.302cm" svg:x="4.302cm" svg:y="8.239cm" draw:kind="arc" draw:start-angle="335.57" draw:end-angle="7.6">
          <text:p/>
        </draw:circle>
        <draw:ellipse draw:style-name="gr12" draw:text-style-name="P4" draw:layer="layout" svg:width="2.286cm" svg:height="2.667cm" draw:transform="rotate (0.496546172192387) translate (5.83cm 9.237cm)" draw:kind="arc" draw:start-angle="263.42" draw:end-angle="346.99">
          <text:p/>
        </draw:ellipse>
        <draw:frame draw:style-name="gr13" draw:text-style-name="P5" draw:layer="layout" svg:width="0.889cm" svg:height="1.022cm" svg:x="7.559cm" svg:y="9.297cm">
          <draw:text-box>
            <text:p><text:span text:style-name="T3">b</text:span></text:p>
            <text:p><text:span text:style-name="T4"/></text:p>
          </draw:text-box>
        </draw:frame>
        <draw:frame draw:style-name="gr13" draw:text-style-name="P5" draw:layer="layout" svg:width="0.889cm" svg:height="1.022cm" svg:x="7.35cm" svg:y="9.962cm">
          <draw:text-box>
            <text:p><text:span text:style-name="T3">a</text:span></text:p>
            <text:p><text:span text:style-name="T4"/></text:p>
          </draw:text-box>
        </draw:frame>
        <draw:frame draw:style-name="gr28" draw:text-style-name="P5" draw:layer="layout" svg:width="1.143cm" svg:height="1.138cm" svg:x="8.366cm" svg:y="10.525cm">
          <draw:text-box>
            <text:p><text:span text:style-name="T3">a</text:span><text:span text:style-name="T5">T</text:span></text:p>
            <text:p><text:span text:style-name="T4"/></text:p>
          </draw:text-box>
        </draw:frame>
        <draw:line draw:style-name="gr11" draw:text-style-name="P1" draw:layer="layout" svg:x1="9.056cm" svg:y1="11.941cm" svg:x2="9.005cm" svg:y2="12.093cm">
          <text:p/>
        </draw:line>
        <draw:circle draw:style-name="gr12" draw:text-style-name="P4" draw:layer="layout" svg:width="0.508cm" svg:height="0.508cm" svg:x="9.255cm" svg:y="11.287cm" draw:kind="arc" draw:start-angle="30.73" draw:end-angle="77.7">
          <text:p/>
        </draw:circle>
        <draw:frame draw:style-name="gr13" draw:text-style-name="P5" draw:layer="layout" svg:width="0.889cm" svg:height="1.022cm" svg:x="9.382cm" svg:y="10.906cm">
          <draw:text-box>
            <text:p><text:span text:style-name="T6">f</text:span></text:p>
            <text:p><text:span text:style-name="T4"/></text:p>
          </draw:text-box>
        </draw:frame>
        <draw:frame draw:style-name="gr9" draw:text-style-name="P3" draw:layer="layout" svg:width="5.715cm" svg:height="1.477cm" svg:x="4.43cm" svg:y="3.969cm">
          <draw:text-box>
            <text:p><text:span text:style-name="T1">z</text:span><text:span text:style-name="T2">Body</text:span></text:p>
          </draw:text-box>
        </draw:frame>
        <draw:line draw:style-name="gr29" draw:text-style-name="P1" draw:layer="layout" svg:x1="10.525cm" svg:y1="10.398cm" svg:x2="6.461cm" svg:y2="6.461cm">
          <text:p/>
        </draw:line>
        <draw:line draw:style-name="gr30" draw:text-style-name="P1" draw:layer="layout" svg:x1="6.461cm" svg:y1="6.461cm" svg:x2="5.064cm" svg:y2="8.163cm">
          <text:p/>
        </draw:line>
        <draw:frame draw:style-name="gr8" draw:text-style-name="P3" draw:layer="layout" svg:width="3.556cm" svg:height="0.889cm" draw:transform="rotate (0.915250659745826) translate (5.064cm 7.121cm)">
          <draw:text-box>
            <text:p><text:span text:style-name="T1">y-z proj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2:04:52.555852898</meta:creation-date>
    <meta:editing-duration>PT11H4M46S</meta:editing-duration>
    <meta:editing-cycles>5</meta:editing-cycles>
    <meta:generator>LibreOffice/6.0.7.3$Linux_X86_64 LibreOffice_project/00m0$Build-3</meta:generator>
    <dc:date>2021-02-04T23:00:55.414616345</dc:date>
    <meta:document-statistic meta:object-count="136"/>
  </office:meta>
</office:document-meta>
</file>