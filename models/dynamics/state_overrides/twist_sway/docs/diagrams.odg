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solid" draw:fill-color="#2323dc" draw:textarea-horizontal-align="justify" draw:textarea-vertical-align="middle" draw:auto-grow-height="false" fo:min-height="3.164cm" fo:min-width="0.262cm"/>
    </style:style>
    <style:style style:name="gr3" style:family="graphic" style:parent-style-name="standard">
      <style:graphic-properties draw:stroke="none" draw:fill="solid" draw:fill-color="#2323d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3.164cm" fo:min-width="0.262cm"/>
    </style:style>
    <style:style style:name="gr5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ff0000" draw:marker-end="Arrow" draw:marker-end-width="0.3cm" draw:fill="solid" draw:fill-color="#99ccff" draw:textarea-vertical-align="middle"/>
    </style:style>
    <style:style style:name="gr7" style:family="graphic" style:parent-style-name="objectwithoutfill">
      <style:graphic-properties draw:stroke="dash" draw:stroke-dash="Ultrafine_20_Dashed" svg:stroke-width="0.051cm" svg:stroke-color="#ff00ff" draw:marker-start-width="0.276cm" draw:marker-end="Arrow" draw:marker-end-width="0.376cm" draw:fill="solid" draw:fill-color="#99ccff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996633" draw:marker-end="Arrow" draw:marker-end-width="0.3cm" draw:fill="solid" draw:fill-color="#99ccff" draw:textarea-vertical-align="middle"/>
    </style:style>
    <style:style style:name="gr9" style:family="graphic" style:parent-style-name="objectwithoutfill">
      <style:graphic-properties draw:stroke="dash" draw:stroke-dash="Ultrafine_20_Dashed" svg:stroke-width="0.051cm" svg:stroke-color="#0047ff" draw:marker-start-width="0.276cm" draw:marker-end="Arrow" draw:marker-end-width="0.376cm" draw:fill="solid" draw:fill-color="#99cc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svg:stroke-color="#0047ff" draw:marker-start-width="0.276cm" draw:marker-end="Arrow" draw:marker-end-width="0.376cm" draw:fill="solid" draw:fill-color="#99cc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objectwithoutfill">
      <style:graphic-properties draw:stroke="dash" draw:stroke-dash="Ultrafine_20_Dashed" draw:fill="none" draw:textarea-vertical-align="middle"/>
    </style:style>
    <style:style style:name="gr20" style:family="graphic" style:parent-style-name="standard">
      <style:graphic-properties draw:marker-end="Arrowheads_20_1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2" style:family="graphic" style:parent-style-name="standard">
      <style:graphic-properties draw:fill="solid" draw:fill-color="#000000" draw:textarea-vertical-align="middle"/>
    </style:style>
    <style:style style:name="gr2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ed1c24" draw:fill="none" draw:textarea-vertical-align="middle"/>
    </style:style>
    <style:style style:name="gr25" style:family="graphic" style:parent-style-name="standard">
      <style:graphic-properties svg:stroke-color="#ed1c24" draw:fill="solid" draw:fill-color="#ed1c24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52cm"/>
    </style:style>
    <style:style style:name="gr27" style:family="graphic" style:parent-style-name="standard">
      <style:graphic-properties draw:stroke="none" svg:stroke-color="#000000" draw:fill="none" draw:fill-color="#ffffff" fo:min-height="0.714cm"/>
    </style:style>
    <style:style style:name="gr28" style:family="graphic" style:parent-style-name="standard">
      <style:graphic-properties draw:fill="solid" draw:fill-color="#c7a0cb" draw:textarea-horizontal-align="justify" draw:textarea-vertical-align="middle" draw:auto-grow-height="false" fo:min-height="1.403cm" fo:min-width="5.955cm"/>
    </style:style>
    <style:style style:name="gr29" style:family="graphic" style:parent-style-name="standard">
      <style:graphic-properties draw:stroke="none" svg:stroke-width="0.051cm" svg:stroke-color="#000000" draw:marker-start-width="0.355cm" draw:marker-end-width="0.355cm" draw:fill="solid" draw:fill-color="#bd7cb5" draw:opacity="50%" draw:textarea-horizontal-align="justify" draw:textarea-vertical-align="middle" draw:auto-grow-height="false" fo:min-height="1.998cm" fo:min-width="5.423cm" fo:padding-top="0.15cm" fo:padding-bottom="0.15cm" fo:padding-left="0.275cm" fo:padding-right="0.275cm" draw:shadow-opacity="50%"/>
    </style:style>
    <style:style style:name="gr30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color="#ff0000" draw:marker-end="Symmetric_20_Arrow" draw:marker-end-width="0.3cm" draw:fill="solid" draw:fill-color="#99ccff" draw:textarea-vertical-align="middle"/>
    </style:style>
    <style:style style:name="gr32" style:family="graphic" style:parent-style-name="objectwithoutfill">
      <style:graphic-properties draw:stroke="dash" draw:stroke-dash="Ultrafine_20_Dashed" svg:stroke-width="0.051cm" svg:stroke-color="#ff00ff" draw:marker-start-width="0.276cm" draw:marker-end="Symmetric_20_Arrow" draw:marker-end-width="0.376cm" draw:fill="solid" draw:fill-color="#99ccf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svg:stroke-color="#996633" draw:marker-start-width="0.509cm" draw:marker-end="Symmetric_20_Arrow" draw:marker-end-width="0.61cm" draw:fill="solid" draw:fill-color="#99ccff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051cm" svg:stroke-color="#00864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Ultrafine_20_Dashed" svg:stroke-width="0.051cm" svg:stroke-color="#f79448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fo:min-height="1.02cm"/>
    </style:style>
    <style:style style:name="gr38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639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objectwithoutfill">
      <style:graphic-properties draw:stroke="dash" draw:stroke-dash="Ultrafine_20_Dashed" svg:stroke-width="0.102cm" svg:stroke-color="#0047ff" draw:marker-start-width="0.432cm" draw:marker-end="Symmetric_20_Arrow" draw:marker-end-width="0.533cm" draw:fill="solid" draw:fill-color="#99ccff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dash" draw:stroke-dash="Fine_20_Dashed" svg:stroke-width="0.102cm" svg:stroke-color="#0047ff" draw:marker-start-width="0.432cm" draw:marker-end="Symmetric_20_Arrow" draw:marker-end-width="0.533cm" draw:fill="solid" draw:fill-color="#99ccff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051cm" svg:stroke-color="#1b75bc" draw:marker-start-width="0.355cm" draw:marker-end-width="0.355cm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start-width="0.355cm" draw:marker-end-width="0.355cm" draw:fill="solid" draw:fill-color="#bd7cb5" draw:opacity="50%" draw:textarea-horizontal-align="justify" draw:textarea-vertical-align="middle" draw:auto-grow-height="false" fo:min-height="2.048cm" fo:min-width="5.423cm" fo:padding-top="0.15cm" fo:padding-bottom="0.15cm" fo:padding-left="0.275cm" fo:padding-right="0.275cm" draw:shadow-opacity="50%"/>
    </style:style>
    <style:style style:name="gr45" style:family="graphic" style:parent-style-name="objectwithoutfill">
      <style:graphic-properties svg:stroke-width="0.102cm" svg:stroke-color="#579835" draw:marker-start="Arrow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objectwithoutfill">
      <style:graphic-properties svg:stroke-width="0.051cm" svg:stroke-color="#39fefe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102cm" svg:stroke-color="#820f71" draw:marker-start="Arrow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051cm" svg:stroke-color="#39fefe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323dc"/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="none" draw:fill-color="#ffffff"/>
      <style:text-properties fo:color="#ff00ff"/>
    </style:style>
    <style:style style:name="P7" style:family="paragraph">
      <loext:graphic-properties draw:fill="none" draw:fill-color="#ffffff"/>
      <style:text-properties fo:color="#996633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loext:graphic-properties draw:fill="none" draw:fill-color="#ffffff"/>
      <style:text-properties fo:color="#2323dc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99ccff"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color="#ff0000"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8pt" style:font-size-complex="18pt"/>
    </style:style>
    <style:style style:name="P16" style:family="paragraph">
      <loext:graphic-properties draw:fill="solid" draw:fill-color="#ed1c24"/>
      <style:paragraph-properties fo:text-align="center"/>
    </style:style>
    <style:style style:name="P17" style:family="paragraph">
      <loext:graphic-properties draw:fill="none" draw:fill-color="#ffffff"/>
      <style:text-properties fo:color="#ed1c24" fo:font-size="12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fill="none" draw:fill-color="#ffffff"/>
      <style:text-properties fo:color="#ed1c24" fo:font-size="14pt" style:font-size-asian="18pt" style:font-size-complex="18pt"/>
    </style:style>
    <style:style style:name="P20" style:family="paragraph">
      <loext:graphic-properties draw:fill="solid" draw:fill-color="#c7a0cb"/>
      <style:paragraph-properties fo:text-align="center"/>
    </style:style>
    <style:style style:name="P21" style:family="paragraph">
      <loext:graphic-properties draw:fill="solid" draw:fill-color="#bd7cb5" draw:opacity="50%"/>
      <style:paragraph-properties fo:text-align="center"/>
    </style:style>
    <style:style style:name="P22" style:family="paragraph">
      <style:text-properties fo:color="#f79448"/>
    </style:style>
    <style:style style:name="P23" style:family="paragraph">
      <loext:graphic-properties draw:fill="none" draw:fill-color="#ffffff"/>
      <style:text-properties fo:color="#f79448"/>
    </style:style>
    <style:style style:name="P24" style:family="paragraph">
      <style:text-properties fo:color="#00864b"/>
    </style:style>
    <style:style style:name="P25" style:family="paragraph">
      <loext:graphic-properties draw:fill="none" draw:fill-color="#ffffff"/>
      <style:text-properties fo:color="#00864b"/>
    </style:style>
    <style:style style:name="T1" style:family="text">
      <style:text-properties fo:color="#ff0000"/>
    </style:style>
    <style:style style:name="T2" style:family="text">
      <style:text-properties fo:color="#ff00ff"/>
    </style:style>
    <style:style style:name="T3" style:family="text">
      <style:text-properties fo:color="#996633"/>
    </style:style>
    <style:style style:name="T4" style:family="text">
      <style:text-properties fo:color="#0000ff"/>
    </style:style>
    <style:style style:name="T5" style:family="text">
      <style:text-properties fo:color="#2323dc" fo:font-size="12pt" style:font-size-asian="12pt" style:font-size-complex="12pt"/>
    </style:style>
    <style:style style:name="T6" style:family="text">
      <style:text-properties fo:color="#99ccff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Standard Symbols L"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color="#ed1c24" fo:font-size="12pt" style:font-size-asian="18pt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color="#ed1c24" fo:font-size="14pt" style:font-size-asian="18pt" style:font-size-complex="18pt"/>
    </style:style>
    <style:style style:name="T14" style:family="text">
      <style:text-properties fo:color="#ed1c24" style:text-position="sub 58%" fo:font-size="14pt" style:font-size-asian="18pt" style:font-size-complex="18pt"/>
    </style:style>
    <style:style style:name="T15" style:family="text">
      <style:text-properties fo:color="#ed1c24" style:text-position="0% 100%" fo:font-size="14pt" style:font-size-asian="18pt" style:font-size-complex="18pt"/>
    </style:style>
    <style:style style:name="T16" style:family="text">
      <style:text-properties fo:color="#f79448"/>
    </style:style>
    <style:style style:name="T17" style:family="text">
      <style:text-properties fo:color="#00864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858cm" svg:y1="11.795cm" svg:x2="12.43cm" svg:y2="11.795cm">
          <text:p/>
        </draw:line>
        <draw:line draw:style-name="gr1" draw:text-style-name="P1" draw:layer="layout" svg:x1="7.858cm" svg:y1="11.795cm" svg:x2="7.858cm" svg:y2="4.937cm">
          <text:p/>
        </draw:line>
        <draw:line draw:style-name="gr1" draw:text-style-name="P1" draw:layer="layout" svg:x1="7.858cm" svg:y1="11.795cm" svg:x2="11.922cm" svg:y2="8.239cm">
          <text:p/>
        </draw:line>
        <draw:g>
          <draw:custom-shape draw:style-name="gr2" draw:text-style-name="P2" draw:layer="layout" svg:width="0.762cm" svg:height="3.414cm" svg:x="7.485cm" svg:y="8.3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62cm" svg:height="0.65cm" svg:x="7.485cm" svg:y="7.7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3" draw:layer="layout" svg:width="0.762cm" svg:height="3.414cm" draw:transform="rotate (-0.185877565337395) translate (8.132cm 8.4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762cm" svg:height="0.65cm" draw:transform="rotate (-0.185877565337395) translate (8.252cm 7.7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7.858cm" svg:y1="9.255cm" svg:x2="9.509cm" svg:y2="9.255cm">
          <text:p/>
        </draw:line>
        <draw:line draw:style-name="gr6" draw:text-style-name="P3" draw:layer="layout" svg:x1="7.858cm" svg:y1="9.255cm" svg:x2="6.588cm" svg:y2="8.112cm">
          <text:p/>
        </draw:line>
        <draw:line draw:style-name="gr6" draw:text-style-name="P3" draw:layer="layout" svg:x1="7.858cm" svg:y1="9.255cm" svg:x2="7.858cm" svg:y2="7.35cm">
          <text:p/>
        </draw:line>
        <draw:line draw:style-name="gr7" draw:text-style-name="P3" draw:layer="layout" svg:x1="8.366cm" svg:y1="9.382cm" svg:x2="10.017cm" svg:y2="9.509cm">
          <text:p/>
        </draw:line>
        <draw:line draw:style-name="gr7" draw:text-style-name="P3" draw:layer="layout" svg:x1="8.366cm" svg:y1="9.382cm" svg:x2="7.223cm" svg:y2="8.493cm">
          <text:p/>
        </draw:line>
        <draw:line draw:style-name="gr7" draw:text-style-name="P3" draw:layer="layout" svg:x1="8.366cm" svg:y1="9.382cm" svg:x2="8.742cm" svg:y2="7.577cm">
          <text:p/>
        </draw:line>
        <draw:line draw:style-name="gr8" draw:text-style-name="P3" draw:layer="layout" svg:x1="7.858cm" svg:y1="11.822cm" svg:x2="9.489cm" svg:y2="12.203cm">
          <text:p/>
        </draw:line>
        <draw:line draw:style-name="gr8" draw:text-style-name="P3" draw:layer="layout" svg:x1="7.858cm" svg:y1="11.822cm" svg:x2="9.382cm" svg:y2="10.779cm">
          <text:p/>
        </draw:line>
        <draw:line draw:style-name="gr8" draw:text-style-name="P3" draw:layer="layout" svg:x1="7.858cm" svg:y1="11.822cm" svg:x2="8.234cm" svg:y2="10.017cm">
          <text:p/>
        </draw:line>
        <draw:line draw:style-name="gr9" draw:text-style-name="P3" draw:layer="layout" svg:x1="7.858cm" svg:y1="11.822cm" svg:x2="9.509cm" svg:y2="11.949cm">
          <text:p/>
        </draw:line>
        <draw:line draw:style-name="gr10" draw:text-style-name="P3" draw:layer="layout" svg:x1="7.858cm" svg:y1="11.822cm" svg:x2="9.001cm" svg:y2="10.652cm">
          <text:p/>
        </draw:line>
        <draw:frame draw:style-name="gr11" draw:text-style-name="P4" draw:layer="layout" svg:width="2.032cm" svg:height="0.962cm" svg:x="12.176cm" svg:y="11.16cm">
          <draw:text-box>
            <text:p>East</text:p>
          </draw:text-box>
        </draw:frame>
        <draw:frame draw:style-name="gr11" draw:text-style-name="P4" draw:layer="layout" svg:width="2.286cm" svg:height="0.962cm" svg:x="11.668cm" svg:y="8.239cm">
          <draw:text-box>
            <text:p>North</text:p>
          </draw:text-box>
        </draw:frame>
        <draw:frame draw:style-name="gr11" draw:text-style-name="P4" draw:layer="layout" svg:width="2.159cm" svg:height="0.962cm" svg:x="7.858cm" svg:y="4.683cm">
          <draw:text-box>
            <text:p>Up</text:p>
          </draw:text-box>
        </draw:frame>
        <draw:frame draw:style-name="gr11" draw:text-style-name="P5" draw:layer="layout" svg:width="2.032cm" svg:height="0.962cm" svg:x="5.064cm" svg:y="7.277cm">
          <draw:text-box>
            <text:p><text:span text:style-name="T1">Base</text:span></text:p>
          </draw:text-box>
        </draw:frame>
        <draw:frame draw:style-name="gr11" draw:text-style-name="P6" draw:layer="layout" svg:width="2.413cm" svg:height="0.962cm" svg:x="8.747cm" svg:y="7.096cm">
          <draw:text-box>
            <text:p><text:span text:style-name="T2">Body</text:span></text:p>
          </draw:text-box>
        </draw:frame>
        <draw:frame draw:style-name="gr11" draw:text-style-name="P7" draw:layer="layout" svg:width="2.286cm" svg:height="0.962cm" svg:x="9.001cm" svg:y="10.706cm">
          <draw:text-box>
            <text:p><text:span text:style-name="T3">Sway</text:span></text:p>
          </draw:text-box>
        </draw:frame>
        <draw:frame draw:style-name="gr11" draw:text-style-name="P8" draw:layer="layout" svg:width="3.683cm" svg:height="0.962cm" svg:x="8.62cm" svg:y="9.944cm">
          <draw:text-box>
            <text:p><text:span text:style-name="T4">Twist-sway</text:span></text:p>
          </draw:text-box>
        </draw:frame>
        <draw:frame draw:style-name="gr12" draw:text-style-name="P9" draw:layer="layout" svg:width="2.921cm" svg:height="0.725cm" svg:x="3.54cm" svg:y="8.62cm">
          <draw:text-box>
            <text:p><text:span text:style-name="T5">nominal</text:span></text:p>
          </draw:text-box>
        </draw:frame>
        <draw:line draw:style-name="gr13" draw:text-style-name="P1" draw:layer="layout" svg:x1="5.445cm" svg:y1="8.874cm" svg:x2="7.477cm" svg:y2="9.382cm">
          <text:p/>
        </draw:line>
        <draw:frame draw:style-name="gr12" draw:text-style-name="P10" draw:layer="layout" svg:width="2.794cm" svg:height="0.725cm" svg:x="3.667cm" svg:y="9.636cm">
          <draw:text-box>
            <text:p><text:span text:style-name="T6">perturbed</text:span></text:p>
          </draw:text-box>
        </draw:frame>
        <draw:line draw:style-name="gr13" draw:text-style-name="P1" draw:layer="layout" svg:x1="8.239cm" svg:y1="9.763cm" svg:x2="5.826cm" svg:y2="10.017cm">
          <text:p/>
        </draw:line>
        <draw:line draw:style-name="gr1" draw:text-style-name="P1" draw:layer="layout" svg:x1="5.572cm" svg:y1="18.907cm" svg:x2="5.572cm" svg:y2="14.462cm">
          <text:p/>
        </draw:line>
        <draw:line draw:style-name="gr1" draw:text-style-name="P1" draw:layer="layout" svg:x1="5.572cm" svg:y1="18.907cm" svg:x2="10.144cm" svg:y2="18.907cm">
          <text:p/>
        </draw:line>
        <draw:line draw:style-name="gr14" draw:text-style-name="P1" draw:layer="layout" svg:x1="5.572cm" svg:y1="18.907cm" svg:x2="8.239cm" svg:y2="15.351cm">
          <text:p/>
        </draw:line>
        <draw:line draw:style-name="gr15" draw:text-style-name="P1" draw:layer="layout" svg:x1="5.572cm" svg:y1="18.907cm" svg:x2="7.096cm" svg:y2="16.875cm">
          <text:p/>
        </draw:line>
        <draw:line draw:style-name="gr16" draw:text-style-name="P1" draw:layer="layout" svg:x1="7.096cm" svg:y1="16.875cm" svg:x2="6.207cm" svg:y2="16.24cm">
          <text:p/>
        </draw:line>
        <draw:line draw:style-name="gr17" draw:text-style-name="P1" draw:layer="layout" svg:x1="5.572cm" svg:y1="18.907cm" svg:x2="6.207cm" svg:y2="16.24cm">
          <text:p/>
        </draw:line>
        <draw:frame draw:style-name="gr11" draw:text-style-name="P4" draw:layer="layout" svg:width="2.032cm" svg:height="0.962cm" svg:x="9.382cm" svg:y="17.691cm">
          <draw:text-box>
            <text:p>East</text:p>
          </draw:text-box>
        </draw:frame>
        <draw:frame draw:style-name="gr11" draw:text-style-name="P4" draw:layer="layout" svg:width="2.159cm" svg:height="0.962cm" svg:x="3.032cm" svg:y="13.573cm">
          <draw:text-box>
            <text:p>North</text:p>
          </draw:text-box>
        </draw:frame>
        <draw:frame draw:style-name="gr18" draw:text-style-name="P11" draw:layer="layout" svg:width="3.683cm" svg:height="1.199cm" svg:x="2.016cm" svg:y="17.637cm">
          <draw:text-box>
            <text:p><text:span text:style-name="T7">Wind direction, </text:span><text:span text:style-name="T8">q</text:span></text:p>
          </draw:text-box>
        </draw:frame>
        <draw:frame draw:style-name="gr12" draw:text-style-name="P11" draw:layer="layout" svg:width="3.429cm" svg:height="0.725cm" svg:x="6.588cm" svg:y="17.383cm">
          <draw:text-box>
            <text:p><text:span text:style-name="T7">Parallel</text:span></text:p>
          </draw:text-box>
        </draw:frame>
        <draw:frame draw:style-name="gr12" draw:text-style-name="P11" draw:layer="layout" svg:width="3.429cm" svg:height="0.725cm" svg:x="6.588cm" svg:y="15.986cm">
          <draw:text-box>
            <text:p><text:span text:style-name="T7">Normal</text:span></text:p>
          </draw:text-box>
        </draw:frame>
        <draw:frame draw:style-name="gr12" draw:text-style-name="P11" draw:layer="layout" svg:width="1.651cm" svg:height="0.725cm" svg:x="4.556cm" svg:y="16.748cm">
          <draw:text-box>
            <text:p><text:span text:style-name="T7">Sway</text:span></text:p>
          </draw:text-box>
        </draw:frame>
        <draw:frame draw:style-name="gr12" draw:text-style-name="P12" draw:layer="layout" svg:width="3.429cm" svg:height="0.725cm" svg:x="8.112cm" svg:y="15.224cm">
          <draw:text-box>
            <text:p><text:span text:style-name="T9">Wind</text:span></text:p>
          </draw:text-box>
        </draw:frame>
        <draw:line draw:style-name="gr19" draw:text-style-name="P1" draw:layer="layout" svg:x1="6.207cm" svg:y1="16.24cm" svg:x2="6.207cm" svg:y2="18.907cm">
          <text:p/>
        </draw:line>
        <draw:line draw:style-name="gr19" draw:text-style-name="P1" draw:layer="layout" svg:x1="6.207cm" svg:y1="16.241cm" svg:x2="5.572cm" svg:y2="16.24cm">
          <text:p/>
        </draw:line>
        <draw:frame draw:style-name="gr12" draw:text-style-name="P11" draw:layer="layout" svg:width="0.635cm" svg:height="0.725cm" svg:x="5.826cm" svg:y="18.78cm">
          <draw:text-box>
            <text:p><text:span text:style-name="T7">e</text:span></text:p>
          </draw:text-box>
        </draw:frame>
        <draw:frame draw:style-name="gr12" draw:text-style-name="P11" draw:layer="layout" svg:width="0.635cm" svg:height="0.725cm" svg:x="4.937cm" svg:y="15.896cm">
          <draw:text-box>
            <text:p><text:span text:style-name="T7">n</text:span></text:p>
          </draw:text-box>
        </draw:frame>
        <draw:circle draw:style-name="gr20" draw:text-style-name="P13" draw:layer="layout" svg:width="1.397cm" svg:height="1.397cm" svg:x="4.81cm" svg:y="18.145cm" draw:kind="arc" draw:start-angle="47.65" draw:end-angle="84.85">
          <text:p/>
        </draw:circle>
        <draw:line draw:style-name="gr10" draw:text-style-name="P3" draw:layer="layout" svg:x1="7.846cm" svg:y1="11.835cm" svg:x2="8.112cm" svg:y2="10.525cm">
          <text:p/>
        </draw:line>
        <draw:custom-shape draw:style-name="gr21" draw:text-style-name="P13" draw:layer="layout" svg:width="1.778cm" svg:height="1.778cm" svg:x="4.175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64cm" svg:y1="22.59cm" svg:x2="6.715cm" svg:y2="22.59cm">
          <text:p/>
        </draw:line>
        <draw:line draw:style-name="gr1" draw:text-style-name="P1" draw:layer="layout" svg:x1="5.064cm" svg:y1="22.59cm" svg:x2="5.064cm" svg:y2="21.066cm">
          <text:p/>
        </draw:line>
        <draw:circle draw:style-name="gr13" draw:text-style-name="P1" draw:layer="layout" svg:width="0.254cm" svg:height="0.254cm" svg:x="4.81cm" svg:y="22.59cm">
          <text:p/>
        </draw:circle>
        <draw:circle draw:style-name="gr22" draw:text-style-name="P14" draw:layer="layout" svg:width="0.051cm" svg:height="0.051cm" svg:x="4.912cm" svg:y="22.697cm">
          <text:p/>
        </draw:circle>
        <draw:frame draw:style-name="gr11" draw:text-style-name="P15" draw:layer="layout" svg:width="0.889cm" svg:height="0.962cm" svg:x="6.207cm" svg:y="21.955cm">
          <draw:text-box>
            <text:p><text:span text:style-name="T10">x</text:span></text:p>
          </draw:text-box>
        </draw:frame>
        <draw:frame draw:style-name="gr11" draw:text-style-name="P15" draw:layer="layout" svg:width="0.889cm" svg:height="0.962cm" svg:x="5.064cm" svg:y="20.866cm">
          <draw:text-box>
            <text:p><text:span text:style-name="T10">y</text:span></text:p>
          </draw:text-box>
        </draw:frame>
        <draw:frame draw:style-name="gr11" draw:text-style-name="P15" draw:layer="layout" svg:width="0.889cm" svg:height="0.962cm" svg:x="4.302cm" svg:y="22.082cm">
          <draw:text-box>
            <text:p><text:span text:style-name="T10">z</text:span></text:p>
          </draw:text-box>
        </draw:frame>
        <draw:line draw:style-name="gr23" draw:text-style-name="P1" draw:layer="layout" svg:x1="9.509cm" svg:y1="22.59cm" svg:x2="11.16cm" svg:y2="22.59cm">
          <text:p/>
        </draw:line>
        <draw:line draw:style-name="gr23" draw:text-style-name="P1" draw:layer="layout" svg:x1="9.509cm" svg:y1="22.59cm" svg:x2="9.509cm" svg:y2="21.066cm">
          <text:p/>
        </draw:line>
        <draw:circle draw:style-name="gr24" draw:text-style-name="P1" draw:layer="layout" svg:width="0.254cm" svg:height="0.254cm" svg:x="9.255cm" svg:y="22.59cm">
          <text:p/>
        </draw:circle>
        <draw:circle draw:style-name="gr25" draw:text-style-name="P16" draw:layer="layout" svg:width="0.051cm" svg:height="0.051cm" svg:x="9.357cm" svg:y="22.697cm">
          <text:p/>
        </draw:circle>
        <draw:line draw:style-name="gr23" draw:text-style-name="P1" draw:layer="layout" svg:x1="5.064cm" svg:y1="24.749cm" svg:x2="6.715cm" svg:y2="24.749cm">
          <text:p/>
        </draw:line>
        <draw:line draw:style-name="gr23" draw:text-style-name="P1" draw:layer="layout" svg:x1="5.064cm" svg:y1="24.749cm" svg:x2="5.064cm" svg:y2="25.892cm">
          <text:p/>
        </draw:line>
        <draw:circle draw:style-name="gr24" draw:text-style-name="P1" draw:layer="layout" svg:width="0.254cm" svg:height="0.254cm" svg:x="4.81cm" svg:y="24.495cm">
          <text:p/>
        </draw:circle>
        <draw:circle draw:style-name="gr25" draw:text-style-name="P16" draw:layer="layout" svg:width="0.051cm" svg:height="0.051cm" svg:x="4.912cm" svg:y="24.602cm">
          <text:p/>
        </draw:circle>
        <draw:frame draw:style-name="gr11" draw:text-style-name="P17" draw:layer="layout" svg:width="0.889cm" svg:height="0.962cm" svg:x="9.382cm" svg:y="20.685cm">
          <draw:text-box>
            <text:p><text:span text:style-name="T11">x</text:span></text:p>
          </draw:text-box>
        </draw:frame>
        <draw:frame draw:style-name="gr11" draw:text-style-name="P17" draw:layer="layout" svg:width="0.889cm" svg:height="0.962cm" svg:x="10.779cm" svg:y="21.955cm">
          <draw:text-box>
            <text:p><text:span text:style-name="T11">z</text:span></text:p>
          </draw:text-box>
        </draw:frame>
        <draw:frame draw:style-name="gr11" draw:text-style-name="P17" draw:layer="layout" svg:width="0.889cm" svg:height="0.962cm" svg:x="9.255cm" svg:y="22.59cm">
          <draw:text-box>
            <text:p><text:span text:style-name="T11">y</text:span></text:p>
          </draw:text-box>
        </draw:frame>
        <draw:frame draw:style-name="gr11" draw:text-style-name="P17" draw:layer="layout" svg:width="0.889cm" svg:height="0.962cm" svg:x="6.334cm" svg:y="24.114cm">
          <draw:text-box>
            <text:p><text:span text:style-name="T11">x</text:span></text:p>
          </draw:text-box>
        </draw:frame>
        <draw:frame draw:style-name="gr11" draw:text-style-name="P17" draw:layer="layout" svg:width="0.889cm" svg:height="0.962cm" svg:x="4.429cm" svg:y="25.438cm">
          <draw:text-box>
            <text:p><text:span text:style-name="T11">z</text:span></text:p>
          </draw:text-box>
        </draw:frame>
        <draw:frame draw:style-name="gr11" draw:text-style-name="P17" draw:layer="layout" svg:width="0.889cm" svg:height="0.962cm" svg:x="4.175cm" svg:y="24.168cm">
          <draw:text-box>
            <text:p><text:span text:style-name="T11">y</text:span></text:p>
          </draw:text-box>
        </draw:frame>
        <draw:frame draw:style-name="gr26" draw:text-style-name="P18" draw:layer="layout" svg:width="1.905cm" svg:height="0.806cm" svg:x="5.953cm" svg:y="21.066cm">
          <draw:text-box>
            <text:p text:style-name="P13"><text:span text:style-name="T12">ECEF</text:span></text:p>
          </draw:text-box>
        </draw:frame>
        <draw:frame draw:style-name="gr27" draw:text-style-name="P19" draw:layer="layout" svg:width="3.175cm" svg:height="0.968cm" svg:x="10.398cm" svg:y="21.066cm">
          <draw:text-box>
            <text:p><text:span text:style-name="T13">ENU</text:span><text:span text:style-name="T14">A </text:span><text:span text:style-name="T15">, TS</text:span><text:span text:style-name="T14">A</text:span></text:p>
          </draw:text-box>
        </draw:frame>
        <draw:frame draw:style-name="gr27" draw:text-style-name="P19" draw:layer="layout" svg:width="3.175cm" svg:height="0.968cm" svg:x="5.572cm" svg:y="25.257cm">
          <draw:text-box>
            <text:p><text:span text:style-name="T13">ENU</text:span><text:span text:style-name="T14">B </text:span><text:span text:style-name="T15">, TS</text:span><text:span text:style-name="T14">B</text:span></text:p>
          </draw:text-box>
        </draw:frame>
      </draw:page>
      <draw:page draw:name="page2" draw:style-name="dp1" draw:master-page-name="Default">
        <draw:custom-shape draw:style-name="gr28" draw:text-style-name="P20" draw:layer="layout" svg:width="6.455cm" svg:height="1.653cm" draw:transform="rotate (1.58510802666125) translate (3.537cm 8.443cm)">
          <text:p/>
          <draw:enhanced-geometry svg:viewBox="0 0 21600 21600" draw:glue-points="?f6 0 10800 ?f8 ?f11 10800 ?f9 21600 10800 ?f10 ?f5 10800" draw:text-areas="?f3 ?f3 ?f4 ?f4" draw:mirror-horizontal="true" draw:type="parallelogram" draw:modifiers="5921.93308550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5.973cm" svg:height="2.298cm" draw:transform="rotate (1.56695660244051) translate (3.377cm 8.477cm)">
          <text:p/>
          <draw:enhanced-geometry svg:viewBox="0 0 21600 21600" draw:glue-points="?f6 0 10800 ?f8 ?f11 10800 ?f9 21600 10800 ?f10 ?f5 10800" draw:text-areas="?f3 ?f3 ?f4 ?f4" draw:mirror-horizontal="true" draw:type="parallelogram" draw:modifiers="4053.4704370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3.413cm" svg:y1="8.488cm" svg:x2="7.985cm" svg:y2="8.488cm">
          <text:p/>
        </draw:line>
        <draw:line draw:style-name="gr30" draw:text-style-name="P1" draw:layer="layout" svg:x1="3.433cm" svg:y1="8.538cm" svg:x2="3.433cm" svg:y2="1.68cm">
          <text:p/>
        </draw:line>
        <draw:line draw:style-name="gr30" draw:text-style-name="P1" draw:layer="layout" svg:x1="3.413cm" svg:y1="8.488cm" svg:x2="7.35cm" svg:y2="4.402cm">
          <text:p/>
        </draw:line>
        <draw:g>
          <draw:line draw:style-name="gr31" draw:text-style-name="P3" draw:layer="layout" svg:x1="3.457cm" svg:y1="3.706cm" svg:x2="4.175cm" svg:y2="3.706cm">
            <text:p/>
          </draw:line>
          <draw:line draw:style-name="gr31" draw:text-style-name="P3" draw:layer="layout" svg:x1="3.457cm" svg:y1="3.706cm" svg:x2="2.905cm" svg:y2="3.209cm">
            <text:p/>
          </draw:line>
          <draw:line draw:style-name="gr31" draw:text-style-name="P3" draw:layer="layout" svg:x1="3.457cm" svg:y1="3.706cm" svg:x2="3.457cm" svg:y2="2.878cm">
            <text:p/>
          </draw:line>
        </draw:g>
        <draw:g>
          <draw:line draw:style-name="gr32" draw:text-style-name="P3" draw:layer="layout" svg:x1="5.733cm" svg:y1="3.707cm" svg:x2="6.516cm" svg:y2="3.767cm">
            <text:p/>
          </draw:line>
          <draw:line draw:style-name="gr32" draw:text-style-name="P3" draw:layer="layout" svg:x1="5.733cm" svg:y1="3.706cm" svg:x2="5.191cm" svg:y2="3.285cm">
            <text:p/>
          </draw:line>
          <draw:line draw:style-name="gr32" draw:text-style-name="P3" draw:layer="layout" svg:x1="5.733cm" svg:y1="3.707cm" svg:x2="6.144cm" svg:y2="2.827cm">
            <text:p/>
          </draw:line>
        </draw:g>
        <draw:g>
          <draw:line draw:style-name="gr33" draw:text-style-name="P3" draw:layer="layout" svg:x1="3.433cm" svg:y1="8.466cm" svg:x2="4.683cm" svg:y2="9.228cm">
            <text:p/>
          </draw:line>
          <draw:line draw:style-name="gr33" draw:text-style-name="P3" draw:layer="layout" svg:x1="3.433cm" svg:y1="8.466cm" svg:x2="4.937cm" svg:y2="8.085cm">
            <text:p/>
          </draw:line>
          <draw:line draw:style-name="gr33" draw:text-style-name="P3" draw:layer="layout" svg:x1="3.433cm" svg:y1="8.466cm" svg:x2="4.302cm" svg:y2="6.688cm">
            <text:p/>
          </draw:line>
        </draw:g>
        <draw:frame draw:style-name="gr11" draw:text-style-name="P4" draw:layer="layout" svg:width="2.032cm" svg:height="0.962cm" svg:x="7.731cm" svg:y="7.853cm">
          <draw:text-box>
            <text:p>East</text:p>
          </draw:text-box>
        </draw:frame>
        <draw:frame draw:style-name="gr11" draw:text-style-name="P4" draw:layer="layout" svg:width="2.286cm" svg:height="0.962cm" svg:x="6.842cm" svg:y="3.567cm">
          <draw:text-box>
            <text:p>North</text:p>
          </draw:text-box>
        </draw:frame>
        <draw:frame draw:style-name="gr11" draw:text-style-name="P4" draw:layer="layout" svg:width="2.159cm" svg:height="0.962cm" svg:x="3.413cm" svg:y="1.376cm">
          <draw:text-box>
            <text:p>Up</text:p>
          </draw:text-box>
        </draw:frame>
        <draw:line draw:style-name="gr34" draw:text-style-name="P1" draw:layer="layout" svg:x1="3.413cm" svg:y1="3.64cm" svg:x2="3.413cm" svg:y2="8.466cm">
          <text:p/>
        </draw:line>
        <draw:line draw:style-name="gr34" draw:text-style-name="P1" draw:layer="layout" svg:x1="5.699cm" svg:y1="3.64cm" svg:x2="3.413cm" svg:y2="8.466cm">
          <text:p/>
        </draw:line>
        <draw:line draw:style-name="gr35" draw:text-style-name="P1" draw:layer="layout" svg:x1="3.413cm" svg:y1="3.72cm" svg:x2="5.699cm" svg:y2="2.497cm">
          <text:p/>
        </draw:line>
        <draw:line draw:style-name="gr35" draw:text-style-name="P1" draw:layer="layout" svg:x1="5.699cm" svg:y1="2.497cm" svg:x2="5.699cm" svg:y2="3.767cm">
          <text:p/>
        </draw:line>
        <draw:line draw:style-name="gr36" draw:text-style-name="P1" draw:layer="layout" svg:x1="5.699cm" svg:y1="7.323cm" svg:x2="4.429cm" svg:y2="8.466cm">
          <text:p/>
        </draw:line>
        <draw:line draw:style-name="gr36" draw:text-style-name="P1" draw:layer="layout" svg:x1="3.421cm" svg:y1="8.592cm" svg:x2="4.437cm" svg:y2="8.592cm">
          <text:p/>
        </draw:line>
        <draw:frame draw:style-name="gr37" draw:text-style-name="P23" draw:layer="layout" svg:width="1.016cm" svg:height="1.27cm" svg:x="5.191cm" svg:y="7.45cm">
          <draw:text-box>
            <text:p text:style-name="P22"><text:span text:style-name="T16">n</text:span></text:p>
          </draw:text-box>
        </draw:frame>
        <draw:frame draw:style-name="gr37" draw:text-style-name="P23" draw:layer="layout" svg:width="1.016cm" svg:height="1.27cm" svg:x="3.286cm" svg:y="8.72cm">
          <draw:text-box>
            <text:p text:style-name="P22"><text:span text:style-name="T16">e</text:span></text:p>
          </draw:text-box>
        </draw:frame>
        <draw:line draw:style-name="gr38" draw:text-style-name="P1" draw:layer="layout" svg:x1="5.699cm" svg:y1="3.64cm" svg:x2="3.54cm" svg:y2="4.783cm">
          <text:p/>
        </draw:line>
        <draw:frame draw:style-name="gr39" draw:text-style-name="P25" draw:layer="layout" svg:width="0.762cm" svg:height="0.962cm" svg:x="2.651cm" svg:y="5.418cm">
          <draw:text-box>
            <text:p text:style-name="P24"><text:span text:style-name="T17">H</text:span></text:p>
          </draw:text-box>
        </draw:frame>
        <draw:frame draw:style-name="gr39" draw:text-style-name="P25" draw:layer="layout" svg:width="0.762cm" svg:height="0.962cm" svg:x="3.921cm" svg:y="4.71cm">
          <draw:text-box>
            <text:p text:style-name="P24"><text:span text:style-name="T17">H</text:span></text:p>
          </draw:text-box>
        </draw:frame>
        <draw:line draw:style-name="gr38" draw:text-style-name="P1" draw:layer="layout" svg:x1="5.318cm" svg:y1="1.862cm" svg:x2="3.667cm" svg:y2="3.513cm">
          <text:p/>
        </draw:line>
        <draw:line draw:style-name="gr13" draw:text-style-name="P1" draw:layer="layout" svg:x1="4.429cm" svg:y1="8.466cm" svg:x2="4.429cm" svg:y2="8.847cm">
          <text:p/>
        </draw:line>
        <draw:line draw:style-name="gr13" draw:text-style-name="P1" draw:layer="layout" svg:x1="3.429cm" svg:y1="8.467cm" svg:x2="3.429cm" svg:y2="8.848cm">
          <text:p/>
        </draw:line>
        <draw:line draw:style-name="gr36" draw:text-style-name="P1" draw:layer="layout" svg:x1="5.699cm" svg:y1="7.196cm" svg:x2="5.699cm" svg:y2="3.64cm">
          <text:p/>
        </draw:line>
        <draw:frame draw:style-name="gr37" draw:text-style-name="P23" draw:layer="layout" svg:width="1.016cm" svg:height="1.27cm" svg:x="5.572cm" svg:y="4.529cm">
          <draw:text-box>
            <text:p text:style-name="P22"><text:span text:style-name="T16">u</text:span></text:p>
          </draw:text-box>
        </draw:frame>
        <draw:ellipse draw:style-name="gr40" draw:text-style-name="P13" draw:layer="layout" svg:width="3.915cm" svg:height="6.288cm" svg:x="2.311cm" svg:y="6.444cm" draw:kind="arc" draw:start-angle="45.85" draw:end-angle="61.9">
          <text:p/>
        </draw:ellipse>
        <draw:ellipse draw:style-name="gr40" draw:text-style-name="P13" draw:layer="layout" svg:width="3.915cm" svg:height="6.288cm" svg:x="2.438cm" svg:y="1.609cm" draw:kind="arc" draw:start-angle="45.85" draw:end-angle="61.9">
          <text:p/>
        </draw:ellipse>
        <draw:ellipse draw:style-name="gr40" draw:text-style-name="P13" draw:layer="layout" svg:width="3.915cm" svg:height="6.288cm" svg:x="2.312cm" svg:y="6.445cm" draw:kind="arc" draw:start-angle="45.85" draw:end-angle="61.9">
          <text:p/>
        </draw:ellipse>
        <draw:frame draw:style-name="gr11" draw:text-style-name="P6" draw:layer="layout" svg:width="2.413cm" svg:height="0.962cm" svg:x="6.334cm" svg:y="2.37cm">
          <draw:text-box>
            <text:p><text:span text:style-name="T2">Body</text:span></text:p>
          </draw:text-box>
        </draw:frame>
        <draw:frame draw:style-name="gr11" draw:text-style-name="P5" draw:layer="layout" svg:width="2.032cm" svg:height="0.962cm" svg:x="1.381cm" svg:y="2.424cm">
          <draw:text-box>
            <text:p><text:span text:style-name="T1">Base</text:span></text:p>
          </draw:text-box>
        </draw:frame>
        <draw:g>
          <draw:frame draw:style-name="gr11" draw:text-style-name="P7" draw:layer="layout" svg:width="2.286cm" svg:height="0.962cm" svg:x="5.445cm" svg:y="17.183cm">
            <draw:text-box>
              <text:p><text:span text:style-name="T3">Sway</text:span></text:p>
            </draw:text-box>
          </draw:frame>
          <draw:frame draw:style-name="gr11" draw:text-style-name="P8" draw:layer="layout" svg:width="3.683cm" svg:height="0.962cm" svg:x="4.048cm" svg:y="18.145cm">
            <draw:text-box>
              <text:p><text:span text:style-name="T4">Twist-sway</text:span></text:p>
            </draw:text-box>
          </draw:frame>
          <draw:custom-shape draw:style-name="gr28" draw:text-style-name="P20" draw:layer="layout" svg:width="6.455cm" svg:height="1.653cm" draw:transform="rotate (1.58510802666125) translate (4.553cm 16.83cm)">
            <text:p/>
            <draw:enhanced-geometry svg:viewBox="0 0 21600 21600" draw:glue-points="?f6 0 10800 ?f8 ?f11 10800 ?f9 21600 10800 ?f10 ?f5 10800" draw:text-areas="?f3 ?f3 ?f4 ?f4" draw:mirror-horizontal="true" draw:type="parallelogram" draw:modifiers="5921.933085501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21" draw:layer="layout" svg:width="5.973cm" svg:height="2.298cm" draw:transform="rotate (1.56695660244051) translate (4.393cm 16.864cm)">
            <text:p/>
            <draw:enhanced-geometry svg:viewBox="0 0 21600 21600" draw:glue-points="?f6 0 10800 ?f8 ?f11 10800 ?f9 21600 10800 ?f10 ?f5 10800" draw:text-areas="?f3 ?f3 ?f4 ?f4" draw:mirror-horizontal="true" draw:type="parallelogram" draw:modifiers="4053.47043701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0" draw:text-style-name="P1" draw:layer="layout" svg:x1="4.429cm" svg:y1="16.875cm" svg:x2="9.001cm" svg:y2="16.875cm">
            <text:p/>
          </draw:line>
          <draw:line draw:style-name="gr30" draw:text-style-name="P1" draw:layer="layout" svg:x1="4.449cm" svg:y1="16.925cm" svg:x2="4.449cm" svg:y2="10.067cm">
            <text:p/>
          </draw:line>
          <draw:line draw:style-name="gr30" draw:text-style-name="P1" draw:layer="layout" svg:x1="4.429cm" svg:y1="16.875cm" svg:x2="8.366cm" svg:y2="12.789cm">
            <text:p/>
          </draw:line>
          <draw:g>
            <draw:line draw:style-name="gr31" draw:text-style-name="P3" draw:layer="layout" svg:x1="4.473cm" svg:y1="12.093cm" svg:x2="5.191cm" svg:y2="12.093cm">
              <text:p/>
            </draw:line>
            <draw:line draw:style-name="gr31" draw:text-style-name="P3" draw:layer="layout" svg:x1="4.473cm" svg:y1="12.093cm" svg:x2="3.921cm" svg:y2="12.557cm">
              <text:p/>
            </draw:line>
            <draw:line draw:style-name="gr31" draw:text-style-name="P3" draw:layer="layout" svg:x1="4.473cm" svg:y1="12.093cm" svg:x2="4.473cm" svg:y2="11.265cm">
              <text:p/>
            </draw:line>
          </draw:g>
          <draw:g>
            <draw:line draw:style-name="gr32" draw:text-style-name="P3" draw:layer="layout" svg:x1="6.749cm" svg:y1="12.094cm" svg:x2="7.477cm" svg:y2="12.303cm">
              <text:p/>
            </draw:line>
            <draw:line draw:style-name="gr32" draw:text-style-name="P3" draw:layer="layout" svg:x1="6.749cm" svg:y1="12.094cm" svg:x2="6.334cm" svg:y2="11.541cm">
              <text:p/>
            </draw:line>
            <draw:line draw:style-name="gr32" draw:text-style-name="P3" draw:layer="layout" svg:x1="6.749cm" svg:y1="12.094cm" svg:x2="7.16cm" svg:y2="11.214cm">
              <text:p/>
            </draw:line>
          </draw:g>
          <draw:g>
            <draw:line draw:style-name="gr33" draw:text-style-name="P3" draw:layer="layout" svg:x1="4.449cm" svg:y1="16.853cm" svg:x2="5.699cm" svg:y2="17.615cm">
              <text:p/>
            </draw:line>
            <draw:line draw:style-name="gr33" draw:text-style-name="P3" draw:layer="layout" svg:x1="4.449cm" svg:y1="16.853cm" svg:x2="5.953cm" svg:y2="16.472cm">
              <text:p/>
            </draw:line>
            <draw:line draw:style-name="gr33" draw:text-style-name="P3" draw:layer="layout" svg:x1="4.449cm" svg:y1="16.853cm" svg:x2="5.318cm" svg:y2="15.075cm">
              <text:p/>
            </draw:line>
          </draw:g>
          <draw:frame draw:style-name="gr11" draw:text-style-name="P4" draw:layer="layout" svg:width="2.032cm" svg:height="0.962cm" svg:x="8.747cm" svg:y="16.24cm">
            <draw:text-box>
              <text:p>East</text:p>
            </draw:text-box>
          </draw:frame>
          <draw:frame draw:style-name="gr11" draw:text-style-name="P4" draw:layer="layout" svg:width="2.286cm" svg:height="0.962cm" svg:x="7.858cm" svg:y="11.954cm">
            <draw:text-box>
              <text:p>North</text:p>
            </draw:text-box>
          </draw:frame>
          <draw:frame draw:style-name="gr11" draw:text-style-name="P4" draw:layer="layout" svg:width="2.159cm" svg:height="0.962cm" svg:x="4.429cm" svg:y="9.763cm">
            <draw:text-box>
              <text:p>Up</text:p>
            </draw:text-box>
          </draw:frame>
          <draw:line draw:style-name="gr34" draw:text-style-name="P1" draw:layer="layout" svg:x1="4.429cm" svg:y1="12.027cm" svg:x2="4.429cm" svg:y2="16.853cm">
            <text:p/>
          </draw:line>
          <draw:line draw:style-name="gr34" draw:text-style-name="P1" draw:layer="layout" svg:x1="6.715cm" svg:y1="12.027cm" svg:x2="4.429cm" svg:y2="16.853cm">
            <text:p/>
          </draw:line>
          <draw:line draw:style-name="gr35" draw:text-style-name="P1" draw:layer="layout" svg:x1="4.429cm" svg:y1="12.107cm" svg:x2="6.715cm" svg:y2="10.884cm">
            <text:p/>
          </draw:line>
          <draw:line draw:style-name="gr35" draw:text-style-name="P1" draw:layer="layout" svg:x1="6.715cm" svg:y1="10.884cm" svg:x2="6.715cm" svg:y2="12.154cm">
            <text:p/>
          </draw:line>
          <draw:line draw:style-name="gr38" draw:text-style-name="P1" draw:layer="layout" svg:x1="6.715cm" svg:y1="12.027cm" svg:x2="4.556cm" svg:y2="13.17cm">
            <text:p/>
          </draw:line>
          <draw:frame draw:style-name="gr39" draw:text-style-name="P25" draw:layer="layout" svg:width="0.762cm" svg:height="0.962cm" svg:x="3.667cm" svg:y="13.805cm">
            <draw:text-box>
              <text:p text:style-name="P24"><text:span text:style-name="T17">H</text:span></text:p>
            </draw:text-box>
          </draw:frame>
          <draw:frame draw:style-name="gr39" draw:text-style-name="P25" draw:layer="layout" svg:width="0.762cm" svg:height="0.962cm" svg:x="4.937cm" svg:y="13.097cm">
            <draw:text-box>
              <text:p text:style-name="P24"><text:span text:style-name="T17">H</text:span></text:p>
            </draw:text-box>
          </draw:frame>
          <draw:line draw:style-name="gr38" draw:text-style-name="P1" draw:layer="layout" svg:x1="6.334cm" svg:y1="10.249cm" svg:x2="4.683cm" svg:y2="11.9cm">
            <text:p/>
          </draw:line>
          <draw:ellipse draw:style-name="gr40" draw:text-style-name="P13" draw:layer="layout" svg:width="3.915cm" svg:height="6.288cm" svg:x="3.327cm" svg:y="14.831cm" draw:kind="arc" draw:start-angle="45.85" draw:end-angle="61.9">
            <text:p/>
          </draw:ellipse>
          <draw:ellipse draw:style-name="gr40" draw:text-style-name="P13" draw:layer="layout" svg:width="3.915cm" svg:height="6.288cm" svg:x="3.454cm" svg:y="9.996cm" draw:kind="arc" draw:start-angle="45.85" draw:end-angle="61.9">
            <text:p/>
          </draw:ellipse>
          <draw:ellipse draw:style-name="gr40" draw:text-style-name="P13" draw:layer="layout" svg:width="3.915cm" svg:height="6.288cm" svg:x="3.328cm" svg:y="14.832cm" draw:kind="arc" draw:start-angle="45.85" draw:end-angle="61.9">
            <text:p/>
          </draw:ellipse>
          <draw:frame draw:style-name="gr11" draw:text-style-name="P6" draw:layer="layout" svg:width="2.413cm" svg:height="0.962cm" svg:x="7.35cm" svg:y="10.757cm">
            <draw:text-box>
              <text:p><text:span text:style-name="T2">Body</text:span></text:p>
            </draw:text-box>
          </draw:frame>
          <draw:frame draw:style-name="gr11" draw:text-style-name="P5" draw:layer="layout" svg:width="2.032cm" svg:height="0.962cm" svg:x="2.397cm" svg:y="10.811cm">
            <draw:text-box>
              <text:p><text:span text:style-name="T1">Base</text:span></text:p>
            </draw:text-box>
          </draw:frame>
          <draw:g>
            <draw:line draw:style-name="gr41" draw:text-style-name="P3" draw:layer="layout" svg:x1="4.441cm" svg:y1="16.902cm" svg:x2="4.81cm" svg:y2="18.145cm">
              <text:p/>
            </draw:line>
            <draw:line draw:style-name="gr42" draw:text-style-name="P3" draw:layer="layout" svg:x1="4.441cm" svg:y1="16.802cm" svg:x2="5.826cm" svg:y2="17.029cm">
              <text:p/>
            </draw:line>
            <draw:line draw:style-name="gr42" draw:text-style-name="P3" draw:layer="layout" svg:x1="4.429cm" svg:y1="16.815cm" svg:x2="5.064cm" svg:y2="15.478cm">
              <text:p/>
            </draw:line>
          </draw:g>
          <draw:circle draw:style-name="gr40" draw:text-style-name="P13" draw:layer="layout" svg:width="4.699cm" svg:height="4.699cm" svg:x="-1.667cm" svg:y="12.43cm" draw:kind="arc" draw:start-angle="337.41" draw:end-angle="337.92">
            <text:p/>
          </draw:circle>
          <draw:circle draw:style-name="gr43" draw:text-style-name="P13" draw:layer="layout" svg:width="4.826cm" svg:height="4.826cm" svg:x="1.508cm" svg:y="12.938cm" draw:kind="arc" draw:start-angle="285.98" draw:end-angle="303.84">
            <text:p/>
          </draw:circle>
        </draw:g>
        <draw:g>
          <draw:custom-shape draw:style-name="gr28" draw:text-style-name="P20" draw:layer="layout" svg:width="6.455cm" svg:height="1.653cm" draw:transform="rotate (1.58510802666125) translate (12.681cm 8.089cm)">
            <text:p/>
            <draw:enhanced-geometry svg:viewBox="0 0 21600 21600" draw:glue-points="?f6 0 10800 ?f8 ?f11 10800 ?f9 21600 10800 ?f10 ?f5 10800" draw:text-areas="?f3 ?f3 ?f4 ?f4" draw:mirror-horizontal="true" draw:type="parallelogram" draw:modifiers="5921.933085501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21" draw:layer="layout" svg:width="5.973cm" svg:height="2.298cm" draw:transform="rotate (1.56695660244051) translate (12.521cm 8.123cm)">
            <text:p/>
            <draw:enhanced-geometry svg:viewBox="0 0 21600 21600" draw:glue-points="?f6 0 10800 ?f8 ?f11 10800 ?f9 21600 10800 ?f10 ?f5 10800" draw:text-areas="?f3 ?f3 ?f4 ?f4" draw:mirror-horizontal="true" draw:type="parallelogram" draw:modifiers="4053.47043701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0" draw:text-style-name="P1" draw:layer="layout" svg:x1="12.557cm" svg:y1="8.134cm" svg:x2="17.129cm" svg:y2="8.134cm">
            <text:p/>
          </draw:line>
          <draw:line draw:style-name="gr30" draw:text-style-name="P1" draw:layer="layout" svg:x1="12.577cm" svg:y1="8.184cm" svg:x2="12.577cm" svg:y2="1.326cm">
            <text:p/>
          </draw:line>
          <draw:line draw:style-name="gr30" draw:text-style-name="P1" draw:layer="layout" svg:x1="12.557cm" svg:y1="8.134cm" svg:x2="16.494cm" svg:y2="4.048cm">
            <text:p/>
          </draw:line>
          <draw:frame draw:style-name="gr11" draw:text-style-name="P4" draw:layer="layout" svg:width="2.032cm" svg:height="0.962cm" svg:x="16.875cm" svg:y="7.499cm">
            <draw:text-box>
              <text:p>East</text:p>
            </draw:text-box>
          </draw:frame>
          <draw:frame draw:style-name="gr11" draw:text-style-name="P4" draw:layer="layout" svg:width="2.286cm" svg:height="0.962cm" svg:x="15.986cm" svg:y="3.213cm">
            <draw:text-box>
              <text:p>North</text:p>
            </draw:text-box>
          </draw:frame>
          <draw:frame draw:style-name="gr11" draw:text-style-name="P4" draw:layer="layout" svg:width="2.159cm" svg:height="0.962cm" svg:x="12.557cm" svg:y="1.022cm">
            <draw:text-box>
              <text:p>Up</text:p>
            </draw:text-box>
          </draw:frame>
          <draw:line draw:style-name="gr34" draw:text-style-name="P1" draw:layer="layout" svg:x1="12.557cm" svg:y1="3.286cm" svg:x2="12.557cm" svg:y2="8.112cm">
            <text:p/>
          </draw:line>
          <draw:line draw:style-name="gr34" draw:text-style-name="P1" draw:layer="layout" svg:x1="14.843cm" svg:y1="3.286cm" svg:x2="12.557cm" svg:y2="8.112cm">
            <text:p/>
          </draw:line>
          <draw:line draw:style-name="gr38" draw:text-style-name="P1" draw:layer="layout" svg:x1="12.557cm" svg:y1="3.366cm" svg:x2="14.843cm" svg:y2="2.143cm">
            <text:p/>
          </draw:line>
          <draw:line draw:style-name="gr38" draw:text-style-name="P1" draw:layer="layout" svg:x1="14.843cm" svg:y1="2.143cm" svg:x2="14.843cm" svg:y2="3.413cm">
            <text:p/>
          </draw:line>
          <draw:line draw:style-name="gr36" draw:text-style-name="P1" draw:layer="layout" svg:x1="14.843cm" svg:y1="6.969cm" svg:x2="13.573cm" svg:y2="8.112cm">
            <text:p/>
          </draw:line>
          <draw:line draw:style-name="gr36" draw:text-style-name="P1" draw:layer="layout" svg:x1="12.565cm" svg:y1="8.238cm" svg:x2="13.581cm" svg:y2="8.238cm">
            <text:p/>
          </draw:line>
          <draw:frame draw:style-name="gr37" draw:text-style-name="P23" draw:layer="layout" svg:width="1.016cm" svg:height="1.27cm" svg:x="14.335cm" svg:y="7.096cm">
            <draw:text-box>
              <text:p text:style-name="P22">n</text:p>
            </draw:text-box>
          </draw:frame>
          <draw:frame draw:style-name="gr37" draw:text-style-name="P23" draw:layer="layout" svg:width="1.016cm" svg:height="1.27cm" svg:x="12.43cm" svg:y="8.366cm">
            <draw:text-box>
              <text:p text:style-name="P22">e</text:p>
            </draw:text-box>
          </draw:frame>
          <draw:line draw:style-name="gr38" draw:text-style-name="P1" draw:layer="layout" svg:x1="14.843cm" svg:y1="3.286cm" svg:x2="12.684cm" svg:y2="4.429cm">
            <text:p/>
          </draw:line>
          <draw:frame draw:style-name="gr39" draw:text-style-name="P25" draw:layer="layout" svg:width="0.762cm" svg:height="0.962cm" svg:x="11.795cm" svg:y="5.064cm">
            <draw:text-box>
              <text:p text:style-name="P24">H</text:p>
            </draw:text-box>
          </draw:frame>
          <draw:frame draw:style-name="gr39" draw:text-style-name="P25" draw:layer="layout" svg:width="0.762cm" svg:height="0.962cm" svg:x="13.065cm" svg:y="4.356cm">
            <draw:text-box>
              <text:p text:style-name="P24">H</text:p>
            </draw:text-box>
          </draw:frame>
          <draw:line draw:style-name="gr38" draw:text-style-name="P1" draw:layer="layout" svg:x1="14.462cm" svg:y1="1.508cm" svg:x2="12.811cm" svg:y2="3.159cm">
            <text:p/>
          </draw:line>
          <draw:line draw:style-name="gr13" draw:text-style-name="P1" draw:layer="layout" svg:x1="13.573cm" svg:y1="8.112cm" svg:x2="13.573cm" svg:y2="8.493cm">
            <text:p/>
          </draw:line>
          <draw:line draw:style-name="gr13" draw:text-style-name="P1" draw:layer="layout" svg:x1="12.573cm" svg:y1="8.113cm" svg:x2="12.573cm" svg:y2="8.494cm">
            <text:p/>
          </draw:line>
          <draw:line draw:style-name="gr36" draw:text-style-name="P1" draw:layer="layout" svg:x1="14.843cm" svg:y1="6.842cm" svg:x2="14.843cm" svg:y2="3.286cm">
            <text:p/>
          </draw:line>
          <draw:frame draw:style-name="gr37" draw:text-style-name="P23" draw:layer="layout" svg:width="1.016cm" svg:height="1.27cm" svg:x="14.716cm" svg:y="4.175cm">
            <draw:text-box>
              <text:p text:style-name="P22">u</text:p>
            </draw:text-box>
          </draw:frame>
          <draw:ellipse draw:style-name="gr40" draw:text-style-name="P13" draw:layer="layout" svg:width="3.915cm" svg:height="6.288cm" svg:x="11.455cm" svg:y="6.09cm" draw:kind="arc" draw:start-angle="45.85" draw:end-angle="61.9">
            <text:p/>
          </draw:ellipse>
          <draw:ellipse draw:style-name="gr40" draw:text-style-name="P13" draw:layer="layout" svg:width="3.915cm" svg:height="6.288cm" svg:x="11.582cm" svg:y="1.255cm" draw:kind="arc" draw:start-angle="45.85" draw:end-angle="61.9">
            <text:p/>
          </draw:ellipse>
          <draw:ellipse draw:style-name="gr40" draw:text-style-name="P13" draw:layer="layout" svg:width="3.915cm" svg:height="6.288cm" svg:x="11.456cm" svg:y="6.091cm" draw:kind="arc" draw:start-angle="45.85" draw:end-angle="61.9">
            <text:p/>
          </draw:ellipse>
          <draw:line draw:style-name="gr45" draw:text-style-name="P1" draw:layer="layout" svg:x1="14.843cm" svg:y1="3.286cm" svg:x2="12.557cm" svg:y2="3.413cm">
            <text:p/>
          </draw:line>
          <draw:frame draw:style-name="gr46" draw:text-style-name="P13" draw:layer="layout" svg:width="1.512cm" svg:height="0.795cm" svg:x="12.811cm" svg:y="3.3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28" draw:text-style-name="P20" draw:layer="layout" svg:width="6.455cm" svg:height="1.653cm" draw:transform="rotate (1.58510802666125) translate (14.459cm 16.83cm)">
            <text:p/>
            <draw:enhanced-geometry svg:viewBox="0 0 21600 21600" draw:glue-points="?f6 0 10800 ?f8 ?f11 10800 ?f9 21600 10800 ?f10 ?f5 10800" draw:text-areas="?f3 ?f3 ?f4 ?f4" draw:mirror-horizontal="true" draw:type="parallelogram" draw:modifiers="5921.933085501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21" draw:layer="layout" svg:width="5.973cm" svg:height="2.298cm" draw:transform="rotate (1.56695660244051) translate (14.299cm 16.864cm)">
            <text:p/>
            <draw:enhanced-geometry svg:viewBox="0 0 21600 21600" draw:glue-points="?f6 0 10800 ?f8 ?f11 10800 ?f9 21600 10800 ?f10 ?f5 10800" draw:text-areas="?f3 ?f3 ?f4 ?f4" draw:mirror-horizontal="true" draw:type="parallelogram" draw:modifiers="4053.47043701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0" draw:text-style-name="P1" draw:layer="layout" svg:x1="14.335cm" svg:y1="16.875cm" svg:x2="18.907cm" svg:y2="16.875cm">
            <text:p/>
          </draw:line>
          <draw:line draw:style-name="gr30" draw:text-style-name="P1" draw:layer="layout" svg:x1="14.355cm" svg:y1="16.925cm" svg:x2="14.355cm" svg:y2="10.067cm">
            <text:p/>
          </draw:line>
          <draw:line draw:style-name="gr30" draw:text-style-name="P1" draw:layer="layout" svg:x1="14.335cm" svg:y1="16.875cm" svg:x2="18.272cm" svg:y2="12.789cm">
            <text:p/>
          </draw:line>
          <draw:g>
            <draw:line draw:style-name="gr32" draw:text-style-name="P3" draw:layer="layout" svg:x1="16.655cm" svg:y1="12.094cm" svg:x2="17.383cm" svg:y2="12.303cm">
              <text:p/>
            </draw:line>
            <draw:line draw:style-name="gr32" draw:text-style-name="P3" draw:layer="layout" svg:x1="16.655cm" svg:y1="12.094cm" svg:x2="16.24cm" svg:y2="11.541cm">
              <text:p/>
            </draw:line>
            <draw:line draw:style-name="gr32" draw:text-style-name="P3" draw:layer="layout" svg:x1="16.655cm" svg:y1="12.094cm" svg:x2="17.066cm" svg:y2="11.214cm">
              <text:p/>
            </draw:line>
          </draw:g>
          <draw:frame draw:style-name="gr11" draw:text-style-name="P4" draw:layer="layout" svg:width="2.032cm" svg:height="0.962cm" svg:x="18.653cm" svg:y="16.24cm">
            <draw:text-box>
              <text:p>East</text:p>
            </draw:text-box>
          </draw:frame>
          <draw:frame draw:style-name="gr11" draw:text-style-name="P4" draw:layer="layout" svg:width="2.286cm" svg:height="0.962cm" svg:x="17.764cm" svg:y="11.954cm">
            <draw:text-box>
              <text:p>North</text:p>
            </draw:text-box>
          </draw:frame>
          <draw:frame draw:style-name="gr11" draw:text-style-name="P4" draw:layer="layout" svg:width="2.159cm" svg:height="0.962cm" svg:x="14.335cm" svg:y="9.763cm">
            <draw:text-box>
              <text:p>Up</text:p>
            </draw:text-box>
          </draw:frame>
          <draw:line draw:style-name="gr34" draw:text-style-name="P1" draw:layer="layout" svg:x1="14.335cm" svg:y1="12.027cm" svg:x2="14.335cm" svg:y2="16.853cm">
            <text:p/>
          </draw:line>
          <draw:line draw:style-name="gr47" draw:text-style-name="P1" draw:layer="layout" svg:x1="16.621cm" svg:y1="12.027cm" svg:x2="14.335cm" svg:y2="16.853cm">
            <text:p/>
          </draw:line>
          <draw:line draw:style-name="gr35" draw:text-style-name="P1" draw:layer="layout" svg:x1="14.335cm" svg:y1="12.107cm" svg:x2="16.621cm" svg:y2="10.884cm">
            <text:p/>
          </draw:line>
          <draw:line draw:style-name="gr35" draw:text-style-name="P1" draw:layer="layout" svg:x1="16.621cm" svg:y1="10.884cm" svg:x2="16.621cm" svg:y2="12.154cm">
            <text:p/>
          </draw:line>
          <draw:line draw:style-name="gr38" draw:text-style-name="P1" draw:layer="layout" svg:x1="16.621cm" svg:y1="12.027cm" svg:x2="14.462cm" svg:y2="13.17cm">
            <text:p/>
          </draw:line>
          <draw:line draw:style-name="gr38" draw:text-style-name="P1" draw:layer="layout" svg:x1="16.24cm" svg:y1="10.249cm" svg:x2="14.589cm" svg:y2="11.9cm">
            <text:p/>
          </draw:line>
          <draw:ellipse draw:style-name="gr40" draw:text-style-name="P13" draw:layer="layout" svg:width="3.915cm" svg:height="6.288cm" svg:x="13.233cm" svg:y="14.831cm" draw:kind="arc" draw:start-angle="45.85" draw:end-angle="61.9">
            <text:p/>
          </draw:ellipse>
          <draw:ellipse draw:style-name="gr40" draw:text-style-name="P13" draw:layer="layout" svg:width="3.915cm" svg:height="6.288cm" svg:x="13.36cm" svg:y="9.996cm" draw:kind="arc" draw:start-angle="45.85" draw:end-angle="61.9">
            <text:p/>
          </draw:ellipse>
          <draw:ellipse draw:style-name="gr40" draw:text-style-name="P13" draw:layer="layout" svg:width="3.915cm" svg:height="6.288cm" svg:x="13.234cm" svg:y="14.832cm" draw:kind="arc" draw:start-angle="45.85" draw:end-angle="61.9">
            <text:p/>
          </draw:ellipse>
          <draw:frame draw:style-name="gr11" draw:text-style-name="P6" draw:layer="layout" svg:width="2.413cm" svg:height="0.962cm" svg:x="17.256cm" svg:y="10.757cm">
            <draw:text-box>
              <text:p><text:span text:style-name="T2">Body</text:span></text:p>
            </draw:text-box>
          </draw:frame>
          <draw:circle draw:style-name="gr40" draw:text-style-name="P13" draw:layer="layout" svg:width="4.699cm" svg:height="4.699cm" svg:x="8.239cm" svg:y="12.43cm" draw:kind="arc" draw:start-angle="337.41" draw:end-angle="337.92">
            <text:p/>
          </draw:circle>
          <draw:line draw:style-name="gr45" draw:text-style-name="P1" draw:layer="layout" svg:x1="14.335cm" svg:y1="12.176cm" svg:x2="14.322cm" svg:y2="16.866cm">
            <text:p/>
          </draw:line>
          <draw:frame draw:style-name="gr46" draw:text-style-name="P13" draw:layer="layout" svg:width="0.862cm" svg:height="0.706cm" svg:x="14.843cm" svg:y="13.31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46" draw:text-style-name="P13" draw:layer="layout" svg:width="0.93cm" svg:height="0.706cm" svg:x="13.405cm" svg:y="14.46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style-name="gr48" draw:text-style-name="P1" draw:layer="layout" svg:x1="12.303cm" svg:y1="14.081cm" svg:x2="14.327cm" svg:y2="16.892cm">
            <text:p/>
          </draw:line>
          <draw:frame draw:style-name="gr46" draw:text-style-name="P13" draw:layer="layout" svg:width="3.4cm" svg:height="0.706cm" svg:x="10.906cm" svg:y="13.12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13" draw:text-style-name="P1" draw:layer="layout" svg:x1="14.022cm" svg:y1="16.416cm" svg:x2="14.022cm" svg:y2="15.781cm">
            <text:p/>
          </draw:line>
          <draw:line draw:style-name="gr13" draw:text-style-name="P1" draw:layer="layout" svg:x1="14.301cm" svg:y1="16.176cm" svg:x2="14.047cm" svg:y2="15.795cm">
            <text:p/>
          </draw:line>
          <draw:frame draw:style-name="gr46" draw:text-style-name="P13" draw:layer="layout" svg:width="0.517cm" svg:height="0.529cm" svg:x="14.462cm" svg:y="14.18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ircle draw:style-name="gr49" draw:text-style-name="P13" draw:layer="layout" svg:width="3.302cm" svg:height="3.302cm" svg:x="12.811cm" svg:y="14.716cm" draw:kind="arc" draw:start-angle="62.03" draw:end-angle="91.1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urner </meta:initial-creator>
    <meta:creation-date>2018-03-27T15:03:15.573315692</meta:creation-date>
    <dc:date>2022-01-24T16:11:52.896903930</dc:date>
    <meta:editing-duration>PT2H55M16S</meta:editing-duration>
    <meta:editing-cycles>8</meta:editing-cycles>
    <meta:generator>LibreOffice/6.0.7.3$Linux_X86_64 LibreOffice_project/00m0$Build-3</meta:generator>
    <meta:document-statistic meta:object-count="220"/>
  </office:meta>
</office:document-meta>
</file>

<file path=Object 1/content.xml><?xml version="1.0" encoding="utf-8"?>
<math xmlns="http://www.w3.org/1998/Math/MathML" display="block">
  <semantics>
    <mstyle mathsize="16pt">
      <mstyle color="green">
        <msub>
          <mover accent="true">
            <mi mathvariant="italic">dp</mi>
            <mo stretchy="false">⃗</mo>
          </mover>
          <mi mathvariant="italic">ENU</mi>
        </msub>
      </mstyle>
    </mstyle>
    <annotation encoding="StarMath 5.0">size 16 color green {vec dp}_ENU</annotation>
  </semantics>
</math>
</file>

<file path=Object 2/content.xml><?xml version="1.0" encoding="utf-8"?>
<math xmlns="http://www.w3.org/1998/Math/MathML" display="block">
  <semantics>
    <mstyle mathsize="16pt">
      <mstyle color="aqua">
        <msub>
          <mover accent="true">
            <mi>x</mi>
            <mo stretchy="false">⃗</mo>
          </mover>
          <mi mathvariant="italic">dp</mi>
        </msub>
      </mstyle>
    </mstyle>
    <annotation encoding="StarMath 5.0">size 16 { color cyan  {vec{x}}_dp }</annotation>
  </semantics>
</math>
</file>

<file path=Object 3/content.xml><?xml version="1.0" encoding="utf-8"?>
<math xmlns="http://www.w3.org/1998/Math/MathML" display="block">
  <semantics>
    <mstyle mathsize="16pt">
      <mstyle color="green">
        <msub>
          <mover accent="true">
            <mi>x</mi>
            <mo stretchy="false">⃗</mo>
          </mover>
          <mi mathvariant="italic">ref</mi>
        </msub>
      </mstyle>
    </mstyle>
    <annotation encoding="StarMath 5.0">size 16 { color green  {vec{x}}_ref }</annotation>
  </semantics>
</math>
</file>

<file path=Object 4/content.xml><?xml version="1.0" encoding="utf-8"?>
<math xmlns="http://www.w3.org/1998/Math/MathML" display="block">
  <semantics>
    <mstyle mathsize="16pt">
      <mstyle color="purple">
        <mrow>
          <mover accent="true">
            <mi>s</mi>
            <mo stretchy="false">⃗</mo>
          </mover>
          <mrow>
            <mspace width="2em"/>
            <mo stretchy="false">=</mo>
            <mspace width="2em"/>
          </mrow>
          <mrow>
            <msub>
              <mover accent="true">
                <mi>x</mi>
                <mo stretchy="false">^</mo>
              </mover>
              <mi mathvariant="italic">ref</mi>
            </msub>
            <mo stretchy="false">×</mo>
            <msub>
              <mover accent="true">
                <mi>x</mi>
                <mo stretchy="false">^</mo>
              </mover>
              <mi mathvariant="italic">dp</mi>
            </msub>
          </mrow>
        </mrow>
      </mstyle>
    </mstyle>
    <annotation encoding="StarMath 5.0"> size 16 { color purple { vec{s}~=~ {hat x}_ref times { hat x}_dp}}</annotation>
  </semantics>
</math>
</file>

<file path=Object 5/content.xml><?xml version="1.0" encoding="utf-8"?>
<math xmlns="http://www.w3.org/1998/Math/MathML" display="block">
  <semantics>
    <mstyle mathsize="16pt">
      <mstyle color="aqua">
        <mi>ϕ</mi>
      </mstyle>
    </mstyle>
    <annotation encoding="StarMath 5.0">size 16 { color cyan  {%phi }}</annotation>
  </semantics>
</math>
</file>