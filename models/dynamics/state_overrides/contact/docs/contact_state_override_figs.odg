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1a7eff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5eaa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ot" svg:stroke-width="0.051cm" svg:stroke-color="#ff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Dot" svg:stroke-width="0.051cm" svg:stroke-color="#1a7eff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t" svg:stroke-width="0.051cm" svg:stroke-color="#5eaa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1a7eff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5eaa00"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t" svg:stroke-color="#ff0000"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ot" svg:stroke-color="#1a7eff" draw:marker-end="Arrowheads_20_2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Dot" svg:stroke-color="#5eaa00" draw:marker-end="Arrowheads_20_3" draw:marker-end-width="0.3cm" draw:fill="none" draw:textarea-vertical-align="middle"/>
    </style:style>
    <style:style style:name="gr13" style:family="graphic" style:parent-style-name="standard">
      <style:graphic-properties draw:stroke="dash" draw:stroke-dash="Long_20_Dot_20__28_Rounded_29_" svg:stroke-width="0.051cm" draw:marker-start-width="0.279cm" draw:marker-end-width="0.279cm" svg:stroke-linecap="round" draw:fill="none" draw:textarea-horizontal-align="justify" draw:textarea-vertical-align="middle" draw:auto-grow-height="false" fo:min-height="5.762cm" fo:min-width="2.819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Long_20_Dot_20__28_Rounded_29_" svg:stroke-width="0.051cm" draw:marker-start-width="0.279cm" draw:marker-end-width="0.279cm" svg:stroke-linecap="round" draw:fill="none" draw:textarea-horizontal-align="justify" draw:textarea-vertical-align="middle" draw:auto-grow-height="false" fo:min-height="4.864cm" fo:min-width="2.818cm" fo:padding-top="0.15cm" fo:padding-bottom="0.15cm" fo:padding-left="0.275cm" fo:padding-right="0.27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000000" draw:marker-start="Arrow_20_short" draw:marker-end="Arrow_20_short" draw:marker-end-width="0.20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standard">
      <style:graphic-properties draw:stroke="dash" draw:stroke-dash="Long_20_Dot_20__28_Rounded_29_" svg:stroke-width="0.051cm" draw:marker-start-width="0.279cm" draw:marker-end-width="0.279cm" svg:stroke-linecap="round" draw:fill="none" draw:textarea-horizontal-align="justify" draw:textarea-vertical-align="middle" draw:auto-grow-height="false" fo:min-height="5.762cm" fo:min-width="3.717cm" fo:padding-top="0.15cm" fo:padding-bottom="0.15cm" fo:padding-left="0.275cm" fo:padding-right="0.27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stroke="solid" draw:stroke-dash="Dot" svg:stroke-color="#ff0000" draw:marker-end="Arrowheads_20_1" draw:marker-end-width="0.3cm" draw:fill="none" draw:textarea-vertical-align="middle"/>
    </style:style>
    <style:style style:name="gr23" style:family="graphic" style:parent-style-name="objectwithoutfill">
      <style:graphic-properties draw:stroke="solid" draw:stroke-dash="Dot" svg:stroke-color="#1a7eff" draw:marker-end="Arrowheads_20_2" draw:marker-end-width="0.3cm" draw:fill="none" draw:textarea-vertical-align="middle"/>
    </style:style>
    <style:style style:name="gr24" style:family="graphic" style:parent-style-name="objectwithoutfill">
      <style:graphic-properties draw:stroke="solid" draw:stroke-dash="Dot" svg:stroke-color="#5eaa00" draw:marker-end="Arrowheads_20_3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6" style:family="graphic" style:parent-style-name="standard">
      <style:graphic-properties draw:stroke="dash" draw:stroke-dash="Long_20_Dot_20__28_Rounded_29_" svg:stroke-width="0.051cm" draw:marker-start-width="0.279cm" draw:marker-end-width="0.279cm" svg:stroke-linecap="round" draw:fill="none" draw:textarea-horizontal-align="justify" draw:textarea-vertical-align="middle" draw:auto-grow-height="false" fo:min-height="1.946cm" fo:min-width="1.246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Long_20_Dot_20__28_Rounded_29_" svg:stroke-width="0.051cm" draw:marker-start-width="0.279cm" draw:marker-end-width="0.279cm" svg:stroke-linecap="round" draw:fill="none" draw:textarea-horizontal-align="justify" draw:textarea-vertical-align="middle" draw:auto-grow-height="false" fo:min-height="1.721cm" fo:min-width="1.246cm" fo:padding-top="0.15cm" fo:padding-bottom="0.15cm" fo:padding-left="0.275cm" fo:padding-right="0.275cm"/>
    </style:style>
    <style:style style:name="gr28" style:family="graphic" style:parent-style-name="standard">
      <style:graphic-properties draw:stroke="dash" draw:stroke-dash="Long_20_Dot_20__28_Rounded_29_" svg:stroke-width="0.051cm" draw:marker-start-width="0.279cm" draw:marker-end-width="0.279cm" svg:stroke-linecap="round" draw:fill="none" draw:textarea-horizontal-align="justify" draw:textarea-vertical-align="middle" draw:auto-grow-height="false" fo:min-height="2.62cm" fo:min-width="2.369cm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fo:font-size="10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1a7eff" loext:opacity="100%" fo:font-size="10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5eaa00" loext:opacity="100%" fo:font-size="10pt" fo:font-weight="bold" style:font-weight-asian="bold" style:font-weight-complex="bold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color="#ff0000" loext:opacity="100%" fo:font-size="10pt" fo:font-weight="bold" style:font-weight-asian="bold" style:font-weight-complex="bold"/>
    </style:style>
    <style:style style:name="T4" style:family="text">
      <style:text-properties fo:color="#1a7eff" loext:opacity="100%" fo:font-size="10pt" fo:font-weight="bold" style:font-weight-asian="bold" style:font-weight-complex="bold"/>
    </style:style>
    <style:style style:name="T5" style:family="text">
      <style:text-properties fo:color="#5eaa00" loext:opacity="100%"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7.509cm" svg:y1="8.302cm" svg:x2="19.414cm" svg:y2="8.302cm">
              <text:p/>
            </draw:line>
            <draw:line draw:style-name="gr2" draw:text-style-name="P1" draw:layer="layout" svg:x1="17.509cm" svg:y1="8.302cm" svg:x2="17.509cm" svg:y2="6.397cm">
              <text:p/>
            </draw:line>
            <draw:line draw:style-name="gr3" draw:text-style-name="P1" draw:layer="layout" svg:x1="17.509cm" svg:y1="8.302cm" svg:x2="16.556cm" svg:y2="9.255cm">
              <text:p/>
            </draw:line>
            <draw:line draw:style-name="gr4" draw:text-style-name="P1" draw:layer="layout" svg:x1="17.509cm" svg:y1="4.175cm" svg:x2="15.921cm" svg:y2="4.175cm">
              <text:p/>
            </draw:line>
            <draw:line draw:style-name="gr5" draw:text-style-name="P1" draw:layer="layout" svg:x1="17.509cm" svg:y1="4.175cm" svg:x2="17.509cm" svg:y2="2.27cm">
              <text:p/>
            </draw:line>
            <draw:line draw:style-name="gr6" draw:text-style-name="P1" draw:layer="layout" svg:x1="17.509cm" svg:y1="4.175cm" svg:x2="18.461cm" svg:y2="3.222cm">
              <text:p/>
            </draw:line>
            <draw:line draw:style-name="gr7" draw:text-style-name="P1" draw:layer="layout" svg:x1="12.431cm" svg:y1="8.303cm" svg:x2="11.477cm" svg:y2="8.303cm">
              <text:p/>
            </draw:line>
            <draw:line draw:style-name="gr8" draw:text-style-name="P1" draw:layer="layout" svg:x1="12.431cm" svg:y1="8.303cm" svg:x2="12.43cm" svg:y2="7.351cm">
              <text:p/>
            </draw:line>
            <draw:line draw:style-name="gr9" draw:text-style-name="P1" draw:layer="layout" svg:x1="12.431cm" svg:y1="8.303cm" svg:x2="13.382cm" svg:y2="7.668cm">
              <text:p/>
            </draw:line>
            <draw:line draw:style-name="gr10" draw:text-style-name="P1" draw:layer="layout" svg:x1="12.429cm" svg:y1="4.134cm" svg:x2="13.699cm" svg:y2="4.134cm">
              <text:p/>
            </draw:line>
            <draw:line draw:style-name="gr11" draw:text-style-name="P1" draw:layer="layout" svg:x1="12.429cm" svg:y1="4.134cm" svg:x2="12.429cm" svg:y2="2.864cm">
              <text:p/>
            </draw:line>
            <draw:line draw:style-name="gr12" draw:text-style-name="P1" draw:layer="layout" svg:x1="12.429cm" svg:y1="4.134cm" svg:x2="11.477cm" svg:y2="4.769cm">
              <text:p/>
            </draw:line>
            <draw:custom-shape draw:style-name="gr13" draw:text-style-name="P1" draw:layer="layout" svg:width="4.763cm" svg:height="8.572cm" svg:x="15.287cm" svg:y="1.6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4.762cm" svg:height="7.302cm" svg:x="10.207cm" svg:y="1.9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1" draw:layer="layout" svg:x1="15.287cm" svg:y1="3.222cm" svg:x2="14.335cm" svg:y2="9.255cm">
              <text:p/>
            </draw:line>
            <draw:line draw:style-name="gr16" draw:text-style-name="P1" draw:layer="layout" svg:x1="14.527cm" svg:y1="5.558cm" svg:x2="15.288cm" svg:y2="5.762cm">
              <text:p/>
            </draw:line>
            <draw:frame draw:style-name="gr17" draw:text-style-name="P2" draw:layer="layout" svg:width="5.08cm" svg:height="0.962cm" svg:x="13.699cm" svg:y="2.578cm">
              <draw:text-box>
                <text:p><text:span text:style-name="T1">contact plane</text:span></text:p>
              </draw:text-box>
            </draw:frame>
            <draw:frame draw:style-name="gr18" draw:text-style-name="P2" draw:layer="layout" svg:width="1.27cm" svg:height="0.952cm" svg:x="11.795cm" svg:y="8.303cm">
              <draw:text-box>
                <text:p><text:span text:style-name="T1">OC</text:span></text:p>
              </draw:text-box>
            </draw:frame>
            <draw:frame draw:style-name="gr19" draw:text-style-name="P2" draw:layer="layout" svg:width="1.27cm" svg:height="0.645cm" svg:x="12.429cm" svg:y="3.489cm">
              <draw:text-box>
                <text:p><text:span text:style-name="T1">OS</text:span></text:p>
              </draw:text-box>
            </draw:frame>
            <draw:frame draw:style-name="gr18" draw:text-style-name="P3" draw:layer="layout" svg:width="1.27cm" svg:height="0.952cm" svg:x="17.509cm" svg:y="7.667cm">
              <draw:text-box>
                <text:p><text:span text:style-name="T2">RC</text:span></text:p>
              </draw:text-box>
            </draw:frame>
            <draw:frame draw:style-name="gr18" draw:text-style-name="P3" draw:layer="layout" svg:width="1.27cm" svg:height="0.952cm" svg:x="17.509cm" svg:y="4.175cm">
              <draw:text-box>
                <text:p><text:span text:style-name="T2">RS</text:span></text:p>
              </draw:text-box>
            </draw:frame>
            <draw:frame draw:style-name="gr18" draw:text-style-name="P4" draw:layer="layout" svg:width="1.27cm" svg:height="0.952cm" svg:x="18.887cm" svg:y="7.613cm">
              <draw:text-box>
                <text:p><text:span text:style-name="T3">x</text:span></text:p>
              </draw:text-box>
            </draw:frame>
            <draw:frame draw:style-name="gr18" draw:text-style-name="P5" draw:layer="layout" svg:width="1.27cm" svg:height="0.952cm" svg:x="17.509cm" svg:y="6.08cm">
              <draw:text-box>
                <text:p><text:span text:style-name="T4">y</text:span></text:p>
              </draw:text-box>
            </draw:frame>
            <draw:frame draw:style-name="gr18" draw:text-style-name="P6" draw:layer="layout" svg:width="1.27cm" svg:height="0.952cm" svg:x="16.556cm" svg:y="9.255cm">
              <draw:text-box>
                <text:p><text:span text:style-name="T5">z</text:span></text:p>
              </draw:text-box>
            </draw:frame>
          </draw:g>
        </draw:g>
        <draw:g>
          <draw:line draw:style-name="gr1" draw:text-style-name="P1" draw:layer="layout" svg:x1="3.858cm" svg:y1="8.302cm" svg:x2="5.763cm" svg:y2="8.302cm">
            <text:p/>
          </draw:line>
          <draw:line draw:style-name="gr2" draw:text-style-name="P1" draw:layer="layout" svg:x1="3.858cm" svg:y1="8.302cm" svg:x2="3.858cm" svg:y2="6.397cm">
            <text:p/>
          </draw:line>
          <draw:line draw:style-name="gr3" draw:text-style-name="P1" draw:layer="layout" svg:x1="3.858cm" svg:y1="8.302cm" svg:x2="2.905cm" svg:y2="9.255cm">
            <text:p/>
          </draw:line>
          <draw:line draw:style-name="gr4" draw:text-style-name="P1" draw:layer="layout" svg:x1="3.858cm" svg:y1="4.175cm" svg:x2="2.27cm" svg:y2="4.175cm">
            <text:p/>
          </draw:line>
          <draw:line draw:style-name="gr5" draw:text-style-name="P1" draw:layer="layout" svg:x1="3.858cm" svg:y1="4.175cm" svg:x2="3.858cm" svg:y2="2.27cm">
            <text:p/>
          </draw:line>
          <draw:line draw:style-name="gr6" draw:text-style-name="P1" draw:layer="layout" svg:x1="3.858cm" svg:y1="4.175cm" svg:x2="4.81cm" svg:y2="3.222cm">
            <text:p/>
          </draw:line>
          <draw:line draw:style-name="gr7" draw:text-style-name="P1" draw:layer="layout" svg:x1="7.351cm" svg:y1="8.302cm" svg:x2="9.256cm" svg:y2="8.302cm">
            <text:p/>
          </draw:line>
          <draw:line draw:style-name="gr8" draw:text-style-name="P1" draw:layer="layout" svg:x1="7.351cm" svg:y1="8.302cm" svg:x2="7.351cm" svg:y2="9.89cm">
            <text:p/>
          </draw:line>
          <draw:line draw:style-name="gr9" draw:text-style-name="P1" draw:layer="layout" svg:x1="7.351cm" svg:y1="8.302cm" svg:x2="8.621cm" svg:y2="7.35cm">
            <text:p/>
          </draw:line>
          <draw:line draw:style-name="gr10" draw:text-style-name="P1" draw:layer="layout" svg:x1="7.351cm" svg:y1="12.112cm" svg:x2="5.763cm" svg:y2="12.112cm">
            <text:p/>
          </draw:line>
          <draw:line draw:style-name="gr11" draw:text-style-name="P1" draw:layer="layout" svg:x1="7.351cm" svg:y1="12.112cm" svg:x2="7.351cm" svg:y2="13.7cm">
            <text:p/>
          </draw:line>
          <draw:line draw:style-name="gr12" draw:text-style-name="P1" draw:layer="layout" svg:x1="7.351cm" svg:y1="12.112cm" svg:x2="6.081cm" svg:y2="13.065cm">
            <text:p/>
          </draw:line>
          <draw:custom-shape draw:style-name="gr20" draw:text-style-name="P1" draw:layer="layout" svg:width="6.033cm" svg:height="8.572cm" svg:x="1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4.762cm" svg:height="7.302cm" svg:x="5.128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6.715cm" svg:y1="5.762cm" svg:x2="6.715cm" svg:y2="10.842cm">
            <text:p/>
          </draw:line>
          <draw:line draw:style-name="gr16" draw:text-style-name="P1" draw:layer="layout" svg:x1="6.398cm" svg:y1="8.302cm" svg:x2="7.033cm" svg:y2="8.302cm">
            <text:p/>
          </draw:line>
          <draw:frame draw:style-name="gr17" draw:text-style-name="P2" draw:layer="layout" svg:width="4.445cm" svg:height="0.962cm" svg:x="5.445cm" svg:y="4.81cm">
            <draw:text-box>
              <text:p><text:span text:style-name="T1">contact plane</text:span></text:p>
            </draw:text-box>
          </draw:frame>
          <draw:frame draw:style-name="gr18" draw:text-style-name="P2" draw:layer="layout" svg:width="1.27cm" svg:height="0.952cm" svg:x="7.35cm" svg:y="8.302cm">
            <draw:text-box>
              <text:p><text:span text:style-name="T1">OC</text:span></text:p>
            </draw:text-box>
          </draw:frame>
          <draw:frame draw:style-name="gr18" draw:text-style-name="P2" draw:layer="layout" svg:width="1.27cm" svg:height="0.952cm" svg:x="7.35cm" svg:y="11.795cm">
            <draw:text-box>
              <text:p><text:span text:style-name="T1">OS</text:span></text:p>
            </draw:text-box>
          </draw:frame>
          <draw:frame draw:style-name="gr18" draw:text-style-name="P3" draw:layer="layout" svg:width="1.27cm" svg:height="0.952cm" svg:x="3.858cm" svg:y="7.667cm">
            <draw:text-box>
              <text:p><text:span text:style-name="T2">RC</text:span></text:p>
            </draw:text-box>
          </draw:frame>
          <draw:frame draw:style-name="gr18" draw:text-style-name="P3" draw:layer="layout" svg:width="1.27cm" svg:height="0.952cm" svg:x="3.858cm" svg:y="4.175cm">
            <draw:text-box>
              <text:p><text:span text:style-name="T2">RS</text:span></text:p>
            </draw:text-box>
          </draw:frame>
          <draw:frame draw:style-name="gr18" draw:text-style-name="P4" draw:layer="layout" svg:width="1.27cm" svg:height="0.952cm" svg:x="5.331cm" svg:y="7.609cm">
            <draw:text-box>
              <text:p><text:span text:style-name="T3">x</text:span></text:p>
            </draw:text-box>
          </draw:frame>
          <draw:frame draw:style-name="gr18" draw:text-style-name="P5" draw:layer="layout" svg:width="1.27cm" svg:height="0.952cm" svg:x="3.858cm" svg:y="6.08cm">
            <draw:text-box>
              <text:p><text:span text:style-name="T4">y</text:span></text:p>
            </draw:text-box>
          </draw:frame>
          <draw:frame draw:style-name="gr18" draw:text-style-name="P6" draw:layer="layout" svg:width="1.27cm" svg:height="0.952cm" svg:x="2.905cm" svg:y="9.255cm">
            <draw:text-box>
              <text:p><text:span text:style-name="T5">z</text:span></text:p>
            </draw:text-box>
          </draw:frame>
          <draw:line draw:style-name="gr1" draw:text-style-name="P1" draw:layer="layout" svg:x1="3.858cm" svg:y1="8.303cm" svg:x2="5.763cm" svg:y2="8.303cm">
            <text:p/>
          </draw:line>
          <draw:line draw:style-name="gr2" draw:text-style-name="P1" draw:layer="layout" svg:x1="3.858cm" svg:y1="8.303cm" svg:x2="3.858cm" svg:y2="6.398cm">
            <text:p/>
          </draw:line>
          <draw:line draw:style-name="gr3" draw:text-style-name="P1" draw:layer="layout" svg:x1="3.858cm" svg:y1="8.303cm" svg:x2="2.905cm" svg:y2="9.256cm">
            <text:p/>
          </draw:line>
          <draw:frame draw:style-name="gr18" draw:text-style-name="P3" draw:layer="layout" svg:width="1.27cm" svg:height="0.952cm" svg:x="3.858cm" svg:y="7.668cm">
            <draw:text-box>
              <text:p><text:span text:style-name="T2">RC</text:span></text:p>
            </draw:text-box>
          </draw:frame>
          <draw:frame draw:style-name="gr18" draw:text-style-name="P5" draw:layer="layout" svg:width="1.27cm" svg:height="0.952cm" svg:x="3.858cm" svg:y="6.081cm">
            <draw:text-box>
              <text:p><text:span text:style-name="T4">y</text:span></text:p>
            </draw:text-box>
          </draw:frame>
        </draw:g>
        <draw:line draw:style-name="gr7" draw:text-style-name="P1" draw:layer="layout" svg:x1="7.667cm" svg:y1="16.23cm" svg:x2="6.715cm" svg:y2="16.24cm">
          <text:p/>
        </draw:line>
        <draw:line draw:style-name="gr8" draw:text-style-name="P1" draw:layer="layout" svg:x1="7.667cm" svg:y1="16.23cm" svg:x2="7.667cm" svg:y2="17.192cm">
          <text:p/>
        </draw:line>
        <draw:line draw:style-name="gr9" draw:text-style-name="P1" draw:layer="layout" svg:x1="7.667cm" svg:y1="16.23cm" svg:x2="7.032cm" svg:y2="16.875cm">
          <text:p/>
        </draw:line>
        <draw:line draw:style-name="gr22" draw:text-style-name="P1" draw:layer="layout" svg:x1="7.668cm" svg:y1="20.049cm" svg:x2="6.714cm" svg:y2="20.05cm">
          <text:p/>
        </draw:line>
        <draw:line draw:style-name="gr23" draw:text-style-name="P1" draw:layer="layout" svg:x1="7.668cm" svg:y1="20.049cm" svg:x2="7.667cm" svg:y2="19.097cm">
          <text:p/>
        </draw:line>
        <draw:line draw:style-name="gr24" draw:text-style-name="P1" draw:layer="layout" svg:x1="7.668cm" svg:y1="20.049cm" svg:x2="8.302cm" svg:y2="19.415cm">
          <text:p/>
        </draw:line>
        <draw:line draw:style-name="gr16" draw:text-style-name="P1" draw:layer="layout" svg:x1="5.762cm" svg:y1="20.009cm" svg:x2="6.397cm" svg:y2="20.009cm">
          <text:p/>
        </draw:line>
        <draw:frame draw:style-name="gr19" draw:text-style-name="P2" draw:layer="layout" svg:width="1.906cm" svg:height="0.645cm" svg:x="7.031cm" svg:y="15.605cm">
          <draw:text-box>
            <text:p><text:span text:style-name="T1">TC, TS</text:span></text:p>
          </draw:text-box>
        </draw:frame>
        <draw:frame draw:style-name="gr25" draw:text-style-name="P2" draw:layer="layout" svg:width="1.905cm" svg:height="1.039cm" svg:x="7.032cm" svg:y="20.05cm">
          <draw:text-box>
            <text:p><text:span text:style-name="T1">OC, OS</text:span></text:p>
          </draw:text-box>
        </draw:frame>
        <draw:line draw:style-name="gr1" draw:text-style-name="P1" draw:layer="layout" svg:x1="3.54cm" svg:y1="20.049cm" svg:x2="5.445cm" svg:y2="20.049cm">
          <text:p/>
        </draw:line>
        <draw:line draw:style-name="gr2" draw:text-style-name="P1" draw:layer="layout" svg:x1="3.54cm" svg:y1="20.049cm" svg:x2="3.54cm" svg:y2="18.144cm">
          <text:p/>
        </draw:line>
        <draw:line draw:style-name="gr3" draw:text-style-name="P1" draw:layer="layout" svg:x1="3.54cm" svg:y1="20.049cm" svg:x2="2.587cm" svg:y2="21.002cm">
          <text:p/>
        </draw:line>
        <draw:frame draw:style-name="gr25" draw:text-style-name="P3" draw:layer="layout" svg:width="2.222cm" svg:height="1.039cm" svg:x="3.54cm" svg:y="19.414cm">
          <draw:text-box>
            <text:p><text:span text:style-name="T2">I, RC, RS</text:span></text:p>
          </draw:text-box>
        </draw:frame>
        <draw:frame draw:style-name="gr18" draw:text-style-name="P5" draw:layer="layout" svg:width="1.27cm" svg:height="0.952cm" svg:x="3.54cm" svg:y="17.827cm">
          <draw:text-box>
            <text:p><text:span text:style-name="T4">y</text:span></text:p>
          </draw:text-box>
        </draw:frame>
        <draw:frame draw:style-name="gr18" draw:text-style-name="P4" draw:layer="layout" svg:width="1.27cm" svg:height="0.952cm" svg:x="5.127cm" svg:y="20.05cm">
          <draw:text-box>
            <text:p><text:span text:style-name="T3">x</text:span></text:p>
          </draw:text-box>
        </draw:frame>
        <draw:frame draw:style-name="gr18" draw:text-style-name="P6" draw:layer="layout" svg:width="1.27cm" svg:height="0.952cm" svg:x="1.952cm" svg:y="20.367cm">
          <draw:text-box>
            <text:p><text:span text:style-name="T5">z</text:span></text:p>
          </draw:text-box>
        </draw:frame>
        <draw:custom-shape draw:style-name="gr26" draw:text-style-name="P1" draw:layer="layout" svg:width="2.54cm" svg:height="3.174cm" svg:x="6.397cm" svg:y="1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54cm" svg:height="2.857cm" svg:x="6.39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4.127cm" svg:height="4.128cm" svg:x="1.635cm" svg:y="1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127cm" svg:y1="18.462cm" svg:x2="6.397cm" svg:y2="16.875cm">
          <text:p/>
        </draw:line>
        <draw:line draw:style-name="gr29" draw:text-style-name="P1" draw:layer="layout" svg:x1="7.667cm" svg:y1="18.462cm" svg:x2="7.667cm" svg:y2="17.827cm">
          <text:p/>
        </draw:line>
        <draw:line draw:style-name="gr21" draw:text-style-name="P1" draw:layer="layout" svg:x1="6.08cm" svg:y1="17.827cm" svg:x2="6.08cm" svg:y2="21.637cm">
          <text:p/>
        </draw:line>
        <draw:frame draw:style-name="gr17" draw:text-style-name="P2" draw:layer="layout" svg:width="4.445cm" svg:height="0.962cm" svg:x="4.81cm" svg:y="21.945cm">
          <draw:text-box>
            <text:p><text:span text:style-name="T1">contact plan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9-24T12:04:08.068679978</meta:creation-date>
    <meta:editing-duration>PT1H56M1S</meta:editing-duration>
    <meta:editing-cycles>4</meta:editing-cycles>
    <meta:generator>LibreOffice/7.2.7.2$MacOSX_X86_64 LibreOffice_project/8d71d29d553c0f7dcbfa38fbfda25ee34cce99a2</meta:generator>
    <meta:initial-creator>Gary Turner</meta:initial-creator>
    <dc:date>2024-09-25T13:01:01.833492439</dc:date>
    <dc:creator>Gary Turner</dc:creator>
    <meta:document-statistic meta:object-count="79"/>
  </office:meta>
</office:document-meta>
</file>