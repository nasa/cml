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8f2a1" draw:textarea-horizontal-align="justify" draw:textarea-vertical-align="middle" draw:auto-grow-height="false" fo:min-height="0.512cm" fo:min-width="0.26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0.26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0.262cm" fo:padding-left="0.051cm" fo:padding-right="0.051cm"/>
      <style:paragraph-properties style:writing-mode="lr-tb"/>
    </style:style>
    <style:style style:name="gr4" style:family="graphic" style:parent-style-name="standard">
      <style:graphic-properties draw:fill-color="#ff972f" draw:textarea-horizontal-align="justify" draw:textarea-vertical-align="middle" draw:auto-grow-height="false" fo:min-height="0.512cm" fo:min-width="0.262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-color="#ff972f" draw:textarea-horizontal-align="justify" draw:textarea-vertical-align="middle" draw:auto-grow-height="false" fo:min-height="0.512cm" fo:min-width="0.66cm" fo:padding-left="0.051cm" fo:padding-right="0.051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-color="#e8f2a1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-color="#ff972f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762cm" svg:height="0.762cm" svg:x="9.255cm" svg:y="2.90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0.762cm" svg:height="0.762cm" svg:x="9.572cm" svg:y="6.90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0.762cm" svg:height="0.762cm" svg:x="5.949cm" svg:y="9.57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0.762cm" svg:height="0.762cm" svg:x="4.552cm" svg:y="9.572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0.762cm" svg:height="0.762cm" svg:x="5.953cm" svg:y="6.905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0.762cm" svg:height="0.762cm" svg:x="3.944cm" svg:y="6.92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0.762cm" svg:height="0.762cm" svg:x="14.652cm" svg:y="4.8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0.762cm" svg:height="0.762cm" svg:x="10.715cm" svg:y="4.8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0.762cm" svg:height="0.762cm" svg:x="5.005cm" svg:y="4.8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0.762cm" svg:height="0.762cm" svg:x="11.477cm" svg:y="6.90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9.636cm" svg:y1="3.667cm" svg:x2="5.386cm" svg:y2="4.81cm" draw:start-shape="id1" draw:start-glue-point="2" draw:end-shape="id2" draw:end-glue-point="0" svg:d="M9636 3667v572h-4250v571" svg:viewBox="0 0 4251 1144">
          <text:p/>
        </draw:connector>
        <draw:connector draw:style-name="gr5" draw:text-style-name="P4" draw:layer="layout" svg:x1="9.636cm" svg:y1="3.667cm" svg:x2="11.096cm" svg:y2="4.81cm" draw:start-shape="id1" draw:start-glue-point="2" draw:end-shape="id3" draw:end-glue-point="0" svg:d="M9636 3667v572h1460v571" svg:viewBox="0 0 1461 1144">
          <text:p/>
        </draw:connector>
        <draw:connector draw:style-name="gr5" draw:text-style-name="P4" draw:layer="layout" svg:x1="9.636cm" svg:y1="3.667cm" svg:x2="15.033cm" svg:y2="4.81cm" draw:start-shape="id1" draw:start-glue-point="2" draw:end-shape="id4" draw:end-glue-point="0" svg:d="M9636 3667v572h5397v571" svg:viewBox="0 0 5398 1144">
          <text:p/>
        </draw:connector>
        <draw:connector draw:style-name="gr5" draw:text-style-name="P4" draw:layer="layout" svg:x1="11.096cm" svg:y1="5.572cm" svg:x2="9.953cm" svg:y2="6.905cm" draw:start-shape="id3" draw:start-glue-point="2" draw:end-shape="id5" draw:end-glue-point="0" svg:d="M11096 5572v667h-1143v666" svg:viewBox="0 0 1144 1334">
          <text:p/>
        </draw:connector>
        <draw:connector draw:style-name="gr5" draw:text-style-name="P4" draw:layer="layout" svg:x1="11.096cm" svg:y1="5.572cm" svg:x2="11.858cm" svg:y2="6.905cm" draw:start-shape="id3" draw:start-glue-point="2" draw:end-shape="id6" draw:end-glue-point="0" svg:d="M11096 5572v667h762v666" svg:viewBox="0 0 763 1334">
          <text:p/>
        </draw:connector>
        <draw:connector draw:style-name="gr5" draw:text-style-name="P4" draw:layer="layout" svg:x1="5.386cm" svg:y1="5.572cm" svg:x2="4.325cm" svg:y2="6.922cm" draw:start-shape="id2" draw:start-glue-point="2" draw:end-shape="id7" draw:end-glue-point="0" svg:d="M5386 5572v675h-1061v675" svg:viewBox="0 0 1062 1351">
          <text:p/>
        </draw:connector>
        <draw:connector draw:style-name="gr5" draw:text-style-name="P4" draw:layer="layout" svg:x1="5.386cm" svg:y1="5.572cm" svg:x2="6.334cm" svg:y2="6.905cm" draw:start-shape="id2" draw:start-glue-point="2" draw:end-shape="id8" draw:end-glue-point="0" svg:d="M5386 5572v667h948v666" svg:viewBox="0 0 949 1334">
          <text:p/>
        </draw:connector>
        <draw:connector draw:style-name="gr5" draw:text-style-name="P4" draw:layer="layout" svg:x1="6.334cm" svg:y1="7.667cm" svg:x2="4.933cm" svg:y2="9.572cm" draw:start-shape="id8" draw:start-glue-point="2" draw:end-shape="id9" draw:end-glue-point="0" svg:d="M6334 7667v953h-1401v952" svg:viewBox="0 0 1402 1906">
          <text:p/>
        </draw:connector>
        <draw:connector draw:style-name="gr5" draw:text-style-name="P4" draw:layer="layout" svg:x1="6.334cm" svg:y1="7.667cm" svg:x2="6.33cm" svg:y2="9.572cm" draw:start-shape="id8" draw:start-glue-point="2" draw:end-shape="id10" draw:end-glue-point="0" svg:d="M6334 7667v953h-4v952" svg:viewBox="0 0 5 1906">
          <text:p/>
        </draw:connector>
        <draw:connector draw:style-name="gr5" draw:text-style-name="P4" draw:layer="layout" svg:x1="6.334cm" svg:y1="7.667cm" svg:x2="7.731cm" svg:y2="9.572cm" draw:start-shape="id8" draw:start-glue-point="2" draw:end-shape="id11" draw:end-glue-point="0" svg:d="M6334 7667v953h1397v952" svg:viewBox="0 0 1398 1906">
          <text:p/>
        </draw:connector>
        <draw:custom-shape draw:style-name="gr6" draw:text-style-name="P3" xml:id="id11" draw:id="id11" draw:layer="layout" svg:width="0.762cm" svg:height="0.762cm" svg:x="7.35cm" svg:y="9.57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0.762cm" svg:height="0.762cm" svg:x="2.27cm" svg:y="4.8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5" draw:text-style-name="P4" xml:id="id12" draw:id="id12" draw:layer="layout" svg:x1="9.636cm" svg:y1="3.667cm" svg:x2="9.636cm" svg:y2="3.667cm" draw:start-shape="id1" draw:start-glue-point="2" draw:end-shape="id1" draw:end-glue-point="2" svg:d="M9636 3667z" svg:viewBox="0 0 1 1">
          <text:p/>
        </draw:connector>
        <draw:connector draw:style-name="gr5" draw:text-style-name="P4" draw:layer="layout" svg:x1="9.636cm" svg:y1="3.667cm" svg:x2="2.651cm" svg:y2="4.81cm" draw:start-shape="id12" draw:start-glue-point="0" draw:end-shape="id13" draw:end-glue-point="0" svg:d="M9636 3667v572h-6985v571" svg:viewBox="0 0 6986 114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7-27T21:46:51.424524834</meta:creation-date>
    <meta:editing-duration>PT3H18M42S</meta:editing-duration>
    <meta:editing-cycles>3</meta:editing-cycles>
    <meta:generator>LibreOffice/7.2.7.2$MacOSX_X86_64 LibreOffice_project/8d71d29d553c0f7dcbfa38fbfda25ee34cce99a2</meta:generator>
    <dc:date>2022-07-28T11:28:51.807447096</dc:date>
    <meta:document-statistic meta:object-count="24"/>
  </office:meta>
</office:document-meta>
</file>